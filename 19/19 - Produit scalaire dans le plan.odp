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D0000013214E50A72.png" manifest:media-type="image/png"/>
  <manifest:file-entry manifest:full-path="Pictures/100000010000033F000000E95B2D3285.png" manifest:media-type="image/png"/>
  <manifest:file-entry manifest:full-path="Pictures/10000001000002D0000000847A095111.png" manifest:media-type="image/png"/>
  <manifest:file-entry manifest:full-path="Pictures/1000000100000661000000C475BF866B.png" manifest:media-type="image/png"/>
  <manifest:file-entry manifest:full-path="Pictures/1000000100000716000000E9A5E3393F.png" manifest:media-type="image/png"/>
  <manifest:file-entry manifest:full-path="Pictures/1000000100000220000001789636C27A.png" manifest:media-type="image/png"/>
  <manifest:file-entry manifest:full-path="Pictures/100000010000018C000000582C9B732E.png" manifest:media-type="image/png"/>
  <manifest:file-entry manifest:full-path="Pictures/100000010000072B0000016B7BB770B2.png" manifest:media-type="image/png"/>
  <manifest:file-entry manifest:full-path="Pictures/10000001000007340000010218AE295D.png" manifest:media-type="image/png"/>
  <manifest:file-entry manifest:full-path="Pictures/10000001000003330000007199813A84.png" manifest:media-type="image/png"/>
  <manifest:file-entry manifest:full-path="Pictures/100000010000022A0000003D92AFE8EF.png" manifest:media-type="image/png"/>
  <manifest:file-entry manifest:full-path="Pictures/1000000100000323000000869D480E7B.png" manifest:media-type="image/png"/>
  <manifest:file-entry manifest:full-path="Pictures/1000000100000549000001167C779517.png" manifest:media-type="image/png"/>
  <manifest:file-entry manifest:full-path="Pictures/10000001000006B1000000D22A26F386.png" manifest:media-type="image/png"/>
  <manifest:file-entry manifest:full-path="Pictures/10000001000006B4000001697A204CB7.png" manifest:media-type="image/png"/>
  <manifest:file-entry manifest:full-path="Pictures/100000010000053B0000008A69C060F1.png" manifest:media-type="image/png"/>
  <manifest:file-entry manifest:full-path="Pictures/100000010000054300000198A644D87D.png" manifest:media-type="image/png"/>
  <manifest:file-entry manifest:full-path="Pictures/10000001000006AD000000BB030C1EF0.png" manifest:media-type="image/png"/>
  <manifest:file-entry manifest:full-path="Pictures/100000010000057C000000C16737D546.png" manifest:media-type="image/png"/>
  <manifest:file-entry manifest:full-path="Pictures/10000001000002A0000000BF2660B024.png" manifest:media-type="image/png"/>
  <manifest:file-entry manifest:full-path="Pictures/10000001000002990000005E2177D66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outline1">
      <style:graphic-properties draw:textarea-horizontal-align="left"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lef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oduit scalaire dans le plan 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…</text:p>
              </text:list-item>
              <text:list-item>
                <text:p>Pré requis : bases sur les vecteurs, chasles, nor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Définiti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2">a) Définition trigonométrique</text:p>
            <text:p text:style-name="P2"/>
            <text:p text:style-name="P2"/>
            <text:p text:style-name="P2"/>
          </draw:text-box>
        </draw:frame>
        <draw:frame draw:style-name="gr2" draw:text-style-name="P3" draw:layer="layout" svg:width="24.417cm" svg:height="7.395cm" svg:x="1.4cm" svg:y="5.424cm">
          <draw:image xlink:href="Pictures/100000010000054300000198A644D8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<text:span text:style-name="T1">I/ a) Définition trigonométriqu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o retrouver un angle a partir de pdt sclaire et norm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1">I/ a) Définition trigonométriqu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en avec l’orthogonalité </text:p>
              </text:list-item>
            </text:list>
            <text:p/>
            <text:list text:continue-numbering="true" text:style-name="L2">
              <text:list-header>
                <text:p/>
              </text:list-header>
              <text:list-item>
                <text:p>Lien signe et sens.</text:p>
                <text:p/>
              </text:list-item>
            </text:list>
          </draw:text-box>
        </draw:frame>
        <draw:frame draw:style-name="gr2" draw:text-style-name="P3" draw:layer="layout" svg:width="24.253cm" svg:height="3.114cm" svg:x="1.792cm" svg:y="5.326cm">
          <draw:image xlink:href="Pictures/1000000100000716000000E9A5E3393F.png" xlink:type="simple" xlink:show="embed" xlink:actuate="onLoad" draw:mime-type="image/png">
            <text:p/>
          </draw:image>
        </draw:frame>
        <draw:frame draw:style-name="gr2" draw:text-style-name="P3" draw:layer="layout" svg:width="24.114cm" svg:height="4.769cm" svg:x="1.766cm" svg:y="10.485cm">
          <draw:image xlink:href="Pictures/100000010000072B0000016B7BB770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<text:span text:style-name="T1">I/ a) Définition trigonométriqu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hysique : lien avec la notion de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<text:span text:style-name="T1">I/ a) Définition trigonométriqu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termes de projeté orthogonal.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6.761cm" svg:height="3.743cm" svg:x="0.718cm" svg:y="4.96cm">
          <draw:image xlink:href="Pictures/10000001000007340000010218AE295D.png" xlink:type="simple" xlink:show="embed" xlink:actuate="onLoad" draw:mime-type="image/png">
            <text:p/>
          </draw:image>
        </draw:frame>
        <draw:frame draw:style-name="gr2" draw:text-style-name="P3" draw:layer="layout" svg:width="23.7cm" svg:height="4.868cm" svg:x="2.15cm" svg:y="9.031cm">
          <draw:image xlink:href="Pictures/1000000100000549000001167C7795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Définiti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2">b) Définition algébrique</text:p>
            <text:p text:style-name="P2"/>
            <text:p text:style-name="P2"/>
            <text:p text:style-name="P2">TODO : EXO orrtho avec</text:p>
          </draw:text-box>
        </draw:frame>
        <draw:frame draw:style-name="gr2" draw:text-style-name="P3" draw:layer="layout" svg:width="25.96cm" svg:height="3.181cm" svg:x="1.103cm" svg:y="5.478cm">
          <draw:image xlink:href="Pictures/10000001000006B1000000D22A26F3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 Propriété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a) Algébriques :</text:p>
            <text:list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27.999cm" svg:height="5.889cm" svg:x="0.691cm" svg:y="8.163cm">
          <draw:image xlink:href="Pictures/10000001000006B4000001697A204CB7.png" xlink:type="simple" xlink:show="embed" xlink:actuate="onLoad" draw:mime-type="image/png">
            <text:p/>
          </draw:image>
        </draw:frame>
        <draw:frame draw:style-name="gr2" draw:text-style-name="P3" draw:layer="layout" svg:width="23.674cm" svg:height="2.439cm" svg:x="0.636cm" svg:y="5.48cm">
          <draw:image xlink:href="Pictures/100000010000053B0000008A69C060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<text:span text:style-name="T1">II/ b) Lien avec les norm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 vient de voir :</text:p>
                <text:p/>
              </text:list-item>
              <text:list-item>
                <text:p>Conséquence :</text:p>
                <text:p/>
              </text:list-item>
              <text:list-item>
                <text:p>Définition en termes de normes</text:p>
              </text:list-item>
            </text:list>
          </draw:text-box>
        </draw:frame>
        <draw:frame draw:style-name="gr2" draw:text-style-name="P3" draw:layer="layout" svg:width="12.377cm" svg:height="2.749cm" svg:x="11.66cm" svg:y="4.105cm">
          <draw:image xlink:href="Pictures/100000010000018C000000582C9B732E.png" xlink:type="simple" xlink:show="embed" xlink:actuate="onLoad" draw:mime-type="image/png">
            <text:p/>
          </draw:image>
        </draw:frame>
        <draw:frame draw:style-name="gr2" draw:text-style-name="P3" draw:layer="layout" svg:width="26.222cm" svg:height="2.868cm" svg:x="1.078cm" svg:y="12.179cm">
          <draw:image xlink:href="Pictures/10000001000006AD000000BB030C1EF0.png" xlink:type="simple" xlink:show="embed" xlink:actuate="onLoad" draw:mime-type="image/png">
            <text:p/>
          </draw:image>
        </draw:frame>
        <draw:frame draw:style-name="gr2" draw:text-style-name="P3" draw:layer="layout" svg:width="21.608cm" svg:height="2.378cm" svg:x="3.309cm" svg:y="8.626cm">
          <draw:image xlink:href="Pictures/100000010000022A0000003D92AFE8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<text:span text:style-name="T1">II/ b) Lien avec les norm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res identités :</text:p>
              </text:list-item>
            </text:list>
            <text:p/>
            <text:p/>
          </draw:text-box>
        </draw:frame>
        <draw:frame draw:style-name="gr2" draw:text-style-name="P3" draw:layer="layout" svg:width="13.325cm" svg:height="3.787cm" svg:x="2.426cm" svg:y="5.301cm">
          <draw:image xlink:href="Pictures/10000001000002A0000000BF2660B024.png" xlink:type="simple" xlink:show="embed" xlink:actuate="onLoad" draw:mime-type="image/png">
            <text:p/>
          </draw:image>
        </draw:frame>
        <draw:frame draw:style-name="gr2" draw:text-style-name="P3" draw:layer="layout" svg:width="24.204cm" svg:height="3.42cm" svg:x="2.421cm" svg:y="9.258cm">
          <draw:image xlink:href="Pictures/10000001000002990000005E2177D66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I/ Applic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ractérise : droites</text:p>
                <text:p/>
              </text:list-item>
            </text:list>
          </draw:text-box>
        </draw:frame>
        <draw:frame draw:style-name="gr2" draw:text-style-name="P3" draw:layer="layout" svg:width="21.668cm" svg:height="2.989cm" svg:x="2.313cm" svg:y="5.163cm">
          <draw:image xlink:href="Pictures/10000001000003330000007199813A84.png" xlink:type="simple" xlink:show="embed" xlink:actuate="onLoad" draw:mime-type="image/png">
            <text:p/>
          </draw:image>
        </draw:frame>
        <draw:frame draw:style-name="gr2" draw:text-style-name="P3" draw:layer="layout" svg:width="18.505cm" svg:height="3.087cm" svg:x="2.882cm" svg:y="9.185cm">
          <draw:image xlink:href="Pictures/1000000100000323000000869D480E7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I/ Applic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ractérise : cercles</text:p>
              </text:list-item>
            </text:list>
            <text:p/>
            <text:p/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21.194cm" svg:height="2.912cm" svg:x="1.737cm" svg:y="4.858cm">
          <draw:image xlink:href="Pictures/100000010000057C000000C16737D546.png" xlink:type="simple" xlink:show="embed" xlink:actuate="onLoad" draw:mime-type="image/png">
            <text:p/>
          </draw:image>
        </draw:frame>
        <draw:frame draw:style-name="gr2" draw:text-style-name="P3" draw:layer="layout" svg:width="26.419cm" svg:height="3.169cm" svg:x="1.83cm" svg:y="7.718cm">
          <draw:image xlink:href="Pictures/1000000100000661000000C475BF866B.png" xlink:type="simple" xlink:show="embed" xlink:actuate="onLoad" draw:mime-type="image/png">
            <text:p/>
          </draw:image>
        </draw:frame>
        <draw:frame draw:style-name="gr2" draw:text-style-name="P3" draw:layer="layout" svg:width="23.206cm" svg:height="4.254cm" svg:x="1.388cm" svg:y="11.026cm">
          <draw:image xlink:href="Pictures/10000001000002D0000000847A0951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III/ Applic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uteurs d’un triangle sont concourantes </text:p>
              </text:list-item>
            </text:list>
          </draw:text-box>
        </draw:frame>
        <draw:frame draw:style-name="gr2" draw:text-style-name="P3" draw:layer="layout" svg:width="14.392cm" svg:height="9.947cm" svg:x="6.198cm" svg:y="5.114cm">
          <draw:image xlink:href="Pictures/1000000100000220000001789636C2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III/ Applic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stance d’un point à une droite / projeté orth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3">III/ Applic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lations trigonométrique: Al kashi</text:p>
              </text:list-item>
            </text:list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« Pythagore généralisé »</text:p>
              </text:list-item>
            </text:list>
          </draw:text-box>
        </draw:frame>
        <draw:frame draw:style-name="gr2" draw:text-style-name="P3" draw:layer="layout" svg:width="21.986cm" svg:height="6.164cm" svg:x="2.788cm" svg:y="5.077cm">
          <draw:image xlink:href="Pictures/100000010000033F000000E95B2D32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3">III/ Applic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éorème de la médiane</text:p>
                <text:p/>
              </text:list-item>
            </text:list>
          </draw:text-box>
        </draw:frame>
        <draw:frame draw:style-name="gr2" draw:text-style-name="P3" draw:layer="layout" svg:width="24.896cm" svg:height="8.095cm" svg:x="1.415cm" svg:y="5.212cm">
          <draw:image xlink:href="Pictures/10000001000003AD0000013214E50A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III/ Applic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blèmes d’interse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4T15:07:20.678111756</meta:creation-date>
    <meta:editing-duration>PT10M15S</meta:editing-duration>
    <meta:editing-cycles>5</meta:editing-cycles>
    <meta:generator>LibreOffice/26.2.3.2$Linux_X86_64 LibreOffice_project/7d74455cffae7a589951233f185ae0303c082020</meta:generator>
    <dc:date>2026-06-04T16:44:15.208189122</dc:date>
    <meta:document-statistic meta:object-count="114"/>
  </office:meta>
</office:document-meta>
</file>