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style:writing-mode="lr-tb" style:writing-mode-automatic="false"/>
      <style:text-properties fo:language="fr" fo:country="FR" officeooo:rsid="02296758" officeooo:paragraph-rsid="02296758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Text_20_body">
      <style:text-properties fo:language="fr" fo:country="FR" officeooo:paragraph-rsid="0006c1c5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Heading_20_1">
      <style:text-properties officeooo:rsid="0281142e" officeooo:paragraph-rsid="0281142e"/>
    </style:style>
    <style:style style:name="P8" style:family="paragraph" style:parent-style-name="Text_20_body" style:list-style-name="L1">
      <style:text-properties officeooo:rsid="02c71e7b" officeooo:paragraph-rsid="02bda252"/>
    </style:style>
    <style:style style:name="P9" style:family="paragraph" style:parent-style-name="Heading_20_1">
      <style:paragraph-properties fo:break-before="page"/>
      <style:text-properties officeooo:rsid="0281142e" officeooo:paragraph-rsid="0281142e"/>
    </style:style>
    <style:style style:name="P10" style:family="paragraph" style:parent-style-name="Heading_20_2">
      <style:text-properties officeooo:rsid="02825ea1" officeooo:paragraph-rsid="02825ea1"/>
    </style:style>
    <style:style style:name="T1" style:family="text">
      <style:text-properties officeooo:rsid="02f47cc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égrales, primitives</text:span>.</text:p>
      <text:h text:style-name="P2" text:outline-level="4">Rapport jury :</text:h>
      <text:p text:style-name="P3">La leçon « Intégrales, primitives « doit conduire à exposer clairement le lien entre les deux parties de la leçon et à mener des calculs classiques d’intégrales. Le jury constate souvent des incohérences dans l’articulation du plan. La démonstration des théorèmes exposés est un attendu.</text:p>
      <text:p text:style-name="P4">Livres : </text:p>
      <text:p text:style-name="P4"/>
      <text:p text:style-name="P5">Niveau : </text:p>
      <text:p text:style-name="P6">Pré-requis :</text:p>
      <text:h text:style-name="P7" text:outline-level="1" text:is-list-header="true"/>
      <text:list text:style-name="L1">
        <text:list-item>
          <text:p text:style-name="P8"/>
        </text:list-item>
      </text:list>
      <text:h text:style-name="P9" text:outline-level="1">I/ Introduction</text:h>
      <text:h text:style-name="P10" text:outline-level="2">a) Définition géométriqu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7d74455cffae7a589951233f185ae0303c082020</meta:generator>
    <dc:date>2026-05-25T14:16:21.573813396</dc:date>
    <meta:editing-duration>P3DT4H56M11S</meta:editing-duration>
    <meta:editing-cycles>541</meta:editing-cycles>
    <meta:document-statistic meta:table-count="0" meta:image-count="0" meta:object-count="0" meta:page-count="2" meta:paragraph-count="9" meta:word-count="62" meta:character-count="396" meta:non-whitespace-character-count="341"/>
  </office:meta>
</office:document-meta>
</file>