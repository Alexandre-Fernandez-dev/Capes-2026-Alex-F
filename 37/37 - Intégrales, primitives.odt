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4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4" manifest:media-type="application/vnd.oasis.opendocument.formula"/>
  <manifest:file-entry manifest:full-path="content.xml" manifest:media-type="text/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Thumbnails/thumbnail.png" manifest:media-type="image/png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4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Pictures/100000010000028300000145A092FDC4.png" manifest:media-type="image/png"/>
  <manifest:file-entry manifest:full-path="Pictures/10000001000000CA000000DB8C954E36.png" manifest:media-type="image/png"/>
  <manifest:file-entry manifest:full-path="Pictures/10000001000001A0000000D8FDCF8F84.png" manifest:media-type="image/png"/>
  <manifest:file-entry manifest:full-path="Pictures/1000000100000142000000DC14CEA348.png" manifest:media-type="image/png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4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4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manifest.rdf" manifest:media-type="application/rdf+xml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styles.xml" manifest:media-type="text/xml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4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4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Replacements/Object 99" manifest:media-type="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1" manifest:media-type=""/>
  <manifest:file-entry manifest:full-path="ObjectReplacements/Object 1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5" manifest:media-type=""/>
  <manifest:file-entry manifest:full-path="ObjectReplacements/Object 136" manifest:media-type="application/x-openoffice-gdimetafile;windows_formatname=&quot;GDIMetaFile&quot;"/>
  <manifest:file-entry manifest:full-path="ObjectReplacements/Object 36" manifest:media-type=""/>
  <manifest:file-entry manifest:full-path="ObjectReplacements/Object 24" manifest:media-type=""/>
  <manifest:file-entry manifest:full-path="ObjectReplacements/Object 5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"/>
  <manifest:file-entry manifest:full-path="ObjectReplacements/Object 72" manifest:media-type="application/x-openoffice-gdimetafile;windows_formatname=&quot;GDIMetaFile&quot;"/>
  <manifest:file-entry manifest:full-path="ObjectReplacements/Object 49" manifest:media-type=""/>
  <manifest:file-entry manifest:full-path="ObjectReplacements/Object 88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" manifest:media-type=""/>
  <manifest:file-entry manifest:full-path="ObjectReplacements/Object 8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"/>
  <manifest:file-entry manifest:full-path="ObjectReplacements/Object 116" manifest:media-type=""/>
  <manifest:file-entry manifest:full-path="ObjectReplacements/Object 10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5" manifest:media-type=""/>
  <manifest:file-entry manifest:full-path="ObjectReplacements/Object 10" manifest:media-type=""/>
  <manifest:file-entry manifest:full-path="ObjectReplacements/Object 12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1" manifest:media-type=""/>
  <manifest:file-entry manifest:full-path="ObjectReplacements/Object 134" manifest:media-type="application/x-openoffice-gdimetafile;windows_formatname=&quot;GDIMetaFile&quot;"/>
  <manifest:file-entry manifest:full-path="ObjectReplacements/Object 48" manifest:media-type=""/>
  <manifest:file-entry manifest:full-path="ObjectReplacements/Object 80" manifest:media-type="application/x-openoffice-gdimetafile;windows_formatname=&quot;GDIMetaFile&quot;"/>
  <manifest:file-entry manifest:full-path="ObjectReplacements/Object 113" manifest:media-type=""/>
  <manifest:file-entry manifest:full-path="ObjectReplacements/Object 41" manifest:media-type="application/x-openoffice-gdimetafile;windows_formatname=&quot;GDIMetaFile&quot;"/>
  <manifest:file-entry manifest:full-path="ObjectReplacements/Object 34" manifest:media-type="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"/>
  <manifest:file-entry manifest:full-path="ObjectReplacements/Object 112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00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56" manifest:media-type=""/>
  <manifest:file-entry manifest:full-path="ObjectReplacements/Object 12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4" manifest:media-type=""/>
  <manifest:file-entry manifest:full-path="ObjectReplacements/Object 52" manifest:media-type=""/>
  <manifest:file-entry manifest:full-path="ObjectReplacements/Object 3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7" manifest:media-type=""/>
  <manifest:file-entry manifest:full-path="ObjectReplacements/Object 83" manifest:media-type="application/x-openoffice-gdimetafile;windows_formatname=&quot;GDIMetaFile&quot;"/>
  <manifest:file-entry manifest:full-path="ObjectReplacements/Object 30" manifest:media-type=""/>
  <manifest:file-entry manifest:full-path="ObjectReplacements/Object 40" manifest:media-type=""/>
  <manifest:file-entry manifest:full-path="ObjectReplacements/Object 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"/>
  <manifest:file-entry manifest:full-path="ObjectReplacements/Object 31" manifest:media-type=""/>
  <manifest:file-entry manifest:full-path="ObjectReplacements/Object 9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" manifest:media-type=""/>
  <manifest:file-entry manifest:full-path="ObjectReplacements/Object 6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settings.xml" manifest:media-type="text/xml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4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2.2313in" style:rel-column-width="21845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2.2313in" style:rel-column-width="21845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style:writing-mode="lr-tb" style:writing-mode-automatic="false"/>
      <style:text-properties fo:language="fr" fo:country="FR" officeooo:rsid="02296758" officeooo:paragraph-rsid="02296758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Text_20_body">
      <style:text-properties fo:language="fr" fo:country="FR" officeooo:paragraph-rsid="0006c1c5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Heading_20_1">
      <style:text-properties officeooo:rsid="0281142e" officeooo:paragraph-rsid="0281142e"/>
    </style:style>
    <style:style style:name="P8" style:family="paragraph" style:parent-style-name="Heading_20_1">
      <style:paragraph-properties fo:break-before="page"/>
      <style:text-properties officeooo:rsid="02ff542c" officeooo:paragraph-rsid="02ff542c"/>
    </style:style>
    <style:style style:name="P9" style:family="paragraph" style:parent-style-name="Heading_20_2">
      <style:text-properties officeooo:rsid="02ff542c" officeooo:paragraph-rsid="02ff542c"/>
    </style:style>
    <style:style style:name="P10" style:family="paragraph" style:parent-style-name="Text_20_body">
      <style:text-properties officeooo:rsid="02ff542c" officeooo:paragraph-rsid="02ff542c"/>
    </style:style>
    <style:style style:name="P11" style:family="paragraph" style:parent-style-name="Text_20_body">
      <style:text-properties officeooo:rsid="02f878ca" officeooo:paragraph-rsid="02ff542c"/>
    </style:style>
    <style:style style:name="P12" style:family="paragraph" style:parent-style-name="Text_20_body">
      <style:text-properties officeooo:rsid="02f8974d" officeooo:paragraph-rsid="02ff542c"/>
    </style:style>
    <style:style style:name="P13" style:family="paragraph" style:parent-style-name="Text_20_body">
      <style:text-properties fo:font-weight="bold" officeooo:rsid="02ff542c" officeooo:paragraph-rsid="02ff542c" style:font-weight-asian="bold" style:font-weight-complex="bold"/>
    </style:style>
    <style:style style:name="P14" style:family="paragraph" style:parent-style-name="Text_20_body">
      <style:text-properties fo:font-weight="normal" officeooo:rsid="02ff542c" officeooo:paragraph-rsid="02ff542c" style:font-weight-asian="normal" style:font-weight-complex="normal"/>
    </style:style>
    <style:style style:name="P15" style:family="paragraph" style:parent-style-name="Text_20_body">
      <style:text-properties officeooo:rsid="02ff542c" officeooo:paragraph-rsid="03010a5d"/>
    </style:style>
    <style:style style:name="P16" style:family="paragraph" style:parent-style-name="Text_20_body">
      <style:text-properties officeooo:rsid="02f8974d" officeooo:paragraph-rsid="03010a5d"/>
    </style:style>
    <style:style style:name="P17" style:family="paragraph" style:parent-style-name="Text_20_body">
      <style:text-properties fo:font-weight="bold" officeooo:rsid="03010a5d" officeooo:paragraph-rsid="03010a5d" style:font-weight-asian="bold" style:font-weight-complex="bold"/>
    </style:style>
    <style:style style:name="P18" style:family="paragraph" style:parent-style-name="Text_20_body">
      <style:text-properties fo:font-weight="normal" officeooo:rsid="03010a5d" officeooo:paragraph-rsid="03010a5d" style:font-weight-asian="normal" style:font-weight-complex="normal"/>
    </style:style>
    <style:style style:name="P19" style:family="paragraph" style:parent-style-name="Heading_20_2">
      <style:text-properties officeooo:rsid="02ff542c" officeooo:paragraph-rsid="0302a5fe"/>
    </style:style>
    <style:style style:name="P20" style:family="paragraph" style:parent-style-name="Heading">
      <style:text-properties officeooo:rsid="0302a5fe" officeooo:paragraph-rsid="0302a5fe"/>
    </style:style>
    <style:style style:name="P21" style:family="paragraph" style:parent-style-name="Table_20_Contents">
      <style:text-properties officeooo:paragraph-rsid="0302a5fe"/>
    </style:style>
    <style:style style:name="P22" style:family="paragraph" style:parent-style-name="Standard">
      <style:text-properties officeooo:rsid="0302a5fe" officeooo:paragraph-rsid="0302a5fe"/>
    </style:style>
    <style:style style:name="P23" style:family="paragraph" style:parent-style-name="Standard">
      <style:text-properties officeooo:paragraph-rsid="0302a5fe"/>
    </style:style>
    <style:style style:name="P24" style:family="paragraph" style:parent-style-name="Standard" style:list-style-name="L1">
      <style:text-properties officeooo:paragraph-rsid="0302a5fe"/>
    </style:style>
    <style:style style:name="P25" style:family="paragraph" style:parent-style-name="Text_20_body">
      <style:paragraph-properties fo:line-height="115%"/>
      <style:text-properties officeooo:rsid="02f944d7" officeooo:paragraph-rsid="02f944d7"/>
    </style:style>
    <style:style style:name="P26" style:family="paragraph" style:parent-style-name="Heading_20_1">
      <style:paragraph-properties fo:break-before="page"/>
      <style:text-properties officeooo:rsid="02ff542c" officeooo:paragraph-rsid="03043c9c"/>
    </style:style>
    <style:style style:name="P27" style:family="paragraph" style:parent-style-name="Text_20_body">
      <style:text-properties officeooo:rsid="03043c9c" officeooo:paragraph-rsid="03043c9c"/>
    </style:style>
    <style:style style:name="P28" style:family="paragraph" style:parent-style-name="Heading_20_1">
      <style:text-properties officeooo:rsid="031b168e" officeooo:paragraph-rsid="031b168e"/>
    </style:style>
    <style:style style:name="P29" style:family="paragraph" style:parent-style-name="Text_20_body">
      <style:paragraph-properties style:writing-mode="lr-tb" style:writing-mode-automatic="false"/>
      <style:text-properties officeooo:rsid="02f944d7" officeooo:paragraph-rsid="02f944d7"/>
    </style:style>
    <style:style style:name="P30" style:family="paragraph" style:parent-style-name="Text_20_body">
      <style:paragraph-properties style:writing-mode="lr-tb" style:writing-mode-automatic="false"/>
      <style:text-properties officeooo:rsid="03043c9c" officeooo:paragraph-rsid="03043c9c"/>
    </style:style>
    <style:style style:name="P31" style:family="paragraph" style:parent-style-name="Text_20_body" style:list-style-name="L2">
      <style:text-properties officeooo:rsid="02f944d7" officeooo:paragraph-rsid="02f944d7"/>
    </style:style>
    <style:style style:name="P32" style:family="paragraph" style:parent-style-name="Text_20_body">
      <style:text-properties officeooo:rsid="03043c9c" officeooo:paragraph-rsid="0319cd50"/>
    </style:style>
    <style:style style:name="P33" style:family="paragraph" style:parent-style-name="Text_20_body" style:list-style-name="L3">
      <style:text-properties fo:font-weight="normal" officeooo:rsid="03043c9c" officeooo:paragraph-rsid="0319cd50" style:font-weight-asian="normal" style:font-weight-complex="normal"/>
    </style:style>
    <style:style style:name="P34" style:family="paragraph" style:parent-style-name="Text_20_body" style:list-style-name="L3">
      <style:text-properties officeooo:paragraph-rsid="0319cd50"/>
    </style:style>
    <style:style style:name="P35" style:family="paragraph" style:parent-style-name="Text_20_body">
      <style:text-properties officeooo:paragraph-rsid="031b168e"/>
    </style:style>
    <style:style style:name="P36" style:family="paragraph" style:parent-style-name="Text_20_body">
      <style:paragraph-properties fo:text-align="center" style:justify-single-word="false"/>
      <style:text-properties officeooo:paragraph-rsid="031b168e"/>
    </style:style>
    <style:style style:name="P37" style:family="paragraph" style:parent-style-name="Text_20_body">
      <style:paragraph-properties fo:text-align="left" style:justify-single-word="false"/>
      <style:text-properties officeooo:rsid="031b168e" officeooo:paragraph-rsid="031b168e"/>
    </style:style>
    <style:style style:name="P38" style:family="paragraph" style:parent-style-name="Text_20_body">
      <style:paragraph-properties fo:text-align="center" style:justify-single-word="false"/>
      <style:text-properties officeooo:rsid="031b168e" officeooo:paragraph-rsid="031b168e"/>
    </style:style>
    <style:style style:name="P39" style:family="paragraph" style:parent-style-name="Text_20_body">
      <style:text-properties fo:font-weight="normal" officeooo:rsid="0319cd50" officeooo:paragraph-rsid="031b168e" style:font-weight-asian="normal" style:font-weight-complex="normal"/>
    </style:style>
    <style:style style:name="P40" style:family="paragraph" style:parent-style-name="Text_20_body">
      <style:text-properties fo:font-weight="bold" officeooo:rsid="031b168e" officeooo:paragraph-rsid="031b168e" style:font-weight-asian="bold" style:font-weight-complex="bold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Text_20_body">
      <style:paragraph-properties style:writing-mode="lr-tb" style:writing-mode-automatic="false"/>
      <style:text-properties officeooo:rsid="02f944d7" officeooo:paragraph-rsid="031b168e"/>
    </style:style>
    <style:style style:name="P43" style:family="paragraph" style:parent-style-name="Text_20_body">
      <style:text-properties officeooo:rsid="02f944d7" officeooo:paragraph-rsid="031c63c4"/>
    </style:style>
    <style:style style:name="P44" style:family="paragraph" style:parent-style-name="Text_20_body">
      <style:paragraph-properties fo:text-align="center" style:justify-single-word="false"/>
      <style:text-properties fo:font-weight="normal" officeooo:rsid="031bdfb4" officeooo:paragraph-rsid="031b168e" style:font-weight-asian="normal" style:font-weight-complex="normal"/>
    </style:style>
    <style:style style:name="P45" style:family="paragraph" style:parent-style-name="Text_20_body">
      <style:paragraph-properties fo:text-align="left" style:justify-single-word="false"/>
      <style:text-properties fo:font-weight="normal" officeooo:rsid="031c0bba" officeooo:paragraph-rsid="031c0bba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weight="normal" officeooo:rsid="031c0bba" officeooo:paragraph-rsid="031c0bba" style:font-weight-asian="normal" style:font-weight-complex="normal"/>
    </style:style>
    <style:style style:name="P47" style:family="paragraph" style:parent-style-name="Text_20_body">
      <style:text-properties officeooo:rsid="02f944d7" officeooo:paragraph-rsid="031b168e"/>
    </style:style>
    <style:style style:name="P48" style:family="paragraph" style:parent-style-name="Text_20_body">
      <style:text-properties officeooo:paragraph-rsid="03043c9c"/>
    </style:style>
    <style:style style:name="P49" style:family="paragraph" style:parent-style-name="Text_20_body">
      <style:paragraph-properties fo:text-align="center" style:justify-single-word="false"/>
      <style:text-properties officeooo:rsid="02fb2179" officeooo:paragraph-rsid="02fb2179"/>
    </style:style>
    <style:style style:name="P50" style:family="paragraph" style:parent-style-name="Text_20_body">
      <style:paragraph-properties fo:text-align="center" style:justify-single-word="false"/>
      <style:text-properties officeooo:rsid="02fc2d88" officeooo:paragraph-rsid="03043c9c"/>
    </style:style>
    <style:style style:name="P51" style:family="paragraph" style:parent-style-name="Text_20_body">
      <style:paragraph-properties fo:text-align="left" style:justify-single-word="false"/>
      <style:text-properties fo:font-weight="bold" officeooo:rsid="03055e9c" officeooo:paragraph-rsid="03055e9c" style:font-weight-asian="bold" style:font-weight-complex="bold"/>
    </style:style>
    <style:style style:name="P52" style:family="paragraph" style:parent-style-name="Text_20_body">
      <style:paragraph-properties fo:text-align="left" style:justify-single-word="false"/>
      <style:text-properties officeooo:rsid="02fc2d88" officeooo:paragraph-rsid="03043c9c"/>
    </style:style>
    <style:style style:name="P53" style:family="paragraph" style:parent-style-name="Text_20_body">
      <style:paragraph-properties fo:text-align="left" style:justify-single-word="false"/>
      <style:text-properties officeooo:rsid="03055e9c" officeooo:paragraph-rsid="03055e9c"/>
    </style:style>
    <style:style style:name="P54" style:family="paragraph" style:parent-style-name="Text_20_body">
      <style:paragraph-properties fo:text-align="center" style:justify-single-word="false"/>
      <style:text-properties officeooo:rsid="03055e9c" officeooo:paragraph-rsid="03055e9c"/>
    </style:style>
    <style:style style:name="P55" style:family="paragraph" style:parent-style-name="Text_20_body">
      <style:text-properties officeooo:rsid="02fc2d88" officeooo:paragraph-rsid="02fc2d88"/>
    </style:style>
    <style:style style:name="P56" style:family="paragraph" style:parent-style-name="Text_20_body">
      <style:paragraph-properties fo:text-align="center" style:justify-single-word="false"/>
      <style:text-properties officeooo:rsid="02fc2d88" officeooo:paragraph-rsid="03055e9c"/>
    </style:style>
    <style:style style:name="P57" style:family="paragraph" style:parent-style-name="Text_20_body">
      <style:text-properties fo:font-weight="bold" officeooo:rsid="03055e9c" officeooo:paragraph-rsid="03055e9c" style:font-weight-asian="bold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font-weight="normal" officeooo:rsid="03055e9c" officeooo:paragraph-rsid="03055e9c" style:font-weight-asian="normal" style:font-weight-complex="normal"/>
    </style:style>
    <style:style style:name="P59" style:family="paragraph" style:parent-style-name="Text_20_body">
      <style:paragraph-properties fo:text-align="left" style:justify-single-word="false"/>
      <style:text-properties fo:font-weight="normal" officeooo:rsid="030634b8" officeooo:paragraph-rsid="030634b8" style:font-weight-asian="normal" style:font-weight-complex="normal"/>
    </style:style>
    <style:style style:name="P60" style:family="paragraph" style:parent-style-name="Heading_20_1">
      <style:text-properties officeooo:rsid="02ff542c" officeooo:paragraph-rsid="030634b8"/>
    </style:style>
    <style:style style:name="P61" style:family="paragraph" style:parent-style-name="Text_20_body">
      <style:paragraph-properties fo:text-align="left" style:justify-single-word="false"/>
      <style:text-properties fo:font-weight="bold" officeooo:rsid="030634b8" officeooo:paragraph-rsid="030634b8" style:font-weight-asian="bold" style:font-weight-complex="bold"/>
    </style:style>
    <style:style style:name="P62" style:family="paragraph" style:parent-style-name="Text_20_body">
      <style:paragraph-properties fo:text-align="center" style:justify-single-word="false"/>
      <style:text-properties fo:font-weight="normal" officeooo:rsid="030634b8" officeooo:paragraph-rsid="030634b8" style:font-weight-asian="normal" style:font-weight-complex="normal"/>
    </style:style>
    <style:style style:name="P63" style:family="paragraph" style:parent-style-name="Text_20_body">
      <style:paragraph-properties fo:text-align="left" style:justify-single-word="false"/>
      <style:text-properties officeooo:rsid="0307e4eb" officeooo:paragraph-rsid="0307e4eb"/>
    </style:style>
    <style:style style:name="P64" style:family="paragraph" style:parent-style-name="Text_20_body" style:list-style-name="L2">
      <style:text-properties officeooo:rsid="02fd6e61" officeooo:paragraph-rsid="02fd6e61"/>
    </style:style>
    <style:style style:name="P65" style:family="paragraph" style:parent-style-name="Text_20_body">
      <style:text-properties officeooo:rsid="0307e4eb" officeooo:paragraph-rsid="0307e4eb"/>
    </style:style>
    <style:style style:name="P66" style:family="paragraph" style:parent-style-name="Text_20_body">
      <style:text-properties fo:font-weight="normal" officeooo:rsid="030de3db" officeooo:paragraph-rsid="030de3db" style:font-weight-asian="normal" style:font-weight-complex="normal"/>
    </style:style>
    <style:style style:name="P67" style:family="paragraph" style:parent-style-name="Text_20_body">
      <style:text-properties fo:font-weight="bold" officeooo:rsid="030de3db" officeooo:paragraph-rsid="030de3db" style:font-weight-asian="bold" style:font-weight-complex="bold"/>
    </style:style>
    <style:style style:name="P68" style:family="paragraph" style:parent-style-name="Text_20_body">
      <style:text-properties fo:font-weight="bold" officeooo:rsid="030ebd32" officeooo:paragraph-rsid="030ebd32" style:font-weight-asian="bold" style:font-weight-complex="bold"/>
    </style:style>
    <style:style style:name="P69" style:family="paragraph" style:parent-style-name="Text_20_body" style:list-style-name="L4">
      <style:text-properties fo:font-weight="normal" officeooo:rsid="030ebd32" officeooo:paragraph-rsid="030ebd32" style:font-weight-asian="normal" style:font-weight-complex="normal"/>
    </style:style>
    <style:style style:name="P70" style:family="paragraph" style:parent-style-name="Text_20_body" style:list-style-name="L4">
      <style:text-properties fo:font-weight="normal" officeooo:rsid="03102eda" officeooo:paragraph-rsid="03102eda" style:font-weight-asian="normal" style:font-weight-complex="normal"/>
    </style:style>
    <style:style style:name="P71" style:family="paragraph" style:parent-style-name="Text_20_body">
      <style:text-properties fo:font-weight="normal" officeooo:rsid="03102eda" officeooo:paragraph-rsid="03102eda" style:font-weight-asian="normal" style:font-weight-complex="normal"/>
    </style:style>
    <style:style style:name="P72" style:family="paragraph" style:parent-style-name="Text_20_body">
      <style:text-properties fo:font-weight="bold" officeooo:rsid="03102eda" officeooo:paragraph-rsid="03102eda" style:font-weight-asian="bold" style:font-weight-complex="bold"/>
    </style:style>
    <style:style style:name="P73" style:family="paragraph" style:parent-style-name="Text_20_body">
      <style:text-properties fo:font-weight="normal" officeooo:rsid="03104678" officeooo:paragraph-rsid="03104678" style:font-weight-asian="normal" style:font-weight-complex="normal"/>
    </style:style>
    <style:style style:name="P74" style:family="paragraph" style:parent-style-name="Text_20_body">
      <style:text-properties fo:font-weight="bold" officeooo:rsid="03104678" officeooo:paragraph-rsid="03104678" style:font-weight-asian="bold" style:font-weight-complex="bold"/>
    </style:style>
    <style:style style:name="P75" style:family="paragraph" style:parent-style-name="Text_20_body">
      <style:paragraph-properties fo:text-align="center" style:justify-single-word="false"/>
      <style:text-properties fo:font-weight="normal" officeooo:rsid="03104678" officeooo:paragraph-rsid="03104678" style:font-weight-asian="normal" style:font-weight-complex="normal"/>
    </style:style>
    <style:style style:name="P76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04678" officeooo:paragraph-rsid="0311bb78" style:font-weight-asian="normal" style:font-weight-complex="normal"/>
    </style:style>
    <style:style style:name="P77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1bb78" officeooo:paragraph-rsid="0311bb78" style:font-weight-asian="normal" style:font-weight-complex="normal"/>
    </style:style>
    <style:style style:name="P78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1bb78" officeooo:paragraph-rsid="0311bb78" style:font-weight-asian="bold" style:font-weight-complex="bold"/>
    </style:style>
    <style:style style:name="P79" style:family="paragraph" style:parent-style-name="Text_20_body">
      <style:paragraph-properties fo:margin-left="0in" fo:text-align="center" style:justify-single-word="false" fo:text-indent="0in" style:auto-text-indent="false"/>
      <style:text-properties fo:font-weight="normal" officeooo:rsid="0311bb78" officeooo:paragraph-rsid="0311bb78" style:font-weight-asian="normal" style:font-weight-complex="normal"/>
    </style:style>
    <style:style style:name="P80" style:family="paragraph" style:parent-style-name="Text_20_body" style:list-style-name="L5">
      <style:paragraph-properties fo:text-align="left" style:justify-single-word="false"/>
      <style:text-properties fo:font-weight="normal" officeooo:rsid="0311bb78" officeooo:paragraph-rsid="0311bb78" style:font-weight-asian="normal" style:font-weight-complex="normal"/>
    </style:style>
    <style:style style:name="P81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392a0" officeooo:paragraph-rsid="0314ad61" style:font-weight-asian="bold" style:font-weight-complex="bold"/>
    </style:style>
    <style:style style:name="P82" style:family="paragraph" style:parent-style-name="Text_20_body">
      <style:paragraph-properties fo:text-align="left" style:justify-single-word="false"/>
      <style:text-properties fo:font-weight="normal" officeooo:rsid="031392a0" officeooo:paragraph-rsid="031392a0" style:font-weight-asian="normal" style:font-weight-complex="normal"/>
    </style:style>
    <style:style style:name="P83" style:family="paragraph" style:parent-style-name="Text_20_body" style:list-style-name="L6">
      <style:paragraph-properties fo:text-align="left" style:justify-single-word="false"/>
      <style:text-properties fo:font-weight="normal" officeooo:rsid="031392a0" officeooo:paragraph-rsid="031392a0" style:font-weight-asian="normal" style:font-weight-complex="normal"/>
    </style:style>
    <style:style style:name="P84" style:family="paragraph" style:parent-style-name="Text_20_body" style:list-style-name="L6">
      <style:paragraph-properties fo:text-align="center" style:justify-single-word="false"/>
      <style:text-properties fo:font-weight="normal" officeooo:rsid="031392a0" officeooo:paragraph-rsid="031392a0" style:font-weight-asian="normal" style:font-weight-complex="normal"/>
    </style:style>
    <style:style style:name="P85" style:family="paragraph" style:parent-style-name="Text_20_body" style:list-style-name="L6">
      <style:paragraph-properties fo:text-align="left" style:justify-single-word="false"/>
      <style:text-properties fo:font-weight="normal" officeooo:rsid="031392a0" officeooo:paragraph-rsid="0314ad61" style:font-weight-asian="normal" style:font-weight-complex="normal"/>
    </style:style>
    <style:style style:name="P86" style:family="paragraph" style:parent-style-name="Text_20_body" style:list-style-name="L6">
      <style:paragraph-properties fo:text-align="left" style:justify-single-word="false"/>
      <style:text-properties fo:font-weight="normal" officeooo:rsid="0314ad61" officeooo:paragraph-rsid="0314ad61" style:font-weight-asian="normal" style:font-weight-complex="normal"/>
    </style:style>
    <style:style style:name="P87" style:family="paragraph" style:parent-style-name="Text_20_body" style:list-style-name="L6">
      <style:paragraph-properties fo:text-align="center" style:justify-single-word="false"/>
      <style:text-properties fo:font-weight="normal" officeooo:rsid="0314ad61" officeooo:paragraph-rsid="0314ad61" style:font-weight-asian="normal" style:font-weight-complex="normal"/>
    </style:style>
    <style:style style:name="P88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4ad61" officeooo:paragraph-rsid="0314ad61" style:font-weight-asian="bold" style:font-weight-complex="bold"/>
    </style:style>
    <style:style style:name="P89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4ad61" officeooo:paragraph-rsid="0314ad61" style:font-weight-asian="normal" style:font-weight-complex="normal"/>
    </style:style>
    <style:style style:name="P90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4d8a1" officeooo:paragraph-rsid="0314d8a1" style:font-weight-asian="normal" style:font-weight-complex="normal"/>
    </style:style>
    <style:style style:name="P91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4d8a1" officeooo:paragraph-rsid="0314d8a1" style:font-weight-asian="bold" style:font-weight-complex="bold"/>
    </style:style>
    <style:style style:name="P92" style:family="paragraph" style:parent-style-name="Text_20_body" style:list-style-name="L7">
      <style:text-properties fo:font-weight="normal" officeooo:rsid="030ebd32" officeooo:paragraph-rsid="0314d8a1" style:font-weight-asian="normal" style:font-weight-complex="normal"/>
    </style:style>
    <style:style style:name="P93" style:family="paragraph" style:parent-style-name="Text_20_body" style:list-style-name="L7">
      <style:text-properties fo:font-weight="normal" officeooo:rsid="03102eda" officeooo:paragraph-rsid="0314d8a1" style:font-weight-asian="normal" style:font-weight-complex="normal"/>
    </style:style>
    <style:style style:name="P94" style:family="paragraph" style:parent-style-name="Text_20_body" style:list-style-name="L7">
      <style:text-properties fo:font-weight="normal" officeooo:rsid="031591c4" officeooo:paragraph-rsid="0316c03e" style:font-weight-asian="normal" style:font-weight-complex="normal"/>
    </style:style>
    <style:style style:name="P95" style:family="paragraph" style:parent-style-name="Text_20_body" style:list-style-name="L8">
      <style:text-properties officeooo:rsid="0307e4eb" officeooo:paragraph-rsid="0307e4eb"/>
    </style:style>
    <style:style style:name="P96" style:family="paragraph" style:parent-style-name="Text_20_body">
      <style:text-properties fo:font-weight="bold" officeooo:rsid="0307e4eb" officeooo:paragraph-rsid="0307e4eb" style:font-weight-asian="bold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weight="normal" officeooo:rsid="0307e4eb" officeooo:paragraph-rsid="0307e4eb" style:font-weight-asian="normal" style:font-weight-complex="normal"/>
    </style:style>
    <style:style style:name="P98" style:family="paragraph" style:parent-style-name="Text_20_body" style:list-style-name="L9">
      <style:text-properties officeooo:rsid="02fd6e61" officeooo:paragraph-rsid="02fd6e61"/>
    </style:style>
    <style:style style:name="P99" style:family="paragraph" style:parent-style-name="Heading_20_1">
      <style:text-properties officeooo:rsid="02ff542c" officeooo:paragraph-rsid="0307e4eb"/>
    </style:style>
    <style:style style:name="P100" style:family="paragraph" style:parent-style-name="Heading_20_1">
      <style:paragraph-properties fo:break-before="page"/>
      <style:text-properties officeooo:rsid="02ff542c" officeooo:paragraph-rsid="0307e4eb"/>
    </style:style>
    <style:style style:name="P101" style:family="paragraph" style:parent-style-name="Text_20_body">
      <style:paragraph-properties fo:text-align="center" style:justify-single-word="false"/>
      <style:text-properties officeooo:rsid="02fb2179" officeooo:paragraph-rsid="0307e4eb"/>
    </style:style>
    <style:style style:name="P102" style:family="paragraph" style:parent-style-name="Text_20_body">
      <style:text-properties fo:font-weight="bold" officeooo:rsid="0307f85f" officeooo:paragraph-rsid="0307f85f" style:font-weight-asian="bold" style:font-weight-complex="bold"/>
    </style:style>
    <style:style style:name="P103" style:family="paragraph" style:parent-style-name="Text_20_body">
      <style:text-properties officeooo:rsid="02fd6e61" officeooo:paragraph-rsid="02fd6e61"/>
    </style:style>
    <style:style style:name="P104" style:family="paragraph" style:parent-style-name="Text_20_body">
      <style:text-properties officeooo:rsid="0307f85f" officeooo:paragraph-rsid="0307f85f"/>
    </style:style>
    <style:style style:name="P105" style:family="paragraph" style:parent-style-name="Text_20_body" style:list-style-name="L10">
      <style:text-properties fo:font-weight="normal" officeooo:rsid="0307f85f" officeooo:paragraph-rsid="0307f85f" style:font-weight-asian="normal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fo:font-weight="normal" officeooo:rsid="0307f85f" officeooo:paragraph-rsid="0307f85f" style:font-weight-asian="normal" style:font-weight-complex="normal"/>
    </style:style>
    <style:style style:name="P107" style:family="paragraph" style:parent-style-name="Text_20_body">
      <style:paragraph-properties fo:text-align="left" style:justify-single-word="false"/>
      <style:text-properties fo:font-weight="normal" officeooo:rsid="0309915b" officeooo:paragraph-rsid="0309915b" style:font-weight-asian="normal" style:font-weight-complex="normal"/>
    </style:style>
    <style:style style:name="P108" style:family="paragraph" style:parent-style-name="Text_20_body">
      <style:paragraph-properties fo:text-align="left" style:justify-single-word="false"/>
      <style:text-properties fo:font-weight="normal" officeooo:rsid="0307f85f" officeooo:paragraph-rsid="0307f85f" style:font-weight-asian="normal" style:font-weight-complex="normal"/>
    </style:style>
    <style:style style:name="P109" style:family="paragraph" style:parent-style-name="Heading_20_1">
      <style:text-properties officeooo:rsid="02ff542c" officeooo:paragraph-rsid="0307f85f"/>
    </style:style>
    <style:style style:name="P110" style:family="paragraph" style:parent-style-name="Text_20_body">
      <style:text-properties fo:font-weight="normal" officeooo:rsid="0307f85f" officeooo:paragraph-rsid="0307f85f" style:font-weight-asian="normal" style:font-weight-complex="normal"/>
    </style:style>
    <style:style style:name="P111" style:family="paragraph" style:parent-style-name="Text_20_body" style:list-style-name="L11">
      <style:text-properties fo:font-weight="normal" officeooo:rsid="0307f85f" officeooo:paragraph-rsid="0307f85f" style:font-weight-asian="normal" style:font-weight-complex="normal"/>
    </style:style>
    <style:style style:name="P112" style:family="paragraph" style:parent-style-name="Text_20_body">
      <style:text-properties officeooo:rsid="03080c55" officeooo:paragraph-rsid="03080c55"/>
    </style:style>
    <style:style style:name="P113" style:family="paragraph" style:parent-style-name="Text_20_body">
      <style:paragraph-properties fo:text-align="center" style:justify-single-word="false"/>
      <style:text-properties officeooo:rsid="03080c55" officeooo:paragraph-rsid="03080c55"/>
    </style:style>
    <style:style style:name="P114" style:family="paragraph" style:parent-style-name="Text_20_body">
      <style:paragraph-properties fo:text-align="left" style:justify-single-word="false"/>
      <style:text-properties officeooo:rsid="03080c55" officeooo:paragraph-rsid="0309915b"/>
    </style:style>
    <style:style style:name="P115" style:family="paragraph" style:parent-style-name="Text_20_body">
      <style:paragraph-properties fo:text-align="left" style:justify-single-word="false"/>
      <style:text-properties officeooo:rsid="0309915b" officeooo:paragraph-rsid="0309915b"/>
    </style:style>
    <style:style style:name="P116" style:family="paragraph" style:parent-style-name="Text_20_body" style:list-style-name="L12">
      <style:paragraph-properties fo:text-align="left" style:justify-single-word="false"/>
      <style:text-properties officeooo:rsid="02ff5239" officeooo:paragraph-rsid="0309915b"/>
    </style:style>
    <style:style style:name="T1" style:family="text">
      <style:text-properties officeooo:rsid="02f47c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3010a5d" style:font-weight-asian="bold" style:font-weight-complex="bold"/>
    </style:style>
    <style:style style:name="T5" style:family="text">
      <style:text-properties fo:font-weight="bold" officeooo:rsid="030cd697" style:font-weight-asian="bold" style:font-weight-complex="bold"/>
    </style:style>
    <style:style style:name="T6" style:family="text">
      <style:text-properties fo:font-weight="normal" officeooo:rsid="03010a5d" style:font-weight-asian="normal" style:font-weight-complex="normal"/>
    </style:style>
    <style:style style:name="T7" style:family="text">
      <style:text-properties fo:font-weight="normal" officeooo:rsid="02f8974d" style:font-weight-asian="normal" style:font-weight-complex="normal"/>
    </style:style>
    <style:style style:name="T8" style:family="text">
      <style:text-properties officeooo:rsid="03010a5d"/>
    </style:style>
    <style:style style:name="T9" style:family="text">
      <style:text-properties officeooo:rsid="0302a5fe"/>
    </style:style>
    <style:style style:name="T10" style:family="text">
      <style:text-properties officeooo:rsid="030634b8"/>
    </style:style>
    <style:style style:name="T11" style:family="text">
      <style:text-properties officeooo:rsid="03043c9c"/>
    </style:style>
    <style:style style:name="T12" style:family="text">
      <style:text-properties officeooo:rsid="031b168e"/>
    </style:style>
    <style:style style:name="T13" style:family="text">
      <style:text-properties fo:font-weight="bold" officeooo:rsid="03043c9c" style:font-weight-asian="bold" style:font-weight-complex="bold"/>
    </style:style>
    <style:style style:name="T14" style:family="text">
      <style:text-properties fo:font-style="italic" fo:font-weight="normal" officeooo:rsid="03043c9c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officeooo:rsid="03043c9c" style:font-style-asian="normal" style:font-weight-asian="normal" style:font-style-complex="normal" style:font-weight-complex="normal"/>
    </style:style>
    <style:style style:name="T16" style:family="text">
      <style:text-properties officeooo:rsid="02fb2179"/>
    </style:style>
    <style:style style:name="T17" style:family="text">
      <style:text-properties officeooo:rsid="02fc2d88"/>
    </style:style>
    <style:style style:name="T18" style:family="text">
      <style:text-properties fo:font-weight="bold" officeooo:rsid="030d7286" style:font-weight-asian="bold" style:font-weight-complex="bold"/>
    </style:style>
    <style:style style:name="T19" style:family="text">
      <style:text-properties fo:font-weight="bold" officeooo:rsid="0319cd50" style:font-weight-asian="bold" style:font-weight-complex="bold"/>
    </style:style>
    <style:style style:name="T20" style:family="text">
      <style:text-properties fo:font-weight="normal" officeooo:rsid="0319cd50" style:font-weight-asian="normal" style:font-weight-complex="normal"/>
    </style:style>
    <style:style style:name="T21" style:family="text">
      <style:text-properties fo:font-weight="bold" officeooo:rsid="031c63c4" style:font-weight-asian="bold" style:font-weight-complex="bold"/>
    </style:style>
    <style:style style:name="T22" style:family="text">
      <style:text-properties fo:font-weight="normal" officeooo:rsid="03043c9c" style:font-weight-asian="normal" style:font-weight-complex="normal"/>
    </style:style>
    <style:style style:name="T23" style:family="text">
      <style:text-properties fo:font-weight="normal" officeooo:rsid="031b168e" style:font-weight-asian="normal" style:font-weight-complex="normal"/>
    </style:style>
    <style:style style:name="T24" style:family="text">
      <style:text-properties fo:font-weight="normal" officeooo:rsid="031c63c4" style:font-weight-asian="normal" style:font-weight-complex="normal"/>
    </style:style>
    <style:style style:name="T25" style:family="text">
      <style:text-properties fo:font-weight="normal" officeooo:rsid="030d01e4" style:font-weight-asian="normal" style:font-weight-complex="normal"/>
    </style:style>
    <style:style style:name="T26" style:family="text">
      <style:text-properties fo:font-weight="normal" officeooo:rsid="031bdfb4" style:font-weight-asian="normal" style:font-weight-complex="normal"/>
    </style:style>
    <style:style style:name="T27" style:family="text">
      <style:text-properties officeooo:rsid="03224947"/>
    </style:style>
    <style:style style:name="T28" style:family="text">
      <style:text-properties officeooo:rsid="031c9b25"/>
    </style:style>
    <style:style style:name="T29" style:family="text">
      <style:text-properties fo:font-weight="bold" officeooo:rsid="031c9b25" style:font-weight-asian="bold" style:font-weight-complex="bold"/>
    </style:style>
    <style:style style:name="T30" style:family="text">
      <style:text-properties officeooo:rsid="03235cc0"/>
    </style:style>
    <style:style style:name="T31" style:family="text">
      <style:text-properties officeooo:rsid="0324e541"/>
    </style:style>
    <style:style style:name="T32" style:family="text">
      <style:text-properties officeooo:rsid="030d7286"/>
    </style:style>
    <style:style style:name="T33" style:family="text">
      <style:text-properties style:text-position="super 58%" officeooo:rsid="030cd697"/>
    </style:style>
    <style:style style:name="T34" style:family="text">
      <style:text-properties officeooo:rsid="03055e9c"/>
    </style:style>
    <style:style style:name="T35" style:family="text">
      <style:text-properties officeooo:rsid="030de3db"/>
    </style:style>
    <style:style style:name="T36" style:family="text">
      <style:text-properties officeooo:rsid="030ebd32"/>
    </style:style>
    <style:style style:name="T37" style:family="text">
      <style:text-properties officeooo:rsid="03104678"/>
    </style:style>
    <style:style style:name="T38" style:family="text">
      <style:text-properties officeooo:rsid="0311bb78"/>
    </style:style>
    <style:style style:name="T39" style:family="text">
      <style:text-properties officeooo:rsid="031392a0"/>
    </style:style>
    <style:style style:name="T40" style:family="text">
      <style:text-properties officeooo:rsid="0314ad61"/>
    </style:style>
    <style:style style:name="T41" style:family="text">
      <style:text-properties fo:font-weight="normal" officeooo:rsid="030ebd32" style:font-weight-asian="normal" style:font-weight-complex="normal"/>
    </style:style>
    <style:style style:name="T42" style:family="text">
      <style:text-properties officeooo:rsid="0314d8a1"/>
    </style:style>
    <style:style style:name="T43" style:family="text">
      <style:text-properties officeooo:rsid="0316c03e"/>
    </style:style>
    <style:style style:name="T44" style:family="text">
      <style:text-properties officeooo:rsid="0318e073"/>
    </style:style>
    <style:style style:name="T45" style:family="text">
      <style:text-properties officeooo:rsid="0307e4eb"/>
    </style:style>
    <style:style style:name="T46" style:family="text">
      <style:text-properties officeooo:rsid="0307f85f"/>
    </style:style>
    <style:style style:name="T47" style:family="text">
      <style:text-properties fo:font-weight="bold" officeooo:rsid="0309915b" style:font-weight-asian="bold" style:font-weight-complex="bold"/>
    </style:style>
    <style:style style:name="T48" style:family="text">
      <style:text-properties fo:font-weight="normal" officeooo:rsid="0309915b" style:font-weight-asian="normal" style:font-weight-complex="normal"/>
    </style:style>
    <style:style style:name="T49" style:family="text">
      <style:text-properties officeooo:rsid="0309915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égrales, primitives</text:span>.</text:p>
      <text:h text:style-name="P2" text:outline-level="4">Rapport jury :</text:h>
      <text:p text:style-name="P3">La leçon « Intégrales, primitives « doit conduire à exposer clairement le lien entre les deux parties de la leçon et à mener des calculs classiques d’intégrales. Le jury constate souvent des incohérences dans l’articulation du plan. La démonstration des théorèmes exposés est un attendu.</text:p>
      <text:p text:style-name="P4">Livres : </text:p>
      <text:p text:style-name="P4"/>
      <text:p text:style-name="P5">Niveau : </text:p>
      <text:p text:style-name="P6">Pré-requis :</text:p>
      <text:h text:style-name="P7" text:outline-level="1" text:is-list-header="true"/>
      <text:h text:style-name="P8" text:outline-level="1">I/ Primitives</text:h>
      <text:h text:style-name="P9" text:outline-level="2">A) Def props</text:h>
      <text:p text:style-name="P10"><text:span text:style-name="T2">Définition </text:span><text:span text:style-name="T3">: <text:s/>Soit f définie sur un intervalle réel I. On dit que F est une primitive de f sur I si elle est dérivable et F’ = f sur I</text:span></text:p>
      <text:p text:style-name="P11"><text:span text:style-name="T2">Ex </text:span><text:span text:style-name="T3">: </text:span><text:s/>prim de x³ ou prim de 1/sqrt(x)</text:p>
      <text:p text:style-name="P10"><text:span text:style-name="T2">Théorème </text:span><text:span text:style-name="T4">(admis </text:span><text:span text:style-name="T5">pour l’instant</text:span><text:span text:style-name="T4">) </text:span><text:span text:style-name="T3">:</text:span> Toute fonction continue sur un intervalle admet des primitives sur cet intervalle.</text:p>
      <text:p text:style-name="P10">Preuve plus loin.</text:p>
      <text:p text:style-name="P12"><text:span text:style-name="T2">Exemple</text:span> 1/(x^2+1).</text:p>
      <text:p text:style-name="P13">Prop <text:span text:style-name="T3">: Si F est primitive de f sur I alors pour tout k réel, F + k est primitive de f sur I.</text:span></text:p>
      <text:p text:style-name="P14">Démo : On dérive.</text:p>
      <text:p text:style-name="P13">Prop <text:span text:style-name="T3">: Si G et F sont primitives de F sur I alors il existe k tel que G = F + k.</text:span></text:p>
      <text:p text:style-name="P15"><text:span text:style-name="T3">Démo: </text:span><text:span text:style-name="T6">Prendre</text:span><text:span text:style-name="T7"> la différence F – G. On la dérive on doit trouver f – f = 0 donc l’écart est une constante.</text:span></text:p>
      <text:p text:style-name="P16">Exemples : <text:span text:style-name="T8">sin^2(x) est primitive de 2sinx cosx. Mais aussi -cos^2(x) car sin^2(x) = 1 – cos^2(x).</text:span></text:p>
      <text:p text:style-name="P17">Prop <text:span text:style-name="T3">: Soit f continue sur I et x₀ dans I. Pour tout y₀ dans R il existe une unique primitive G de f telle que G(x₀) = y₀.</text:span></text:p>
      <text:p text:style-name="P18">Démo : Toute primitive est de la forme G(x) + k. Soit C = G(x₀) + k. Il suffit alors de choisir k pour que G(x₀) = y₀ </text:p>
      <text:h text:style-name="P19" text:outline-level="2"><text:span text:style-name="T9">B</text:span>) <text:span text:style-name="T9">Tableau de primitives et opérations</text:span></text:h>
      <text:p text:style-name="P20">1) Tableau de primitives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1">Pour tout <draw:frame draw:style-name="fr1" draw:name="Objet15" text:anchor-type="as-char" svg:width="0.9728in" svg:height="0.1909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au1.A1" office:value-type="string">
            <text:p text:style-name="P21">Pour tout <draw:frame draw:style-name="fr1" draw:name="Objet16" text:anchor-type="as-char" svg:width="0.9807in" svg:height="0.1909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au1.C1" office:value-type="string">
            <text:p text:style-name="P21"><draw:frame draw:style-name="fr1" draw:name="Objet17" text:anchor-type="as-char" svg:width="0.3161in" svg:height="0.1846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k (<draw:frame draw:style-name="fr1" draw:name="Objet18" text:anchor-type="as-char" svg:width="0.428in" svg:height="0.1846in" draw:z-index="3"><draw:object xlink:href="./Object 9" xlink:type="simple" xlink:show="embed" xlink:actuate="onLoad"/><draw:image xlink:href="./ObjectReplacements/Object 9" xlink:type="simple" xlink:show="embed" xlink:actuate="onLoad"/><svg:desc>formula</svg:desc></draw:frame>)</text:p>
          </table:table-cell>
          <table:table-cell table:style-name="Tableau1.A2" office:value-type="string">
            <text:p text:style-name="P21"><draw:frame draw:style-name="fr1" draw:name="Objet19" text:anchor-type="as-char" svg:width="0.5047in" svg:height="0.1839in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0" text:anchor-type="as-char" svg:width="0.2071in" svg:height="0.1665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1" text:anchor-type="as-char" svg:width="0.1744in" svg:height="0.1839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2" text:anchor-type="as-char" svg:width="0.5256in" svg:height="0.4173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3" text:anchor-type="as-char" svg:width="0.2071in" svg:height="0.1665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4" text:anchor-type="as-char" svg:width="0.6701in" svg:height="0.2083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5" text:anchor-type="as-char" svg:width="0.6898in" svg:height="0.4165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6" text:anchor-type="as-char" svg:width="0.2071in" svg:height="0.1665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si <draw:frame draw:style-name="fr1" draw:name="Objet45" text:anchor-type="as-char" svg:width="0.3874in" svg:height="0.1846in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21"><draw:frame draw:style-name="fr1" draw:name="Objet46" text:anchor-type="as-char" svg:width="0.2571in" svg:height="0.2063in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si <draw:frame draw:style-name="fr1" draw:name="Objet47" text:anchor-type="as-char" svg:width="0.5102in" svg:height="0.1846in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7" text:anchor-type="as-char" svg:width="0.2071in" svg:height="0.3929in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8" text:anchor-type="as-char" svg:width="0.7102in" svg:height="0.1902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4" text:anchor-type="as-char" svg:width="0.2689in" svg:height="0.2335in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9" text:anchor-type="as-char" svg:width="0.2602in" svg:height="0.4165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30" text:anchor-type="as-char" svg:width="0.5807in" svg:height="0.3929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3" text:anchor-type="as-char" svg:width="0.2571in" svg:height="0.2063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31" text:anchor-type="as-char" svg:width="0.3083in" svg:height="0.4075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39" text:anchor-type="as-char" svg:width="0.6457in" svg:height="0.1984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2" text:anchor-type="as-char" svg:width="0.2689in" svg:height="0.2335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ext:soft-page-break/>
        <table:table-row>
          <table:table-cell table:style-name="Tableau1.A2" office:value-type="string">
            <text:p text:style-name="P21"><draw:frame draw:style-name="fr1" draw:name="Objet40" text:anchor-type="as-char" svg:width="0.5126in" svg:height="0.1902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41" text:anchor-type="as-char" svg:width="0.9272in" svg:height="0.1902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8" text:anchor-type="as-char" svg:width="0.2071in" svg:height="0.1665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49" text:anchor-type="as-char" svg:width="0.5366in" svg:height="0.1902in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50" text:anchor-type="as-char" svg:width="0.7717in" svg:height="0.1902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51" text:anchor-type="as-char" svg:width="0.2071in" svg:height="0.1665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52" text:anchor-type="as-char" svg:width="0.2189in" svg:height="0.2075in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53" text:anchor-type="as-char" svg:width="0.4839in" svg:height="0.2083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54" text:anchor-type="as-char" svg:width="0.2071in" svg:height="0.1665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</table:table>
      <text:p text:style-name="P22"/>
      <text:p text:style-name="P20">2) Opérations</text:p>
      <text:p text:style-name="P23">Propriété : <text:span text:style-name="T9">L’opérateur primitive est linéaire :</text:span></text:p>
      <text:list text:style-name="L1">
        <text:list-item>
          <text:p text:style-name="P24">Soient f et g deux fonctions continues sur un intervalle <draw:frame draw:style-name="fr1" draw:name="Objet12" text:anchor-type="as-char" svg:width="0.4272in" svg:height="0.1846in" draw:z-index="33"><draw:object xlink:href="./Object 3" xlink:type="simple" xlink:show="embed" xlink:actuate="onLoad"/><draw:image xlink:href="./ObjectReplacements/Object 3" xlink:type="simple" xlink:show="embed" xlink:actuate="onLoad"/><svg:desc>formula</svg:desc></draw:frame>admettant respectivement F et G comme primitives. <text:span text:style-name="T9">A</text:span>lors : F + G est une primitive de f + g</text:p>
        </text:list-item>
        <text:list-item>
          <text:p text:style-name="P24">pour tout <draw:frame draw:style-name="fr1" draw:name="Objet13" text:anchor-type="as-char" svg:width="0.7189in" svg:height="0.1846in" draw:z-index="34"><draw:object xlink:href="./Object 4" xlink:type="simple" xlink:show="embed" xlink:actuate="onLoad"/><draw:image xlink:href="./ObjectReplacements/Object 4" xlink:type="simple" xlink:show="embed" xlink:actuate="onLoad"/><svg:desc>formula</svg:desc></draw:frame>est une primitive de <draw:frame draw:style-name="fr1" draw:name="Objet14" text:anchor-type="as-char" svg:width="0.2535in" svg:height="0.1846in" draw:z-index="3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22"/>
      <text:p text:style-name="P22">En inversant certaines règles de dérivation :</text:p>
      <text:p text:style-name="P23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1">Fonction f</text:p>
          </table:table-cell>
          <table:table-cell table:style-name="Tableau2.A1" office:value-type="string">
            <text:p text:style-name="P21">Fonction F</text:p>
          </table:table-cell>
          <table:table-cell table:style-name="Tableau2.C1" office:value-type="string">
            <text:p text:style-name="P21">Conditions sur u</text:p>
          </table:table-cell>
        </table:table-row>
        <table:table-row>
          <table:table-cell table:style-name="Tableau2.A2" office:value-type="string">
            <text:p text:style-name="P21"><draw:frame draw:style-name="fr1" draw:name="Objet57" text:anchor-type="as-char" svg:width="1.2835in" svg:height="0.2083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58" text:anchor-type="as-char" svg:width="0.6898in" svg:height="0.4165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4" text:anchor-type="as-char" svg:width="1.6744in" svg:height="0.1909in" draw:z-index="3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59" text:anchor-type="as-char" svg:width="0.2728in" svg:height="0.3937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0" text:anchor-type="as-char" svg:width="0.7071in" svg:height="0.1902in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5" text:anchor-type="as-char" svg:width="1.1618in" svg:height="0.1909in" draw:z-index="4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1" text:anchor-type="as-char" svg:width="0.272in" svg:height="0.4165in" draw:z-index="4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3" text:anchor-type="as-char" svg:width="0.5807in" svg:height="0.3929in" draw:z-index="4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6" text:anchor-type="as-char" svg:width="1.152in" svg:height="0.1909in" draw:z-index="4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2" text:anchor-type="as-char" svg:width="0.3047in" svg:height="0.4075in" draw:z-index="4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7" text:anchor-type="as-char" svg:width="0.6425in" svg:height="0.1984in" draw:z-index="4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8" text:anchor-type="as-char" svg:width="1.1618in" svg:height="0.1909in" draw:z-index="4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9" text:anchor-type="as-char" svg:width="0.6862in" svg:height="0.1902in" draw:z-index="4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0" text:anchor-type="as-char" svg:width="0.9244in" svg:height="0.1902in" draw:z-index="4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1"><draw:frame draw:style-name="fr1" draw:name="Objet71" text:anchor-type="as-char" svg:width="0.711in" svg:height="0.1902in" draw:z-index="5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2" text:anchor-type="as-char" svg:width="0.7689in" svg:height="0.1902in" draw:z-index="5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1"><draw:frame draw:style-name="fr1" draw:name="Objet73" text:anchor-type="as-char" svg:width="0.3937in" svg:height="0.2075in" draw:z-index="5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4" text:anchor-type="as-char" svg:width="0.4811in" svg:height="0.2075in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</table:table>
      <text:p text:style-name="P23"/>
      <text:p text:style-name="P22"/>
      <text:p text:style-name="P22">Remarque si x est réel non nul on peut étendre <draw:frame draw:style-name="fr2" draw:name="Object3" text:anchor-type="as-char" svg:y="-0.2445in" svg:width="0.1846in" svg:height="0.3953in" draw:z-index="54"><draw:object xlink:href="./Object 57" xlink:type="simple" xlink:show="embed" xlink:actuate="onLoad"/><draw:image xlink:href="./ObjectReplacements/Object 57" xlink:type="simple" xlink:show="embed" xlink:actuate="onLoad"/></draw:frame>~&gt;<draw:frame draw:style-name="fr2" draw:name="Object4" text:anchor-type="as-char" svg:y="-0.1528in" svg:width="0.5402in" svg:height="0.202in" draw:z-index="55"><draw:object xlink:href="./Object 58" xlink:type="simple" xlink:show="embed" xlink:actuate="onLoad"/><draw:image xlink:href="./ObjectReplacements/Object 58" xlink:type="simple" xlink:show="embed" xlink:actuate="onLoad"/></draw:frame></text:p>
      <text:p text:style-name="P25"/>
      <text:h text:style-name="P26" text:outline-level="1"><text:span text:style-name="T10">I</text:span>I/ <text:span text:style-name="T10">Intégrale et aire</text:span></text:h>
      <text:p text:style-name="P27">On considère (O,i,j) orthogonal non nécessairement orthonormal.</text:p>
      <text:h text:style-name="P28" text:outline-level="1">a) Le cas monotone</text:h>
      <text:p text:style-name="P29"><text:span text:style-name="T2">Définition</text:span> : <text:span text:style-name="T11">On considère f continue, positive, </text:span><text:span text:style-name="T12">et croissante </text:span><text:span text:style-name="T11">sur [a,b] et C sa courbe. L’aire sous la courbe C sur [a,b] est l’aire du domaine du plan entre l’axe des abscisses, la courbe C et les droite d’équation <text:s text:c="5"/>x = a et y = b. On note </text:span><text:span text:style-name="T11"><draw:frame draw:style-name="fr2" draw:name="Object5" text:anchor-type="as-char" svg:y="-0.2937in" svg:width="0.6547in" svg:height="0.4752in" draw:z-index="56"><draw:object xlink:href="./Object 59" xlink:type="simple" xlink:show="embed" xlink:actuate="onLoad"/><draw:image xlink:href="./ObjectReplacements/Object 59" xlink:type="simple" xlink:show="embed" xlink:actuate="onLoad"/></draw:frame></text:span><text:span text:style-name="T11"><text:s/>cet aire et on </text:span><text:span text:style-name="T13">lit </text:span><text:span text:style-name="T14">l’intégrale</text:span><text:span text:style-name="T15"> (ou somme) de a à b de f.</text:span></text:p>
      <text:p text:style-name="P30">Remarque L’aire est exprimée en unité d’aire, une unité d’aire étant l’aire d’un rectangle construit à partir des vecteurs unités.</text:p>
      <text:p text:style-name="P27">Exemple :</text:p>
      <text:list xml:id="list753717414" text:style-name="L2">
        <text:list-item>
          <text:list>
            <text:list-item>
              <text:p text:style-name="P31">integrale fonction x sur 0 ,1 = 1/2 car triangle</text:p>
            </text:list-item>
            <text:list-item>
              <text:p text:style-name="P31">fonction sq(1-x²) sur 0, 1. donne pi/4 car l’aire sous la courbe de sq(1-x²) sur 0,1 est un quart de cercle trigo.</text:p>
            </text:list-item>
          </text:list>
        </text:list-item>
      </text:list>
      <text:p text:style-name="P32"><text:span text:style-name="T2">Remarque </text:span><text:span text:style-name="T3">:</text:span></text:p>
      <text:list text:style-name="L3">
        <text:list-item>
          <text:p text:style-name="P33">On <text:span text:style-name="T2">toujours peut se ramener au cas positif</text:span> car f continue sur un compact atteins ses bornes donc son min. On considère g = f + min(f) qui est positive</text:p>
        </text:list-item>
        <text:list-item>
          <text:p text:style-name="P34"><text:span text:style-name="T16">Ça marche aussi pour décroissante. Lien avec TF de l’analyse </text:span><text:span text:style-name="T17">et fonctions continues.</text:span></text:p>
        </text:list-item>
      </text:list>
      <text:p text:style-name="P35"><text:span text:style-name="T18">Preuve</text:span><text:span text:style-name="T19"> </text:span><text:span text:style-name="T20">: On prends les mêmes suites mais pas extraites. </text:span><text:span text:style-name="T20"><draw:frame draw:style-name="fr2" draw:name="Object71" text:anchor-type="as-char" svg:y="-0.2819in" svg:width="1.7673in" svg:height="0.4528in" draw:z-index="12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0"><text:s text:c="2"/>et </text:span><text:span text:style-name="T20"><draw:frame draw:style-name="fr2" draw:name="Object70" text:anchor-type="as-char" svg:y="-0.2819in" svg:width="1.7661in" svg:height="0.4528in" draw:z-index="126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20">, </text:span>Comme f <text:span text:style-name="Strong_20_Emphasis">croissante</text:span>, sur chaque intervalle<draw:frame draw:style-name="fr3" draw:name="Object75" text:anchor-type="as-char" svg:y="-0.2638in" svg:width="1.8591in" svg:height="0.4339in" draw:z-index="131"><draw:object xlink:href="./Object 131" xlink:type="simple" xlink:show="embed" xlink:actuate="onLoad"/><draw:image xlink:href="./ObjectReplacements/Object 131" xlink:type="simple" xlink:show="embed" xlink:actuate="onLoad"/></draw:frame></text:p>
      <text:p text:style-name="P35">on a :</text:p>
      <text:p text:style-name="P36"><draw:frame draw:style-name="fr3" draw:name="Object74" text:anchor-type="as-char" svg:y="-0.2654in" svg:width="2.6827in" svg:height="0.4362in" draw:z-index="130"><draw:object xlink:href="./Object 130" xlink:type="simple" xlink:show="embed" xlink:actuate="onLoad"/><draw:image xlink:href="./ObjectReplacements/Object 130" xlink:type="simple" xlink:show="embed" xlink:actuate="onLoad"/></draw:frame></text:p>
      <text:p text:style-name="P37">En intégrant et en sommant on obtient :</text:p>
      <text:p text:style-name="P38"><draw:frame draw:style-name="fr3" draw:name="Object76" text:anchor-type="as-char" svg:y="-0.2937in" svg:width="1.152in" svg:height="0.4752in" draw:z-index="132"><draw:object xlink:href="./Object 132" xlink:type="simple" xlink:show="embed" xlink:actuate="onLoad"/><draw:image xlink:href="./ObjectReplacements/Object 132" xlink:type="simple" xlink:show="embed" xlink:actuate="onLoad"/></draw:frame></text:p>
      <text:p text:style-name="P39">De plus <draw:frame draw:style-name="fr3" draw:name="Object77" text:anchor-type="as-char" svg:y="-0.1492in" svg:width="0.9181in" svg:height="0.2102in" draw:z-index="133"><draw:object xlink:href="./Object 133" xlink:type="simple" xlink:show="embed" xlink:actuate="onLoad"/><draw:image xlink:href="./ObjectReplacements/Object 133" xlink:type="simple" xlink:show="embed" xlink:actuate="onLoad"/></draw:frame>. Par le théorème des gendarmes elles doivent converger vers la même valeur : <draw:frame draw:style-name="fr2" draw:name="Object72" text:anchor-type="as-char" svg:y="-0.2937in" svg:width="0.6547in" svg:height="0.4752in" draw:z-index="128"><draw:object xlink:href="./Object 128" xlink:type="simple" xlink:show="embed" xlink:actuate="onLoad"/><draw:image xlink:href="./ObjectReplacements/Object 128" xlink:type="simple" xlink:show="embed" xlink:actuate="onLoad"/><svg:desc>formula</svg:desc></draw:frame>.</text:p>
      <text:p text:style-name="P40"/>
      <text:h text:style-name="P41" text:outline-level="2">b) <text:span text:style-name="T12">E</text:span>n général.</text:h>
      <text:p text:style-name="P42"><text:span text:style-name="T2">Définition</text:span> : <text:span text:style-name="T11">On considère f continue </text:span><text:span text:style-name="T12">et positive [</text:span><text:span text:style-name="T11">a,b] et C sa courbe. L’aire sous la courbe C sur [a,b] est l’aire du domaine du plan entre l’axe des abscisses, la courbe C et les droite d’équation <text:s text:c="5"/>x = a et y = b. On note </text:span><text:span text:style-name="T11"><draw:frame draw:style-name="fr2" draw:name="Object78" text:anchor-type="as-char" svg:y="-0.2937in" svg:width="0.6547in" svg:height="0.4752in" draw:z-index="139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1"><text:s/>cet aire et on </text:span><text:span text:style-name="T13">lit </text:span><text:span text:style-name="T14">l’intégrale</text:span><text:span text:style-name="T15"> (ou somme) de a à b de f.</text:span></text:p>
      <text:p text:style-name="P43"><text:span text:style-name="T21">Propriété</text:span><text:span text:style-name="T11"> </text:span><text:span text:style-name="T22">: </text:span><text:span text:style-name="T23">O</text:span><text:span text:style-name="T22">n calcule l’intégrale </text:span><text:span text:style-name="T23">f </text:span><text:span text:style-name="T22">à l’aide </text:span><text:span text:style-name="T23">de</text:span><text:span text:style-name="T22"> </text:span><text:span text:style-name="T22"><draw:frame draw:style-name="fr2" draw:name="Object6" text:anchor-type="as-char" svg:y="-0.2819in" svg:width="1.7673in" svg:height="0.4528in" draw:z-index="13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2"><text:s/>et </text:span><text:span text:style-name="T22"><draw:frame draw:style-name="fr2" draw:name="Object7" text:anchor-type="as-char" svg:y="-0.2819in" svg:width="1.7661in" svg:height="0.4528in" draw:z-index="134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43"><text:span text:style-name="T24">Démo :</text:span><text:span text:style-name="T22"> </text:span><text:span text:style-name="T25">On prends les suites extraites </text:span><text:span text:style-name="T25"><draw:frame draw:style-name="fr3" draw:name="Object79" text:anchor-type="as-char" svg:y="-0.1492in" svg:width="0.1709in" svg:height="0.2252in" draw:z-index="137"><draw:object xlink:href="./Object 135" xlink:type="simple" xlink:show="embed" xlink:actuate="onLoad"/><draw:image xlink:href="./ObjectReplacements/Object 135" xlink:type="simple" xlink:show="embed" xlink:actuate="onLoad"/></draw:frame></text:span><text:span text:style-name="T25"><text:s/>et </text:span><text:span text:style-name="T25"><draw:frame draw:style-name="fr3" draw:name="Object80" text:anchor-type="as-char" svg:y="-0.1492in" svg:width="0.1728in" svg:height="0.2252in" draw:z-index="135"><draw:object xlink:href="./Object 136" xlink:type="simple" xlink:show="embed" xlink:actuate="onLoad"/><draw:image xlink:href="./ObjectReplacements/Object 136" xlink:type="simple" xlink:show="embed" xlink:actuate="onLoad"/></draw:frame></text:span><text:span text:style-name="T25">. A chaque fois on coupe en </text:span><text:span text:style-name="T26">deux.</text:span><text:span text:style-name="T25"> </text:span><text:span text:style-name="T26">Cela</text:span><text:span text:style-name="T23"> qui permet de montrer que les deux suites sont monotones </text:span><text:span text:style-name="T26">car les rectangles inférieurs ne peuvent que grandir et inversement. On a</text:span></text:p>
      <text:p text:style-name="P44"><draw:frame draw:style-name="fr3" draw:name="Object81" text:anchor-type="as-char" svg:y="-0.1492in" svg:width="1.1307in" svg:height="0.2252in" draw:z-index="140"><draw:object xlink:href="./Object 137" xlink:type="simple" xlink:show="embed" xlink:actuate="onLoad"/><draw:image xlink:href="./ObjectReplacements/Object 137" xlink:type="simple" xlink:show="embed" xlink:actuate="onLoad"/></draw:frame><text:s/>car un ≤ vn pour tout n (cf preuve précédente)</text:p>
      <text:p text:style-name="P45">Il faut montre<text:span text:style-name="T27">r</text:span> que l’écart entre <draw:frame draw:style-name="fr3" draw:name="Object83" text:anchor-type="as-char" svg:y="-0.1492in" svg:width="0.1709in" svg:height="0.2252in" draw:z-index="141"><draw:object xlink:href="./Object 139" xlink:type="simple" xlink:show="embed" xlink:actuate="onLoad"/><draw:image xlink:href="./ObjectReplacements/Object 139" xlink:type="simple" xlink:show="embed" xlink:actuate="onLoad"/></draw:frame><text:s/>et <draw:frame draw:style-name="fr3" draw:name="Object82" text:anchor-type="as-char" svg:y="-0.1492in" svg:width="0.1728in" svg:height="0.2252in" draw:z-index="142"><draw:object xlink:href="./Object 138" xlink:type="simple" xlink:show="embed" xlink:actuate="onLoad"/><draw:image xlink:href="./ObjectReplacements/Object 138" xlink:type="simple" xlink:show="embed" xlink:actuate="onLoad"/><svg:desc>formula</svg:desc></draw:frame><text:s/>tends vers 0. Comme f est continue sur un compact <text:span text:style-name="T28">on a alors par le théorème de </text:span><text:span text:style-name="T29">Heine</text:span><text:span text:style-name="T28"> </text:span><text:span text:style-name="T27">(voir plus loin) </text:span><text:span text:style-name="T28">que f est uniformément continue: </text:span><text:span text:style-name="T27">pour tout e &lt; 0, </text:span><text:span text:style-name="T30">a partir d’un certain rang n, on a pour tout x , y</text:span><text:span text:style-name="T27"> </text:span><text:span text:style-name="T30">que</text:span><text:span text:style-name="T27"> |x – y | &lt; </text:span><text:span text:style-name="T27"><draw:frame draw:style-name="fr3" draw:name="Object84" text:anchor-type="as-char" svg:y="-0.2445in" svg:width="0.3543in" svg:height="0.4189in" draw:z-index="145"><draw:object xlink:href="./Object 140" xlink:type="simple" xlink:show="embed" xlink:actuate="onLoad"/><draw:image xlink:href="./ObjectReplacements/Object 140" xlink:type="simple" xlink:show="embed" xlink:actuate="onLoad"/></draw:frame></text:span><text:span text:style-name="T27"><text:s/>=&gt; |f(x) – f(y)| ≤ e. </text:span><text:span text:style-name="T30">Donc :</text:span></text:p>
      <text:p text:style-name="P46"><draw:frame draw:style-name="fr3" draw:name="Object86" text:anchor-type="as-char" svg:y="-0.1492in" svg:width="0.1728in" svg:height="0.2252in" draw:z-index="143"><draw:object xlink:href="./Object 142" xlink:type="simple" xlink:show="embed" xlink:actuate="onLoad"/><draw:image xlink:href="./ObjectReplacements/Object 142" xlink:type="simple" xlink:show="embed" xlink:actuate="onLoad"/><svg:desc>formula</svg:desc></draw:frame><text:s/>- <draw:frame draw:style-name="fr3" draw:name="Object87" text:anchor-type="as-char" svg:y="-0.1492in" svg:width="0.1709in" svg:height="0.2252in" draw:z-index="144"><draw:object xlink:href="./Object 143" xlink:type="simple" xlink:show="embed" xlink:actuate="onLoad"/><draw:image xlink:href="./ObjectReplacements/Object 143" xlink:type="simple" xlink:show="embed" xlink:actuate="onLoad"/><svg:desc>formula</svg:desc></draw:frame><text:s/>≤<text:span text:style-name="T31"> <text:s/></text:span><text:span text:style-name="T31"><draw:frame draw:style-name="fr3" draw:name="Object85" text:anchor-type="as-char" svg:y="-0.2445in" svg:width="0.8575in" svg:height="0.4189in" draw:z-index="146"><draw:object xlink:href="./Object 141" xlink:type="simple" xlink:show="embed" xlink:actuate="onLoad"/><draw:image xlink:href="./ObjectReplacements/Object 141" xlink:type="simple" xlink:show="embed" xlink:actuate="onLoad"/></draw:frame></text:span><text:span text:style-name="T31"><text:s/>= </text:span><text:span text:style-name="T31"><draw:frame draw:style-name="fr3" draw:name="Object88" text:anchor-type="as-char" svg:y="-0.1528in" svg:width="0.9075in" svg:height="0.2016in" draw:z-index="147"><draw:object xlink:href="./Object 144" xlink:type="simple" xlink:show="embed" xlink:actuate="onLoad"/><draw:image xlink:href="./ObjectReplacements/Object 144" xlink:type="simple" xlink:show="embed" xlink:actuate="onLoad"/></draw:frame></text:span><text:span text:style-name="T31"><text:s/></text:span></text:p>
      <text:p text:style-name="P47"><text:span text:style-name="T32">Donc c’est des suites adjacentes elles convergent vers la même limite.</text:span><text:span text:style-name="T33"> <text:s text:c="2"/></text:span><text:span text:style-name="T11">L’aire</text:span><text:span text:style-name="T16"> sou <text:s/>C sur [a,b] égale à la limite commune de 2 suites </text:span><text:span text:style-name="T11">car ce</text:span><text:span text:style-name="T16">s deux suites sont des rectangles </text:span><text:span text:style-name="T17">de largeur </text:span><text:span text:style-name="T17"><draw:frame draw:style-name="fr2" draw:name="Object2" text:anchor-type="as-char" svg:y="-0.2445in" svg:width="0.3543in" svg:height="0.4189in" draw:z-index="13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7"><text:s/></text:span><text:span text:style-name="T16">sous et sur approximant l’aire.</text:span></text:p>
      <text:p text:style-name="P48"><text:span text:style-name="T3"/></text:p>
      <text:p text:style-name="P48"><text:span text:style-name="T13">Prop </text:span><text:span text:style-name="T22">: relation de chasles, soit f continue sur [a, b] et c dans [a, b] ALORS </text:span></text:p>
      <text:p text:style-name="P49"><draw:frame draw:style-name="fr3" draw:name="Object73" text:anchor-type="as-char" svg:y="-0.1236in" svg:width="0.078in" svg:height="0.1339in" draw:z-index="129"><draw:object xlink:href="./Object 129" xlink:type="simple" xlink:show="embed" xlink:actuate="onLoad"/><draw:image xlink:href="./ObjectReplacements/Object 129" xlink:type="simple" xlink:show="embed" xlink:actuate="onLoad"/></draw:frame><draw:frame draw:style-name="fr1" draw:name="Objet80" text:anchor-type="as-char" svg:width="1.1783in" svg:height="0.4717in" draw:z-index="57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9"><draw:frame draw:style-name="fr4" draw:name="Image1" text:anchor-type="char" svg:width="3.3543in" svg:height="2.2917in" draw:z-index="58"><draw:image xlink:href="Pictures/1000000100000142000000DC14CEA348.png" xlink:type="simple" xlink:show="embed" xlink:actuate="onLoad" draw:mime-type="image/png"/></draw:frame></text:p>
      <text:p text:style-name="P27"><text:soft-page-break/>Exemple : <text:span text:style-name="T34">On peut calculer cette aire en calculant l’intégrale de 2 trapèzes :</text:span></text:p>
      <text:p text:style-name="P50"><draw:frame draw:style-name="fr5" draw:name="Image2" text:anchor-type="as-char" svg:width="4.3335in" svg:height="2.25in" draw:z-index="59"><draw:image xlink:href="Pictures/10000001000001A0000000D8FDCF8F84.png" xlink:type="simple" xlink:show="embed" xlink:actuate="onLoad" draw:mime-type="image/png"/></draw:frame></text:p>
      <text:p text:style-name="P51">Def : <text:span text:style-name="T3">Valeur moyenne : Soit f continue et positive sur [a, b]. On appelle valeur moyenne :</text:span></text:p>
      <text:p text:style-name="P50"><draw:frame draw:style-name="fr1" draw:name="Objet84" text:anchor-type="as-char" svg:width="1.0654in" svg:height="0.4717in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52">R<text:span text:style-name="T34">emarque : elle corresponds à la constante g telle que l’aire sous la courbe de g soit la même que f sur a b :</text:span></text:p>
      <text:p text:style-name="P50"><draw:frame draw:style-name="fr5" draw:name="Image3" text:anchor-type="as-char" svg:width="2.1043in" svg:height="2.2811in" draw:z-index="61"><draw:image xlink:href="Pictures/10000001000000CA000000DB8C954E36.png" xlink:type="simple" xlink:show="embed" xlink:actuate="onLoad" draw:mime-type="image/png"/></draw:frame></text:p>
      <text:p text:style-name="P53"><text:span text:style-name="T2">Définition</text:span> : Si une fonction f est négative et continue sur [a, b] alors on définit son aire sous la courbe <draw:frame draw:style-name="fr2" draw:name="Object1" text:anchor-type="as-char" svg:y="-0.2937in" svg:width="0.6547in" svg:height="0.4752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text:s/>comme l’opposé de l’aire au dessus de la courbe : entre C l’axe des abscisses y=a et y= b.</text:p>
      <text:p text:style-name="P53"><text:span text:style-name="T2">Prop</text:span> : Soit f continue et négative sur ab, alors on a :</text:p>
      <text:p text:style-name="P54"><draw:frame draw:style-name="fr2" draw:name="Object8" text:anchor-type="as-char" svg:y="-0.2937in" svg:width="1.6925in" svg:height="0.4752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55"/>
      <text:p text:style-name="P51">Def : <text:span text:style-name="T3">Valeur moyenne : Soit f continue et négative sur [a, b]. On appelle valeur moyenne :</text:span></text:p>
      <text:p text:style-name="P56"><draw:frame draw:style-name="fr2" draw:name="Object9" text:anchor-type="as-char" svg:y="-0.2937in" svg:width="1.0957in" svg:height="0.4752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53">Exemple : aire sous -x² sur [0,1]</text:p>
      <text:p text:style-name="P57"><text:soft-page-break/>Propriété <text:span text:style-name="T3">: Soit f et g deux fonctions continues sur l’intervalle [a, b] telles que f &gt; g. L’aire entre les deux courbes entre a et b est :</text:span></text:p>
      <text:p text:style-name="P58"><draw:frame draw:style-name="fr2" draw:name="Object10" text:anchor-type="as-char" svg:y="-0.2937in" svg:width="0.6547in" svg:height="0.4752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text:s/>- <draw:frame draw:style-name="fr2" draw:name="Object11" text:anchor-type="as-char" svg:y="-0.2937in" svg:width="0.6689in" svg:height="0.4752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59">Démo : Il faut découper l’intervalle selon que f et g ont le même signe ou de signe contraire.</text:p>
      <text:p text:style-name="P59">Ou on peut translater.</text:p>
      <text:p text:style-name="P59"/>
      <text:h text:style-name="P60" text:outline-level="1" text:is-list-header="true"><text:span text:style-name="T10">I</text:span>I/ <text:span text:style-name="T10">Intégrale et primitives</text:span></text:h>
      <text:h text:style-name="Heading_20_2" text:outline-level="2">a) Approche simple</text:h>
      <text:p text:style-name="P61">Propriété <text:span text:style-name="T3">: si f est continue positive sur [a, b] alors l’aire sous la courbe C entre a et b notée </text:span><text:span text:style-name="T3"><draw:frame draw:style-name="fr2" draw:name="Object12" text:anchor-type="as-char" svg:y="-0.2937in" svg:width="0.6547in" svg:height="0.4752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"><text:s/>est égale en unité d’aire à F(b) – F(a) où F est une primitive de f.</text:span></text:p>
      <text:p text:style-name="P59">Démo : On se restreint au cas croissant sur [a,b]. Pour a ≤ x ≤ b on note A(x) l’aire sous C de a à x, alors on a pour tout h posititif :</text:p>
      <text:p text:style-name="P62">h f(x) ≤ A(x+h) – A(x) ≤ h f(x+h) (on encadre des rectangles).</text:p>
      <text:p text:style-name="P59">Donc f(x) ≤ <draw:frame draw:style-name="fr2" draw:name="Object13" text:anchor-type="as-char" svg:y="-0.2602in" svg:width="1.089in" svg:height="0.411in" draw:z-index="68"><draw:object xlink:href="./Object 69" xlink:type="simple" xlink:show="embed" xlink:actuate="onLoad"/><draw:image xlink:href="./ObjectReplacements/Object 69" xlink:type="simple" xlink:show="embed" xlink:actuate="onLoad"/></draw:frame><text:s/>≤ f(x+h)</text:p>
      <text:p text:style-name="P59">Si h négatif on obtient <text:s/>f(x+h) ≤ <draw:frame draw:style-name="fr2" draw:name="Object14" text:anchor-type="as-char" svg:y="-0.2602in" svg:width="1.089in" svg:height="0.411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text:s/>≤ f(x)</text:p>
      <text:p text:style-name="P59">Donc par le théorème des gendarmes <draw:frame draw:style-name="fr2" draw:name="Object15" text:anchor-type="as-char" svg:y="-0.2602in" svg:width="1.8118in" svg:height="0.411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.</text:p>
      <text:p text:style-name="P59">Donc A est dérivable et de dérivée f. C’est une primitive de f. De plus A(a) = 0. Soit F une primitive quelconque de f on peut donc écrire A(x) = F(x) – F(a). On a bien</text:p>
      <text:p text:style-name="P62"><draw:frame draw:style-name="fr2" draw:name="Object16" text:anchor-type="as-char" svg:y="-0.2937in" svg:width="1.5953in" svg:height="0.4752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63">Remarque : On vient de montrer le TFA dans le cas croissant. Le cas général où f est continue. On observe qu’au voisinage de tout point on peut borner l’aire par des valeurs de f arbitrairement proches.</text:p>
      <text:p text:style-name="P63"/>
      <text:p text:style-name="P63">Remarque : On note <draw:frame draw:style-name="fr2" draw:name="Object17" text:anchor-type="as-char" svg:y="-0.2937in" svg:width="2.2228in" svg:height="0.4752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list text:continue-list="list753717414" text:style-name="L2">
        <text:list-item>
          <text:list>
            <text:list-header>
              <text:p text:style-name="P64"/>
            </text:list-header>
          </text:list>
        </text:list-item>
      </text:list>
      <text:p text:style-name="P65">Remarque on a les égalités <draw:frame draw:style-name="fr2" draw:name="Object18" text:anchor-type="as-char" svg:y="-0.2937in" svg:width="0.6547in" svg:height="0.4752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text:s/>= <draw:frame draw:style-name="fr2" draw:name="Object19" text:anchor-type="as-char" svg:y="-0.2937in" svg:width="0.778in" svg:height="0.4752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text:s/>= <draw:frame draw:style-name="fr2" draw:name="Object20" text:anchor-type="as-char" svg:y="-0.2937in" svg:width="0.7965in" svg:height="0.4752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h text:style-name="Heading_20_2" text:outline-level="2"><text:soft-page-break/><text:span text:style-name="T35">b</text:span>) <text:span text:style-name="T35">Le cas non monotone.</text:span></text:h>
      <text:p text:style-name="P66"><text:span text:style-name="T2">Def</text:span> on appelle fonction en escalier, une fonction qui prends des valeurs constantes sur une subdivision finie de a b : a = s0 &lt; s2 .. &lt; sn = b.</text:p>
      <text:p text:style-name="P67">Def <text:span text:style-name="T3">: On définit l’intégrale d’une fonction en escalier sur <text:s/>« a = s0 &lt; s2 .. &lt; sn = b. » alors</text:span></text:p>
      <text:p text:style-name="P66"><draw:frame draw:style-name="fr2" draw:name="Object34" text:anchor-type="as-char" svg:y="-0.2819in" svg:width="1.8618in" svg:height="0.452in" draw:z-index="81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36">avec </text:span><text:span text:style-name="T36"><draw:frame draw:style-name="fr2" draw:name="Object35" text:anchor-type="as-char" svg:y="-0.1492in" svg:width="0.75in" svg:height="0.2102in" draw:z-index="84"><draw:object xlink:href="./Object 91" xlink:type="simple" xlink:show="embed" xlink:actuate="onLoad"/><draw:image xlink:href="./ObjectReplacements/Object 91" xlink:type="simple" xlink:show="embed" xlink:actuate="onLoad"/></draw:frame></text:span><text:span text:style-name="T36"><text:s/>ie f(euk) est la valeur constante de f sur le segment.</text:span></text:p>
      <text:p text:style-name="P68">Prop <text:span text:style-name="T3">: On suppose les résultats suivants qui se démontrent sans trop d’efforts :</text:span></text:p>
      <text:list text:style-name="L4">
        <text:list-item>
          <text:p text:style-name="P69">Une subdivision plus fine (avec des pas en plus) est adaptée a f : elle reste en <text:s/>escalier dessus</text:p>
        </text:list-item>
        <text:list-item>
          <text:p text:style-name="P69">Donc on peut trouver une subdivision adaptée a 2 fonctions f et g on la prends a la fois plus fine celle de f et de g</text:p>
        </text:list-item>
        <text:list-item>
          <text:p text:style-name="P69">Ca permet de montrer que si a et f en escalier, alors af + bg est en escalier (espace vectoriel)</text:p>
        </text:list-item>
        <text:list-item>
          <text:p text:style-name="P69">L’intégrale définie au dessus ne dépends pas des subdivisions (adaptées choisies)</text:p>
          <text:list>
            <text:list-item>
              <text:p text:style-name="P69">on montre en ajoutant un pt. Puis quand supp(s) c supp(s’) : s’ plus fine. On fait une récurrence sur le nombre de points en plus</text:p>
            </text:list-item>
            <text:list-item>
              <text:p text:style-name="P69">On prends 2 subdivisions adaptées mais pas forcément comparables. Alors leur union est adaptée et est plus fine donc on conclut par le cas précédent.</text:p>
            </text:list-item>
          </text:list>
        </text:list-item>
        <text:list-item>
          <text:p text:style-name="P69">On a <draw:frame draw:style-name="fr2" draw:name="Object36" text:anchor-type="as-char" svg:y="-0.1835in" svg:width="0.7429in" svg:height="0.2543in" draw:z-index="89"><draw:object xlink:href="./Object 92" xlink:type="simple" xlink:show="embed" xlink:actuate="onLoad"/><draw:image xlink:href="./ObjectReplacements/Object 92" xlink:type="simple" xlink:show="embed" xlink:actuate="onLoad"/></draw:frame>. par inegalité triangulaire.</text:p>
        </text:list-item>
        <text:list-item>
          <text:p text:style-name="P69">On a <draw:frame draw:style-name="fr2" draw:name="Object37" text:anchor-type="as-char" svg:y="-0.1827in" svg:width="0.6673in" svg:height="0.2528in" draw:z-index="90"><draw:object xlink:href="./Object 93" xlink:type="simple" xlink:show="embed" xlink:actuate="onLoad"/><draw:image xlink:href="./ObjectReplacements/Object 93" xlink:type="simple" xlink:show="embed" xlink:actuate="onLoad"/></draw:frame><text:s/>= <draw:frame draw:style-name="fr2" draw:name="Object38" text:anchor-type="as-char" svg:y="-0.1827in" svg:width="0.3346in" svg:height="0.2528in" draw:z-index="92"><draw:object xlink:href="./Object 94" xlink:type="simple" xlink:show="embed" xlink:actuate="onLoad"/><draw:image xlink:href="./ObjectReplacements/Object 94" xlink:type="simple" xlink:show="embed" xlink:actuate="onLoad"/></draw:frame><text:s/>+ <draw:frame draw:style-name="fr2" draw:name="Object39" text:anchor-type="as-char" svg:y="-0.1827in" svg:width="0.3492in" svg:height="0.2528in" draw:z-index="93"><draw:object xlink:href="./Object 95" xlink:type="simple" xlink:show="embed" xlink:actuate="onLoad"/><draw:image xlink:href="./ObjectReplacements/Object 95" xlink:type="simple" xlink:show="embed" xlink:actuate="onLoad"/></draw:frame><text:s/>(on commentce par prendre une subdivision commune qui est ok par le résultat 3.</text:p>
          <text:list>
            <text:list-item>
              <text:p text:style-name="P70">corrolaire si f et g diffèrent d’un nombre fini de points f-g est en escalier nulle sauf sur un nb fini de points ainsi son intégrale est nulle. Donc int f = int g</text:p>
            </text:list-item>
          </text:list>
        </text:list-item>
        <text:list-item>
          <text:p text:style-name="P69">On a chasles en séparant la somme en 2 trivial.</text:p>
        </text:list-item>
        <text:list-item>
          <text:p text:style-name="P70">Si f ≥ 0 alors int f aussi.</text:p>
        </text:list-item>
        <text:list-item>
          <text:p text:style-name="P70">Si f ≥ g alors int g aussi.</text:p>
        </text:list-item>
      </text:list>
      <text:p text:style-name="P71">On passe maintenant aux fonctions continues (et continues par morceaux qui se déduit directement).</text:p>
      <text:p text:style-name="P72">Prop <text:span text:style-name="T3">: Toute fonction continue sur [a b] est bornée et atteins ses bornes.</text:span></text:p>
      <text:p text:style-name="P71">Preuve :Soit M = sup de f([a,b]) au sens large donc potentiellement infini. <text:span text:style-name="T37">Montrons qu’elle est atteinte et donc finie.</text:span></text:p>
      <text:p text:style-name="P71"><text:span text:style-name="T37">P</text:span>ar caractérisation séquentielle du sup il existe suite xn <text:span text:style-name="T37">delements de a,b, </text:span>telle que f(xn) → M. <text:span text:style-name="T37">Par bolzano weierstrass x_n est bornée (dans un compact) donc il existe une sous suite convergente y_n.</text:span></text:p>
      <text:p text:style-name="P73">Notons y_n → d, avec d dans [a,b]. Par continuité de f on a f(y_n) → f(d). Donc M = f(d) par unicité de la limite. Donc M est atteint et est dans [a,b].</text:p>
      <text:p text:style-name="P73"/>
      <text:p text:style-name="P74">Prop <text:span text:style-name="T3">: Les fonctions continues sont un EV : af + bg est aussi continue.</text:span></text:p>
      <text:p text:style-name="P74"><text:soft-page-break/>Prop <text:span text:style-name="T3">: Soit f continue sur a b, pour tout e &gt; 0 il existe </text:span><text:span text:style-name="T3"><draw:frame draw:style-name="fr2" draw:name="Object40" text:anchor-type="as-char" svg:y="-0.1492in" svg:width="0.0965in" svg:height="0.1854in" draw:z-index="95"><draw:object xlink:href="./Object 96" xlink:type="simple" xlink:show="embed" xlink:actuate="onLoad"/><draw:image xlink:href="./ObjectReplacements/Object 96" xlink:type="simple" xlink:show="embed" xlink:actuate="onLoad"/></draw:frame></text:span><text:span text:style-name="T3"><text:s/>en escalier telle que :</text:span></text:p>
      <text:p text:style-name="P75">sup (| f - <draw:frame draw:style-name="fr2" draw:name="Object41" text:anchor-type="as-char" svg:y="-0.1492in" svg:width="0.0965in" svg:height="0.1854in" draw:z-index="96"><draw:object xlink:href="./Object 97" xlink:type="simple" xlink:show="embed" xlink:actuate="onLoad"/><draw:image xlink:href="./ObjectReplacements/Object 97" xlink:type="simple" xlink:show="embed" xlink:actuate="onLoad"/></draw:frame><text:s/>|) &lt; e</text:p>
      <text:p text:style-name="P76">Démo : Approximation uniforme : Par le théorème de heine f est uniformément continue (se déduit du fait que f est bornée et atteind ses bornes). Donc <text:span text:style-name="T38">pour</text:span> tout e &gt; 0 <text:span text:style-name="T38">il existe </text:span><text:s/><draw:frame draw:style-name="fr2" draw:name="Object42" text:anchor-type="as-char" svg:y="-0.1492in" svg:width="0.2925in" svg:height="0.1854in" draw:z-index="98"><draw:object xlink:href="./Object 98" xlink:type="simple" xlink:show="embed" xlink:actuate="onLoad"/><draw:image xlink:href="./ObjectReplacements/Object 98" xlink:type="simple" xlink:show="embed" xlink:actuate="onLoad"/></draw:frame><text:s/>tel, on a</text:p>
      <text:p text:style-name="P76"><text:span text:style-name="T38">pour tout x, y, on a </text:span>|x-y| &lt; <text:s/><draw:frame draw:style-name="fr2" draw:name="Object43" text:anchor-type="as-char" svg:y="-0.1492in" svg:width="0.0882in" svg:height="0.1854in" draw:z-index="99"><draw:object xlink:href="./Object 99" xlink:type="simple" xlink:show="embed" xlink:actuate="onLoad"/><draw:image xlink:href="./ObjectReplacements/Object 99" xlink:type="simple" xlink:show="embed" xlink:actuate="onLoad"/><svg:desc>formula</svg:desc></draw:frame><text:s/>=&gt; |f(x)-f(y)| &lt; <text:span text:style-name="T38">e.</text:span></text:p>
      <text:p text:style-name="P77">On fixe alors <draw:frame draw:style-name="fr2" draw:name="Object44" text:anchor-type="as-char" svg:y="-0.1492in" svg:width="0.0882in" svg:height="0.1854in" draw:z-index="100"><draw:object xlink:href="./Object 100" xlink:type="simple" xlink:show="embed" xlink:actuate="onLoad"/><draw:image xlink:href="./ObjectReplacements/Object 100" xlink:type="simple" xlink:show="embed" xlink:actuate="onLoad"/><svg:desc>formula</svg:desc></draw:frame><text:s/>et n tel que 0 ≤ (b-a) / n &lt; <draw:frame draw:style-name="fr2" draw:name="Object45" text:anchor-type="as-char" svg:y="-0.1492in" svg:width="0.0882in" svg:height="0.1854in" draw:z-index="101"><draw:object xlink:href="./Object 101" xlink:type="simple" xlink:show="embed" xlink:actuate="onLoad"/><draw:image xlink:href="./ObjectReplacements/Object 101" xlink:type="simple" xlink:show="embed" xlink:actuate="onLoad"/></draw:frame>. Alors on peut définir une fonction en escalier (somme de rieman de pas constant (b-a) / n ), tq <draw:frame draw:style-name="fr2" draw:name="Object46" text:anchor-type="as-char" svg:y="-0.1492in" svg:width="0.0965in" svg:height="0.1854in" draw:z-index="102"><draw:object xlink:href="./Object 102" xlink:type="simple" xlink:show="embed" xlink:actuate="onLoad"/><draw:image xlink:href="./ObjectReplacements/Object 102" xlink:type="simple" xlink:show="embed" xlink:actuate="onLoad"/></draw:frame>(x) = <draw:frame draw:style-name="fr2" draw:name="Object47" text:anchor-type="as-char" svg:y="-0.1528in" svg:width="0.3665in" svg:height="0.2138in" draw:z-index="103"><draw:object xlink:href="./Object 103" xlink:type="simple" xlink:show="embed" xlink:actuate="onLoad"/><draw:image xlink:href="./ObjectReplacements/Object 103" xlink:type="simple" xlink:show="embed" xlink:actuate="onLoad"/></draw:frame><text:s/>quand x dans [s_k s_{k+1}[ et <draw:frame draw:style-name="fr2" draw:name="Object48" text:anchor-type="as-char" svg:y="-0.1528in" svg:width="0.3264in" svg:height="0.2016in" draw:z-index="104"><draw:object xlink:href="./Object 104" xlink:type="simple" xlink:show="embed" xlink:actuate="onLoad"/><draw:image xlink:href="./ObjectReplacements/Object 104" xlink:type="simple" xlink:show="embed" xlink:actuate="onLoad"/></draw:frame><text:s/>= b.</text:p>
      <text:p text:style-name="P77">On a bien f(b) – phi(b) = 0. Pour les autres valeurs x dans [a,b[ on prends la subdivision tq x dans s_k, s_{k+1}. Donc |x- s_k| plus petit que le bas (b-a) /n donc plus petit que <draw:frame draw:style-name="fr2" draw:name="Object49" text:anchor-type="as-char" svg:y="-0.1492in" svg:width="0.0882in" svg:height="0.1854in" draw:z-index="105"><draw:object xlink:href="./Object 105" xlink:type="simple" xlink:show="embed" xlink:actuate="onLoad"/><draw:image xlink:href="./ObjectReplacements/Object 105" xlink:type="simple" xlink:show="embed" xlink:actuate="onLoad"/></draw:frame>.</text:p>
      <text:p text:style-name="P77">Par conséquent |f(x) – phi(x)| = |f(x) – f(s_k)| &lt; e. OK.</text:p>
      <text:p text:style-name="P78">Théorème <text:span text:style-name="T3">: Pour f continue sur a b , il existe suite (</text:span><text:span text:style-name="T3"><draw:frame draw:style-name="fr2" draw:name="Object50" text:anchor-type="as-char" svg:y="-0.1492in" svg:width="0.15in" svg:height="0.2102in" draw:z-index="106"><draw:object xlink:href="./Object 106" xlink:type="simple" xlink:show="embed" xlink:actuate="onLoad"/><draw:image xlink:href="./ObjectReplacements/Object 106" xlink:type="simple" xlink:show="embed" xlink:actuate="onLoad"/></draw:frame></text:span><text:span text:style-name="T3">) telle que :</text:span></text:p>
      <text:p text:style-name="P79">sup |f – phi_n| → 0</text:p>
      <text:list text:style-name="L5">
        <text:list-item>
          <text:p text:style-name="P80">La suite <text:span text:style-name="T39">(</text:span><draw:frame draw:style-name="fr2" draw:name="Object51" text:anchor-type="as-char" svg:y="-0.1827in" svg:width="0.3102in" svg:height="0.2528in" draw:z-index="107"><draw:object xlink:href="./Object 107" xlink:type="simple" xlink:show="embed" xlink:actuate="onLoad"/><draw:image xlink:href="./ObjectReplacements/Object 107" xlink:type="simple" xlink:show="embed" xlink:actuate="onLoad"/></draw:frame><text:span text:style-name="T39">)</text:span> converge.</text:p>
        </text:list-item>
        <text:list-item>
          <text:p text:style-name="P80">La limite ne dépends pas du choix de <draw:frame draw:style-name="fr2" draw:name="Object52" text:anchor-type="as-char" svg:y="-0.1492in" svg:width="0.15in" svg:height="0.2102in" draw:z-index="108"><draw:object xlink:href="./Object 108" xlink:type="simple" xlink:show="embed" xlink:actuate="onLoad"/><draw:image xlink:href="./ObjectReplacements/Object 108" xlink:type="simple" xlink:show="embed" xlink:actuate="onLoad"/></draw:frame>.</text:p>
        </text:list-item>
      </text:list>
      <text:p text:style-name="P81">Définition <text:span text:style-name="T3">: on appelle intégrale de f sur a b, notée </text:span><text:span text:style-name="T3"><draw:frame draw:style-name="fr2" draw:name="Object53" text:anchor-type="as-char" svg:y="-0.2937in" svg:width="0.6547in" svg:height="0.4752in" draw:z-index="109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3"><text:s/>cette limite.</text:span></text:p>
      <text:p text:style-name="P82">Démo : l’existence est simplement le résultat précédent ou e = <draw:frame draw:style-name="fr2" draw:name="Object54" text:anchor-type="as-char" svg:y="-0.1492in" svg:width="0.4437in" svg:height="0.1854in" draw:z-index="110"><draw:object xlink:href="./Object 110" xlink:type="simple" xlink:show="embed" xlink:actuate="onLoad"/><draw:image xlink:href="./ObjectReplacements/Object 110" xlink:type="simple" xlink:show="embed" xlink:actuate="onLoad"/></draw:frame>.</text:p>
      <text:list text:style-name="L6">
        <text:list-item>
          <text:p text:style-name="P83">Soit a_n = | sup f – phi_n |. </text:p>
          <text:list>
            <text:list-item>
              <text:p text:style-name="P83">La suite <draw:frame draw:style-name="fr2" draw:name="Object55" text:anchor-type="as-char" svg:y="-0.1827in" svg:width="0.3102in" svg:height="0.2528in" draw:z-index="111"><draw:object xlink:href="./Object 111" xlink:type="simple" xlink:show="embed" xlink:actuate="onLoad"/><draw:image xlink:href="./ObjectReplacements/Object 111" xlink:type="simple" xlink:show="embed" xlink:actuate="onLoad"/><svg:desc>formula</svg:desc></draw:frame><text:s/>est bornée : en effet |f| bornée par M. donc |phi_n| ≤ M + a_n donc :</text:p>
              <text:p text:style-name="P84"><draw:frame draw:style-name="fr2" draw:name="Object56" text:anchor-type="as-char" svg:y="-0.2937in" svg:width="3.0008in" svg:height="0.4756in" draw:z-index="112"><draw:object xlink:href="./Object 112" xlink:type="simple" xlink:show="embed" xlink:actuate="onLoad"/><draw:image xlink:href="./ObjectReplacements/Object 112" xlink:type="simple" xlink:show="embed" xlink:actuate="onLoad"/></draw:frame></text:p>
              <text:p text:style-name="P83">Donc la suite converge et est donc bornée.</text:p>
            </text:list-item>
            <text:list-item>
              <text:p text:style-name="P85">Alors par Bolzano il existe extraction <draw:frame draw:style-name="fr2" draw:name="Object58" text:anchor-type="as-char" svg:y="-0.1827in" svg:width="0.4445in" svg:height="0.2535in" draw:z-index="113"><draw:object xlink:href="./Object 114" xlink:type="simple" xlink:show="embed" xlink:actuate="onLoad"/><draw:image xlink:href="./ObjectReplacements/Object 114" xlink:type="simple" xlink:show="embed" xlink:actuate="onLoad"/><svg:desc>formula</svg:desc></draw:frame><text:s/>qui converge vers une limite L.</text:p>
              <text:p text:style-name="P84"><text:s/>|int phi_n – int <text:span text:style-name="T40">phi</text:span>_<text:span text:style-name="T40">g</text:span>n| &lt; int | phi_n – <text:span text:style-name="T40">phi</text:span>_<text:span text:style-name="T40">g</text:span>n | ≤ (b-a) x <text:span text:style-name="T40">( a_{n} + a _{g(n)}</text:span></text:p>
              <text:p text:style-name="P86">Mais a_n → 0 donc a_{g(n)} aussi donc :</text:p>
              <text:p text:style-name="P87"><draw:frame draw:style-name="fr2" draw:name="Object57" text:anchor-type="as-char" svg:y="-0.1827in" svg:width="0.3102in" svg:height="0.2528in" draw:z-index="114"><draw:object xlink:href="./Object 113" xlink:type="simple" xlink:show="embed" xlink:actuate="onLoad"/><draw:image xlink:href="./ObjectReplacements/Object 113" xlink:type="simple" xlink:show="embed" xlink:actuate="onLoad"/><svg:desc>formula</svg:desc></draw:frame><text:s/>= L.</text:p>
              <text:p text:style-name="P86">On a donc la convergence.</text:p>
            </text:list-item>
          </text:list>
        </text:list-item>
        <text:list-item>
          <text:p text:style-name="P86">On prends une autre suite <draw:frame draw:style-name="fr2" draw:name="Object59" text:anchor-type="as-char" svg:y="-0.1492in" svg:width="0.1689in" svg:height="0.2102in" draw:z-index="115"><draw:object xlink:href="./Object 115" xlink:type="simple" xlink:show="embed" xlink:actuate="onLoad"/><draw:image xlink:href="./ObjectReplacements/Object 115" xlink:type="simple" xlink:show="embed" xlink:actuate="onLoad"/></draw:frame><text:s/>on définit b_n <text:span text:style-name="T39">= | sup f – p</text:span>si_<text:span text:style-name="T39">n |. <text:s/></text:span>Et on montre <draw:frame draw:style-name="fr2" draw:name="Object60" text:anchor-type="as-char" svg:y="-0.1827in" svg:width="0.3102in" svg:height="0.2528in" draw:z-index="116"><draw:object xlink:href="./Object 116" xlink:type="simple" xlink:show="embed" xlink:actuate="onLoad"/><draw:image xlink:href="./ObjectReplacements/Object 116" xlink:type="simple" xlink:show="embed" xlink:actuate="onLoad"/><svg:desc>formula</svg:desc></draw:frame>- <draw:frame draw:style-name="fr2" draw:name="Object61" text:anchor-type="as-char" svg:y="-0.1827in" svg:width="0.3291in" svg:height="0.2528in" draw:z-index="117"><draw:object xlink:href="./Object 117" xlink:type="simple" xlink:show="embed" xlink:actuate="onLoad"/><draw:image xlink:href="./ObjectReplacements/Object 117" xlink:type="simple" xlink:show="embed" xlink:actuate="onLoad"/><svg:desc>formula</svg:desc></draw:frame><text:s/>→ 0 donc les suites ont la même limite. En effet on peut majorée par (b-a)(a_n + b_n) → 0</text:p>
        </text:list-item>
      </text:list>
      <text:p text:style-name="P88">Prop <text:span text:style-name="T3"><text:s/>on a la linéarité </text:span><text:span text:style-name="T41"><text:s/></text:span><text:span text:style-name="T41"><draw:frame draw:style-name="fr2" draw:name="Object62" text:anchor-type="as-char" svg:y="-0.1827in" svg:width="0.6673in" svg:height="0.2528in" draw:z-index="118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41"><text:s/>= </text:span><text:span text:style-name="T41"><draw:frame draw:style-name="fr2" draw:name="Object63" text:anchor-type="as-char" svg:y="-0.1827in" svg:width="0.3346in" svg:height="0.2528in" draw:z-index="119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41"><text:s/>+ </text:span><text:span text:style-name="T41"><draw:frame draw:style-name="fr2" draw:name="Object64" text:anchor-type="as-char" svg:y="-0.1827in" svg:width="0.3492in" svg:height="0.2528in" draw:z-index="120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p>
      <text:p text:style-name="P89"><text:soft-page-break/>Démo : On prends e = 1/(n+1) et introduit p_n et s_n tq ||f – p_n|| &lt; e et || g – s_n || &lt; e. <text:span text:style-name="T42">Par la prop d’approximation uniforme.</text:span></text:p>
      <text:p text:style-name="P90">Alors a ||(p_n + b s_n) – (a f + b g) || &lt; (a + b) / n+1 → 0. Donc même limite pour</text:p>
      <text:p text:style-name="P90"><draw:frame draw:style-name="fr2" draw:name="Object65" text:anchor-type="as-char" svg:y="-0.1827in" svg:width="1.8126in" svg:height="0.2528in" draw:z-index="121"><draw:object xlink:href="./Object 121" xlink:type="simple" xlink:show="embed" xlink:actuate="onLoad"/><draw:image xlink:href="./ObjectReplacements/Object 121" xlink:type="simple" xlink:show="embed" xlink:actuate="onLoad"/></draw:frame><text:s/>comme ap_n +b_sn est en escalier on a la linéarité :</text:p>
      <text:p text:style-name="P90">= <draw:frame draw:style-name="fr2" draw:name="Object66" text:anchor-type="as-char" svg:y="-0.1827in" svg:width="1.1799in" svg:height="0.2528in" draw:z-index="122"><draw:object xlink:href="./Object 122" xlink:type="simple" xlink:show="embed" xlink:actuate="onLoad"/><draw:image xlink:href="./ObjectReplacements/Object 122" xlink:type="simple" xlink:show="embed" xlink:actuate="onLoad"/></draw:frame><text:s/>= <draw:frame draw:style-name="fr2" draw:name="Object67" text:anchor-type="as-char" svg:y="-0.1827in" svg:width="1.448in" svg:height="0.2528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text:s/>= <draw:frame draw:style-name="fr2" draw:name="Object68" text:anchor-type="as-char" svg:y="-0.1827in" svg:width="1.3362in" svg:height="0.2528in" draw:z-index="124"><draw:object xlink:href="./Object 124" xlink:type="simple" xlink:show="embed" xlink:actuate="onLoad"/><draw:image xlink:href="./ObjectReplacements/Object 124" xlink:type="simple" xlink:show="embed" xlink:actuate="onLoad"/><svg:desc>formula</svg:desc></draw:frame><text:s/>par le</text:p>
      <text:p text:style-name="P90">théorème / def précédent. </text:p>
      <text:p text:style-name="P91">Prop <text:span text:style-name="T3">: De la même manière on montre les résultats suivants :</text:span></text:p>
      <text:list text:style-name="L7">
        <text:list-item>
          <text:p text:style-name="P92">On a <draw:frame draw:style-name="fr2" draw:name="Object69" text:anchor-type="as-char" svg:y="-0.1835in" svg:width="0.7429in" svg:height="0.2543in" draw:z-index="125"><draw:object xlink:href="./Object 125" xlink:type="simple" xlink:show="embed" xlink:actuate="onLoad"/><draw:image xlink:href="./ObjectReplacements/Object 125" xlink:type="simple" xlink:show="embed" xlink:actuate="onLoad"/><svg:desc>formula</svg:desc></draw:frame>.</text:p>
        </text:list-item>
        <text:list-item>
          <text:p text:style-name="P92">On a chasles en séparant la somme en 2 trivial.</text:p>
        </text:list-item>
        <text:list-item>
          <text:p text:style-name="P93">Si f ≥ 0 alors int f aussi. <text:span text:style-name="T42">(si f est positive alors f = |f| + point précédent)</text:span></text:p>
        </text:list-item>
        <text:list-item>
          <text:p text:style-name="P93">Si f ≥ g alors int g aussi.</text:p>
        </text:list-item>
        <text:list-item>
          <text:p text:style-name="P94"><text:span text:style-name="T43">Si f est posititive alors <text:tab/>[</text:span>int f = 0 <text:span text:style-name="T43">=&gt;</text:span> f = 0<text:span text:style-name="T43">]</text:span></text:p>
          <text:list>
            <text:list-item>
              <text:p text:style-name="P94"><text:span text:style-name="T43">Contraposée : e</text:span>n effet si f pas 0, <text:span text:style-name="T43">il existe x tq f &gt; 0</text:span> il existe par continuité petit intervalle ou <text:span text:style-name="T43">f ≥ c &gt; 0</text:span> <text:span text:style-name="T43">alors on a une fonction en escalier d’intégrale non nulle (au moins c fois la longueur du petit intervalle).</text:span></text:p>
            </text:list-item>
          </text:list>
        </text:list-item>
      </text:list>
      <text:p text:style-name="P65"><text:span text:style-name="T44">E</text:span>xemple :</text:p>
      <text:list text:style-name="L8">
        <text:list-item>
          <text:p text:style-name="P95">calcul intégrale entre -1 et 2 de (x² +1).</text:p>
        </text:list-item>
        <text:list-item>
          <text:p text:style-name="P95">calcul intégrale entre 0 et 1 de x⁴</text:p>
        </text:list-item>
        <text:list-item>
          <text:p text:style-name="P95">idem entre 1 et 2 pour ln(x) on trouve ln(2)</text:p>
        </text:list-item>
      </text:list>
      <text:p text:style-name="P96">Définition <text:span text:style-name="T3">: Soit f continue sur I <text:s/>et a dans I. Pour tout x dans I </text:span><text:span text:style-name="T3"><draw:frame draw:style-name="fr2" draw:name="Object21" text:anchor-type="as-char" svg:y="-0.2937in" svg:width="0.6547in" svg:height="0.4752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"><text:s/>est l’unique primitive de f s’annulant en a. Pour tout autre primitive F de f sur I, on a :</text:span></text:p>
      <text:p text:style-name="P97"><draw:frame draw:style-name="fr2" draw:name="Object22" text:anchor-type="as-char" svg:y="-0.2937in" svg:width="0.6547in" svg:height="0.4752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= F(x) - F(a)</text:p>
      <text:p text:style-name="P65">Exemples : </text:p>
      <text:list text:style-name="L9">
        <text:list-item>
          <text:p text:style-name="P98">int a x de 1 donne x – a</text:p>
        </text:list-item>
        <text:list-item>
          <text:p text:style-name="P98">int 0 a x de -t²</text:p>
        </text:list-item>
        <text:list-item>
          <text:p text:style-name="P98">int 1 a x 1/t = ln x</text:p>
        </text:list-item>
        <text:list-item>
          <text:p text:style-name="P98">int 0 x e^t = e^x -1</text:p>
        </text:list-item>
      </text:list>
      <text:h text:style-name="P99" text:outline-level="1" text:is-list-header="true"/>
      <text:h text:style-name="P100" text:outline-level="1"><text:span text:style-name="T45">I</text:span><text:span text:style-name="T10">I</text:span>I/ <text:span text:style-name="T45">Propriétés algébriques</text:span></text:h>
      <text:p text:style-name="P96">Prop (chasles) : <text:span text:style-name="T3">si f continue sur I et a,b,c dans I on a</text:span></text:p>
      <text:p text:style-name="P101"><draw:frame draw:style-name="fr1" draw:name="Object23" text:anchor-type="as-char" svg:width="1.1783in" svg:height="0.4717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02">Prop <text:span text:style-name="T3">: Linéarité de l’intégrale : </text:span><text:span text:style-name="T3"><draw:frame draw:style-name="fr2" draw:name="Object24" text:anchor-type="as-char" svg:y="-0.2937in" svg:width="3.2453in" svg:height="0.4752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p>
      <text:p text:style-name="P103"/>
      <text:p text:style-name="P104">Exemple avec une fonction affine.</text:p>
      <text:p text:style-name="P102">Prop <text:span text:style-name="T3">:</text:span></text:p>
      <text:list text:style-name="L10">
        <text:list-item>
          <text:p text:style-name="P105">Si f est paire, continue sur I centré en 0, pour tout a dans I on a :<draw:frame draw:style-name="fr2" draw:name="Object26" text:anchor-type="as-char" svg:y="-0.2937in" svg:width="0.6638in" svg:height="0.4752in" draw:z-index="91"><draw:object xlink:href="./Object 82" xlink:type="simple" xlink:show="embed" xlink:actuate="onLoad"/><draw:image xlink:href="./ObjectReplacements/Object 82" xlink:type="simple" xlink:show="embed" xlink:actuate="onLoad"/><svg:desc>formula</svg:desc></draw:frame> = <draw:frame draw:style-name="fr2" draw:name="Object25" text:anchor-type="as-char" svg:y="-0.2937in" svg:width="0.7425in" svg:height="0.4752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</text:list-item>
        <text:list-item>
          <text:p text:style-name="P105">Si f impaire , continue sur I centré en 0, <draw:frame draw:style-name="fr2" draw:name="Object27" text:anchor-type="as-char" svg:y="-0.2937in" svg:width="0.6638in" svg:height="0.4752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text:s/>= 0</text:p>
        </text:list-item>
      </text:list>
      <text:p text:style-name="P102">Prop <text:span text:style-name="T3">: Si f est continue sur R et T-périodique alors pour tout a dans R on a :</text:span></text:p>
      <text:p text:style-name="P106"><draw:frame draw:style-name="fr2" draw:name="Object29" text:anchor-type="as-char" svg:y="-0.2937in" svg:width="0.7189in" svg:height="0.4752in" draw:z-index="94"><draw:object xlink:href="./Object 85" xlink:type="simple" xlink:show="embed" xlink:actuate="onLoad"/><draw:image xlink:href="./ObjectReplacements/Object 85" xlink:type="simple" xlink:show="embed" xlink:actuate="onLoad"/><svg:desc>formula</svg:desc></draw:frame><text:s/>= <draw:frame draw:style-name="fr2" draw:name="Object28" text:anchor-type="as-char" svg:y="-0.2937in" svg:width="0.6547in" svg:height="0.4752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6"/>
      <text:p text:style-name="P106"/>
      <text:p text:style-name="P107">On peut utiliser la règle de dérivation d’un produit pour obtenir la notion d’intégration par parties.</text:p>
      <text:p text:style-name="P108"><draw:frame draw:style-name="fr6" draw:name="Image4" text:anchor-type="as-char" svg:width="6.6929in" svg:height="3.3827in" draw:z-index="97"><draw:image xlink:href="Pictures/100000010000028300000145A092FDC4.png" xlink:type="simple" xlink:show="embed" xlink:actuate="onLoad" draw:mime-type="image/png"/></draw:frame></text:p>
      <text:p text:style-name="P103"/>
      <text:h text:style-name="P109" text:outline-level="1" text:is-list-header="true"><text:soft-page-break/><text:span text:style-name="T45">I</text:span><text:span text:style-name="T10">I</text:span>I/ <text:span text:style-name="T46">Intégrales et inégalités</text:span></text:h>
      <text:p text:style-name="P102">Prop <text:span text:style-name="T3">: Si f est continue positive sur a,b son intégrale aussi.</text:span></text:p>
      <text:p text:style-name="P110">Remarque la réciproque n’est pas vraie.</text:p>
      <text:p text:style-name="P102">Prop <text:span text:style-name="T3">: Si f ≤ g sur a b alors c’est le cas pour leurs intégrales sur a b.</text:span></text:p>
      <text:p text:style-name="P110">Remarque on applique juste le résultat précédent a g – f .</text:p>
      <text:p text:style-name="P102">Prop <text:span text:style-name="T3">: Soit f continue sur I :</text:span></text:p>
      <text:list text:style-name="L11">
        <text:list-item>
          <text:p text:style-name="P111">si m minorant et M majorant de f sur a b on a m(a -b) ≤ <draw:frame draw:style-name="fr2" draw:name="Object30" text:anchor-type="as-char" svg:y="-0.2937in" svg:width="0.6547in" svg:height="0.4752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text:s/>≤ M(a, b)</text:p>
        </text:list-item>
        <text:list-item>
          <text:p text:style-name="P111">si M majore |f(x)| sur a, b alors on a 0 ≤ <draw:frame draw:style-name="fr2" draw:name="Object31" text:anchor-type="as-char" svg:y="-0.2937in" svg:width="0.7335in" svg:height="0.4756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text:s/>≤ M(a, b).</text:p>
        </text:list-item>
      </text:list>
      <text:p text:style-name="P112">Démo : conséquences de la positivité de l’intégrale (prop précédente)</text:p>
      <text:p text:style-name="P112">Exemple : sur [1, 2] on a <draw:frame draw:style-name="fr2" draw:name="Object32" text:anchor-type="as-char" svg:y="-0.2445in" svg:width="0.5854in" svg:height="0.3953in" draw:z-index="87"><draw:object xlink:href="./Object 88" xlink:type="simple" xlink:show="embed" xlink:actuate="onLoad"/><draw:image xlink:href="./ObjectReplacements/Object 88" xlink:type="simple" xlink:show="embed" xlink:actuate="onLoad"/></draw:frame><text:s/>donc :</text:p>
      <text:p text:style-name="P113"><draw:frame draw:style-name="fr2" draw:name="Object33" text:anchor-type="as-char" svg:y="-0.2937in" svg:width="0.9173in" svg:height="0.4752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114">Donc 1/2 ≤ ln(2) ≤ 1.</text:p>
      <text:p text:style-name="P114"><text:span text:style-name="T47">Définition </text:span><text:span text:style-name="T48">:on étend le concept de valeur moyenne pour des aires sous la courbes à l’intégrale définie à laide de primitives.</text:span></text:p>
      <text:p text:style-name="P115">Exemple :</text:p>
      <text:list text:style-name="L12">
        <text:list-item>
          <text:p text:style-name="P116">Calcul avec fonction sinus entre 0 et pi et entre -pi <text:span text:style-name="T49">et pi = 0</text:span></text:p>
        </text:list-item>
        <text:list-item>
          <text:p text:style-name="P116"><text:s/><text:span text:style-name="T49">Calculer</text:span> la fonction x^2-11 entre -3/2 et 3/2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7d74455cffae7a589951233f185ae0303c082020</meta:generator>
    <dc:date>2026-05-28T18:29:55.983337658</dc:date>
    <meta:editing-duration>P3DT6H38M26S</meta:editing-duration>
    <meta:editing-cycles>560</meta:editing-cycles>
    <meta:document-statistic meta:table-count="2" meta:image-count="4" meta:object-count="144" meta:page-count="12" meta:paragraph-count="234" meta:word-count="2600" meta:character-count="12342" meta:non-whitespace-character-count="9861"/>
  </office:meta>
</office:document-meta>
</file>

<file path=Object 1/content.xml><?xml version="1.0" encoding="utf-8"?>
<math xmlns="http://www.w3.org/1998/Math/MathML">
  <semantics>
    <mrow>
      <mrow>
        <mrow>
          <munderover>
            <mo stretchy="false">∫</mo>
            <mi>a</mi>
            <mi>b</mi>
          </munderover>
          <mi>f</mi>
        </mrow>
        <mo stretchy="false">=</mo>
        <mrow>
          <mrow>
            <munderover>
              <mo stretchy="false">∫</mo>
              <mi>a</mi>
              <mi>c</mi>
            </munderover>
            <mi>f</mi>
          </mrow>
          <mo stretchy="false">+</mo>
          <mrow>
            <munderover>
              <mo stretchy="false">∫</mo>
              <mi>c</mi>
              <mi>b</mi>
            </munderover>
            <mi>f</mi>
          </mrow>
        </mrow>
      </mrow>
    </mrow>
    <annotation encoding="StarMath 5.0">int csub a csup b f = int csub a csup c f + int csub c csup b f</annotation>
  </semantics>
</math>
</file>

<file path=Object 10/content.xml><?xml version="1.0" encoding="utf-8"?>
<math xmlns="http://www.w3.org/1998/Math/MathML">
  <semantics>
    <mrow>
      <mrow>
        <mi mathvariant="italic">kx</mi>
        <mo stretchy="false">+</mo>
        <mi>C</mi>
      </mrow>
    </mrow>
    <annotation encoding="StarMath 5.0">kx+C</annotation>
  </semantics>
</math>
</file>

<file path=Object 100/content.xml><?xml version="1.0" encoding="utf-8"?>
<math xmlns="http://www.w3.org/1998/Math/MathML" display="block">
  <semantics>
    <mi>η</mi>
    <annotation encoding="StarMath 5.0">%eta</annotation>
  </semantics>
</math>
</file>

<file path=Object 101/content.xml><?xml version="1.0" encoding="utf-8"?>
<math xmlns="http://www.w3.org/1998/Math/MathML" display="block">
  <semantics>
    <mi>η</mi>
    <annotation encoding="StarMath 5.0">%eta</annotation>
  </semantics>
</math>
</file>

<file path=Object 102/content.xml><?xml version="1.0" encoding="utf-8"?>
<math xmlns="http://www.w3.org/1998/Math/MathML" display="block">
  <semantics>
    <mi>ϕ</mi>
    <annotation encoding="StarMath 5.0">%phi</annotation>
  </semantics>
</math>
</file>

<file path=Object 103/content.xml><?xml version="1.0" encoding="utf-8"?>
<math xmlns="http://www.w3.org/1998/Math/MathML" display="block">
  <semantics>
    <mrow>
      <mi>ϕ</mi>
      <mrow>
        <mo fence="true" form="prefix" stretchy="false">(</mo>
        <mrow>
          <msub>
            <mi>s</mi>
            <mi>k</mi>
          </msub>
        </mrow>
        <mo fence="true" form="postfix" stretchy="false">)</mo>
      </mrow>
    </mrow>
    <annotation encoding="StarMath 5.0">%phi(s_k)</annotation>
  </semantics>
</math>
</file>

<file path=Object 104/content.xml><?xml version="1.0" encoding="utf-8"?>
<math xmlns="http://www.w3.org/1998/Math/MathML" display="block">
  <semantics>
    <mrow>
      <mi>ϕ</mi>
      <mrow>
        <mo fence="true" form="prefix" stretchy="false">(</mo>
        <mrow>
          <mi>b</mi>
        </mrow>
        <mo fence="true" form="postfix" stretchy="false">)</mo>
      </mrow>
    </mrow>
    <annotation encoding="StarMath 5.0">%phi(b)</annotation>
  </semantics>
</math>
</file>

<file path=Object 105/content.xml><?xml version="1.0" encoding="utf-8"?>
<math xmlns="http://www.w3.org/1998/Math/MathML" display="block">
  <semantics>
    <mi>η</mi>
    <annotation encoding="StarMath 5.0">%eta</annotation>
  </semantics>
</math>
</file>

<file path=Object 106/content.xml><?xml version="1.0" encoding="utf-8"?>
<math xmlns="http://www.w3.org/1998/Math/MathML" display="block">
  <semantics>
    <msub>
      <mi>ϕ</mi>
      <mi>n</mi>
    </msub>
    <annotation encoding="StarMath 5.0">%phi_n</annotation>
  </semantics>
</math>
</file>

<file path=Object 107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08/content.xml><?xml version="1.0" encoding="utf-8"?>
<math xmlns="http://www.w3.org/1998/Math/MathML" display="block">
  <semantics>
    <msub>
      <mi>ϕ</mi>
      <mi>n</mi>
    </msub>
    <annotation encoding="StarMath 5.0">%phi_n</annotation>
  </semantics>
</math>
</file>

<file path=Object 10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 dx</annotation>
  </semantics>
</math>
</file>

<file path=Object 11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10/content.xml><?xml version="1.0" encoding="utf-8"?>
<math xmlns="http://www.w3.org/1998/Math/MathML" display="block">
  <semantics>
    <mrow>
      <mn>1</mn>
      <mo stretchy="false">/</mo>
      <mrow>
        <mi>n</mi>
        <mo stretchy="false">+</mo>
        <mn>1</mn>
      </mrow>
    </mrow>
    <annotation encoding="StarMath 5.0">1/{n+1}</annotation>
  </semantics>
</math>
</file>

<file path=Object 111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12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underover>
                <mo stretchy="false">∫</mo>
                <mi>a</mi>
                <mi>b</mi>
              </munderover>
              <msub>
                <mi>ϕ</mi>
                <mi>n</mi>
              </msub>
            </mrow>
          </mrow>
          <mo fence="true" form="postfix" stretchy="true">|</mo>
        </mrow>
        <mo stretchy="false">&lt;</mo>
        <mrow>
          <munderover>
            <mo stretchy="false">∫</mo>
            <mi>a</mi>
            <mi>b</mi>
          </munderover>
          <mrow>
            <mo fence="true" form="prefix" stretchy="true">|</mo>
            <mrow>
              <msub>
                <mi>ϕ</mi>
                <mi>n</mi>
              </msub>
            </mrow>
            <mo fence="true" form="postfix" stretchy="true">|</mo>
          </mrow>
        </mrow>
        <mo stretchy="false">≤</mo>
        <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i>M</mi>
                <mo stretchy="false">+</mo>
                <msub>
                  <mi>a</mi>
                  <mi>n</mi>
                </msub>
              </mrow>
            </mrow>
            <mo fence="true" form="postfix" stretchy="false">)</mo>
          </mrow>
        </mrow>
      </mrow>
      <mo stretchy="false">→</mo>
      <mrow>
        <mrow>
          <mo fence="true" form="prefix" stretchy="false">(</mo>
          <mrow>
            <mrow>
              <mi>b</mi>
              <mo stretchy="false">−</mo>
              <mi>a</mi>
            </mrow>
          </mrow>
          <mo fence="true" form="postfix" stretchy="false">)</mo>
        </mrow>
        <mo stretchy="false">×</mo>
        <mi>M</mi>
      </mrow>
    </mrow>
    <annotation encoding="StarMath 5.0">abs int from a to b %phi_n &lt; int from a to b abs %phi_n &lt;= (b-a) times (M + a_n) -&gt; (b-a)times M</annotation>
  </semantics>
</math>
</file>

<file path=Object 113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14/content.xml><?xml version="1.0" encoding="utf-8"?>
<math xmlns="http://www.w3.org/1998/Math/MathML" display="block">
  <semantics>
    <mrow>
      <mo stretchy="false">∫</mo>
      <msub>
        <mi>ϕ</mi>
        <mrow>
          <mi>γ</mi>
          <mrow>
            <mo fence="true" form="prefix" stretchy="false">(</mo>
            <mrow>
              <mi>n</mi>
            </mrow>
            <mo fence="true" form="postfix" stretchy="false">)</mo>
          </mrow>
        </mrow>
      </msub>
    </mrow>
    <annotation encoding="StarMath 5.0">int %phi_{%gamma (n)}</annotation>
  </semantics>
</math>
</file>

<file path=Object 115/content.xml><?xml version="1.0" encoding="utf-8"?>
<math xmlns="http://www.w3.org/1998/Math/MathML" display="block">
  <semantics>
    <msub>
      <mi>ψ</mi>
      <mi>n</mi>
    </msub>
    <annotation encoding="StarMath 5.0">%psi_n</annotation>
  </semantics>
</math>
</file>

<file path=Object 116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17/content.xml><?xml version="1.0" encoding="utf-8"?>
<math xmlns="http://www.w3.org/1998/Math/MathML" display="block">
  <semantics>
    <mrow>
      <mo stretchy="false">∫</mo>
      <msub>
        <mi>ψ</mi>
        <mi>n</mi>
      </msub>
    </mrow>
    <annotation encoding="StarMath 5.0">int %psi_n</annotation>
  </semantics>
</math>
</file>

<file path=Object 118/content.xml><?xml version="1.0" encoding="utf-8"?>
<math xmlns="http://www.w3.org/1998/Math/MathML" display="block">
  <semantics>
    <mrow>
      <mrow>
        <mo stretchy="false">∫</mo>
        <mi>a</mi>
      </mrow>
      <mrow>
        <mi>f</mi>
        <mo stretchy="false">+</mo>
        <mi>b</mi>
      </mrow>
      <mi>g</mi>
    </mrow>
    <annotation encoding="StarMath 5.0">int a f + b g</annotation>
  </semantics>
</math>
</file>

<file path=Object 119/content.xml><?xml version="1.0" encoding="utf-8"?>
<math xmlns="http://www.w3.org/1998/Math/MathML" display="block">
  <semantics>
    <mrow>
      <mi>a</mi>
      <mrow>
        <mo stretchy="false">∫</mo>
        <mi>f</mi>
      </mrow>
    </mrow>
    <annotation encoding="StarMath 5.0">a int f</annotation>
  </semantics>
</math>
</file>

<file path=Object 12/content.xml><?xml version="1.0" encoding="utf-8"?>
<math xmlns="http://www.w3.org/1998/Math/MathML">
  <semantics>
    <mrow>
      <mi>x</mi>
    </mrow>
    <annotation encoding="StarMath 5.0">x</annotation>
  </semantics>
</math>
</file>

<file path=Object 120/content.xml><?xml version="1.0" encoding="utf-8"?>
<math xmlns="http://www.w3.org/1998/Math/MathML" display="block">
  <semantics>
    <mrow>
      <mi>b</mi>
      <mrow>
        <mo stretchy="false">∫</mo>
        <mi>g</mi>
      </mrow>
    </mrow>
    <annotation encoding="StarMath 5.0">b int g</annotation>
  </semantics>
</math>
</file>

<file path=Object 121/content.xml><?xml version="1.0" encoding="utf-8"?>
<math xmlns="http://www.w3.org/1998/Math/MathML" display="block">
  <semantics>
    <mrow>
      <mrow>
        <mo stretchy="false">∫</mo>
        <mi>a</mi>
      </mrow>
      <mrow>
        <mrow>
          <mi>f</mi>
          <mo stretchy="false">+</mo>
          <mi mathvariant="italic">bg</mi>
        </mrow>
        <mo stretchy="false">=</mo>
        <mrow>
          <mi>lim</mi>
          <mrow>
            <mo stretchy="false">∫</mo>
            <mi>a</mi>
          </mrow>
        </mrow>
      </mrow>
      <mrow>
        <msub>
          <mi>p</mi>
          <mi>n</mi>
        </msub>
        <mo stretchy="false">+</mo>
        <mi>b</mi>
      </mrow>
      <msub>
        <mi>s</mi>
        <mi>n</mi>
      </msub>
    </mrow>
    <annotation encoding="StarMath 5.0">int a f + bg = lim int a p_n + b s_n</annotation>
  </semantics>
</math>
</file>

<file path=Object 122/content.xml><?xml version="1.0" encoding="utf-8"?>
<math xmlns="http://www.w3.org/1998/Math/MathML" display="block">
  <semantics>
    <mrow>
      <mrow>
        <mi>lim</mi>
        <mi>a</mi>
      </mrow>
      <mrow>
        <mrow>
          <mo stretchy="false">∫</mo>
          <msub>
            <mi>p</mi>
            <mi>n</mi>
          </msub>
        </mrow>
        <mo stretchy="false">+</mo>
        <mi>b</mi>
      </mrow>
      <mrow>
        <mo stretchy="false">∫</mo>
        <msub>
          <mi>s</mi>
          <mi>n</mi>
        </msub>
      </mrow>
    </mrow>
    <annotation encoding="StarMath 5.0">lim a int p_n + b int s_n</annotation>
  </semantics>
</math>
</file>

<file path=Object 123/content.xml><?xml version="1.0" encoding="utf-8"?>
<math xmlns="http://www.w3.org/1998/Math/MathML" display="block">
  <semantics>
    <mrow>
      <mi>a</mi>
      <mrow>
        <mrow>
          <mi>lim</mi>
          <mrow>
            <mo stretchy="false">∫</mo>
            <msub>
              <mi>p</mi>
              <mi>n</mi>
            </msub>
          </mrow>
        </mrow>
        <mo stretchy="false">+</mo>
        <mi>b</mi>
      </mrow>
      <mrow>
        <mi>lim</mi>
        <mrow>
          <mo stretchy="false">∫</mo>
          <msub>
            <mi>s</mi>
            <mi>n</mi>
          </msub>
        </mrow>
      </mrow>
    </mrow>
    <annotation encoding="StarMath 5.0"> a lim int p_n + b lim int s_n</annotation>
  </semantics>
</math>
</file>

<file path=Object 124/content.xml><?xml version="1.0" encoding="utf-8"?>
<math xmlns="http://www.w3.org/1998/Math/MathML" display="block">
  <semantics>
    <mrow>
      <mi>a</mi>
      <mrow>
        <mrow>
          <mi>lim</mi>
          <mrow>
            <mo stretchy="false">∫</mo>
            <mi>f</mi>
          </mrow>
        </mrow>
        <mo stretchy="false">+</mo>
        <mi>b</mi>
      </mrow>
      <mrow>
        <mi>lim</mi>
        <mrow>
          <mo stretchy="false">∫</mo>
          <mi>g</mi>
        </mrow>
      </mrow>
    </mrow>
    <annotation encoding="StarMath 5.0"> a lim int f + b lim int g</annotation>
  </semantics>
</math>
</file>

<file path=Object 125/content.xml><?xml version="1.0" encoding="utf-8"?>
<math xmlns="http://www.w3.org/1998/Math/MathML" display="block">
  <semantics>
    <mrow>
      <mrow>
        <mo fence="true" form="prefix" stretchy="true">|</mo>
        <mrow>
          <mrow>
            <mo stretchy="false">∫</mo>
            <mi>f</mi>
          </mrow>
        </mrow>
        <mo fence="true" form="postfix" stretchy="true">|</mo>
      </mrow>
      <mo stretchy="false">≤</mo>
      <mrow>
        <mo stretchy="false">∫</mo>
        <mrow>
          <mo fence="true" form="prefix" stretchy="true">|</mo>
          <mrow>
            <mi>f</mi>
          </mrow>
          <mo fence="true" form="postfix" stretchy="true">|</mo>
        </mrow>
      </mrow>
    </mrow>
    <annotation encoding="StarMath 5.0">abs {int f} &lt;= int abs f</annotation>
  </semantics>
</math>
</file>

<file path=Object 126/content.xml><?xml version="1.0" encoding="utf-8"?>
<math xmlns="http://www.w3.org/1998/Math/MathML" display="block">
  <semantics>
    <mrow>
      <mrow>
        <msub>
          <mi>v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i>f</mi>
      </mrow>
      <mrow>
        <mo fence="true" form="prefix" stretchy="true">(</mo>
        <mrow>
          <mrow>
            <mrow>
              <mi>a</mi>
              <mo stretchy="false">+</mo>
              <mi>k</mi>
            </mrow>
            <mfrac>
              <mrow>
                <mi>b</mi>
                <mo stretchy="false">−</mo>
                <mi>a</mi>
              </mrow>
              <mi>n</mi>
            </mfrac>
          </mrow>
        </mrow>
        <mo fence="true" form="postfix" stretchy="true">)</mo>
      </mrow>
    </mrow>
    <annotation encoding="StarMath 5.0">v_n = {b-a} over {n} sum from k=1 to n f left ( a + k {b - a} over n right )</annotation>
  </semantics>
</math>
</file>

<file path=Object 127/content.xml><?xml version="1.0" encoding="utf-8"?>
<math xmlns="http://www.w3.org/1998/Math/MathML" display="block">
  <semantics>
    <mrow>
      <mrow>
        <msub>
          <mi>u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f</mi>
      </mrow>
      <mrow>
        <mo fence="true" form="prefix" stretchy="true">(</mo>
        <mrow>
          <mrow>
            <mrow>
              <mi>a</mi>
              <mo stretchy="false">+</mo>
              <mi>k</mi>
            </mrow>
            <mfrac>
              <mrow>
                <mi>b</mi>
                <mo stretchy="false">−</mo>
                <mi>a</mi>
              </mrow>
              <mi>n</mi>
            </mfrac>
          </mrow>
        </mrow>
        <mo fence="true" form="postfix" stretchy="true">)</mo>
      </mrow>
    </mrow>
    <annotation encoding="StarMath 5.0">u_n = {b-a} over {n} sum from k=0 to {n-1} f left ( a + k {b - a} over n right )</annotation>
  </semantics>
</math>
</file>

<file path=Object 12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129/content.xml><?xml version="1.0" encoding="utf-8"?>
<math xmlns="http://www.w3.org/1998/Math/MathML" display="block">
  <semantics>
    <mrow/>
    <annotation encoding="StarMath 5.0">( a + k {b - a} over n</annotation>
  </semantics>
</math>
</file>

<file path=Object 13/content.xml><?xml version="1.0" encoding="utf-8"?>
<math xmlns="http://www.w3.org/1998/Math/MathML">
  <semantics>
    <mrow>
      <mrow>
        <mfrac>
          <msup>
            <mi>x</mi>
            <mn>2</mn>
          </msup>
          <mn>2</mn>
        </mfrac>
        <mo stretchy="false">+</mo>
        <mi>C</mi>
      </mrow>
    </mrow>
    <annotation encoding="StarMath 5.0">x^2 over 2 +C</annotation>
  </semantics>
</math>
</file>

<file path=Object 130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row>
                <mi>a</mi>
                <mo stretchy="false">+</mo>
                <mi>k</mi>
              </mrow>
              <mfrac>
                <mrow>
                  <mi>b</mi>
                  <mo stretchy="false">−</mo>
                  <mi>a</mi>
                </mrow>
                <mi>n</mi>
              </mfrac>
            </mrow>
          </mrow>
          <mo fence="true" form="postfix" stretchy="true">)</mo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true">(</mo>
        <mrow>
          <mrow>
            <mrow>
              <mi>a</mi>
              <mo stretchy="false">+</mo>
              <mrow>
                <mo fence="true" form="prefix" stretchy="false">(</mo>
                <mrow>
                  <mrow>
                    <mi>k</mi>
                    <mo stretchy="false">+</mo>
                    <mn>1</mn>
                  </mrow>
                </mrow>
                <mo fence="true" form="postfix" stretchy="false">)</mo>
              </mrow>
            </mrow>
            <mfrac>
              <mrow>
                <mi>b</mi>
                <mo stretchy="false">−</mo>
                <mi>a</mi>
              </mrow>
              <mi>n</mi>
            </mfrac>
          </mrow>
        </mrow>
        <mo fence="true" form="postfix" stretchy="true">)</mo>
      </mrow>
    </mrow>
    <annotation encoding="StarMath 5.0">f left( a + k {b - a} over n right) &lt;= f(x) = f left( a + (k+1) {b - a} over n right)</annotation>
  </semantics>
</math>
</file>

<file path=Object 131/content.xml><?xml version="1.0" encoding="utf-8"?>
<math xmlns="http://www.w3.org/1998/Math/MathML" display="block">
  <semantics>
    <mrow>
      <mo fence="true" form="prefix" stretchy="true">[</mo>
      <mrow>
        <mrow>
          <mrow>
            <mi>a</mi>
            <mo stretchy="false">+</mo>
            <mi>k</mi>
          </mrow>
          <mfrac>
            <mrow>
              <mi>b</mi>
              <mo stretchy="false">−</mo>
              <mi>a</mi>
            </mrow>
            <mi>n</mi>
          </mfrac>
          <mi>;</mi>
          <mrow>
            <mi>a</mi>
            <mo stretchy="false">+</mo>
            <mrow>
              <mo fence="true" form="prefix" stretchy="false">(</mo>
              <mrow>
                <mrow>
                  <mi>k</mi>
                  <mo stretchy="false">+</mo>
                  <mn>1</mn>
                </mrow>
              </mrow>
              <mo fence="true" form="postfix" stretchy="false">)</mo>
            </mrow>
          </mrow>
          <mfrac>
            <mrow>
              <mi>b</mi>
              <mo stretchy="false">−</mo>
              <mi>a</mi>
            </mrow>
            <mi>n</mi>
          </mfrac>
        </mrow>
      </mrow>
      <mo fence="true" form="postfix" stretchy="true">]</mo>
    </mrow>
    <annotation encoding="StarMath 5.0"> left [ a + k {b - a} over n;  a + (k +1 )  {b - a} over n right  ]</annotation>
  </semantics>
</math>
</file>

<file path=Object 132/content.xml><?xml version="1.0" encoding="utf-8"?>
<math xmlns="http://www.w3.org/1998/Math/MathML" display="block">
  <semantics>
    <mrow>
      <mrow>
        <msub>
          <mi>u</mi>
          <mi>n</mi>
        </msub>
        <mo stretchy="false">≤</mo>
        <mrow>
          <munderover>
            <mo stretchy="false">∫</mo>
            <mi>a</mi>
            <mi>b</mi>
          </munderover>
          <mi>f</mi>
        </mrow>
      </mrow>
      <mrow>
        <mo fence="true" form="prefix" stretchy="false">(</mo>
        <mrow>
          <mi>t</mi>
        </mrow>
        <mo fence="true" form="postfix" stretchy="false">)</mo>
      </mrow>
      <mrow>
        <mi mathvariant="italic">dt</mi>
        <mo stretchy="false">≤</mo>
        <msub>
          <mi>v</mi>
          <mi>n</mi>
        </msub>
      </mrow>
    </mrow>
    <annotation encoding="StarMath 5.0">u_n &lt;= int from a to b f(t)dt &lt;= v_n</annotation>
  </semantics>
</math>
</file>

<file path=Object 133/content.xml><?xml version="1.0" encoding="utf-8"?>
<math xmlns="http://www.w3.org/1998/Math/MathML" display="block">
  <semantics>
    <mrow>
      <mrow>
        <mi>lim</mi>
        <msub>
          <mi>v</mi>
          <mi>n</mi>
        </msub>
      </mrow>
      <mi>–</mi>
      <mrow>
        <msub>
          <mi>u</mi>
          <mi>n</mi>
        </msub>
        <mo stretchy="false">=</mo>
        <mn>0</mn>
      </mrow>
    </mrow>
    <annotation encoding="StarMath 5.0">lim v_n – u_n = 0</annotation>
  </semantics>
</math>
</file>

<file path=Object 13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135/content.xml><?xml version="1.0" encoding="utf-8"?>
<math xmlns="http://www.w3.org/1998/Math/MathML" display="block">
  <semantics>
    <msub>
      <mi>u</mi>
      <msup>
        <mn>2</mn>
        <mi>n</mi>
      </msup>
    </msub>
    <annotation encoding="StarMath 5.0">u_{2^n}</annotation>
  </semantics>
</math>
</file>

<file path=Object 136/content.xml><?xml version="1.0" encoding="utf-8"?>
<math xmlns="http://www.w3.org/1998/Math/MathML" display="block">
  <semantics>
    <msub>
      <mi>v</mi>
      <msup>
        <mn>2</mn>
        <mi>n</mi>
      </msup>
    </msub>
    <annotation encoding="StarMath 5.0"> v_{2^n}</annotation>
  </semantics>
</math>
</file>

<file path=Object 137/content.xml><?xml version="1.0" encoding="utf-8"?>
<math xmlns="http://www.w3.org/1998/Math/MathML" display="block">
  <semantics>
    <mrow>
      <mrow>
        <msub>
          <mi>u</mi>
          <msup>
            <mn>2</mn>
            <mi>n</mi>
          </msup>
        </msub>
        <mo stretchy="false">≤</mo>
        <msub>
          <mi>u</mi>
          <msup>
            <mn>2</mn>
            <mrow>
              <mi>n</mi>
              <mo stretchy="false">+</mo>
              <mn>1</mn>
            </mrow>
          </msup>
        </msub>
        <mo stretchy="false">≤</mo>
        <msub>
          <mi>v</mi>
          <msup>
            <mn>2</mn>
            <mrow>
              <mi>n</mi>
              <mo stretchy="false">+</mo>
              <mn>1</mn>
            </mrow>
          </msup>
        </msub>
      </mrow>
      <msub>
        <mi>v</mi>
        <msup>
          <mn>2</mn>
          <mi>n</mi>
        </msup>
      </msub>
    </mrow>
    <annotation encoding="StarMath 5.0">u_{2^n} &lt;= u_{2^{n+1}} &lt;= v_{2^{n+1}} v_{2^n}</annotation>
  </semantics>
</math>
</file>

<file path=Object 138/content.xml><?xml version="1.0" encoding="utf-8"?>
<math xmlns="http://www.w3.org/1998/Math/MathML" display="block">
  <semantics>
    <msub>
      <mi>v</mi>
      <msup>
        <mn>2</mn>
        <mi>n</mi>
      </msup>
    </msub>
    <annotation encoding="StarMath 5.0">v_{2^n}</annotation>
  </semantics>
</math>
</file>

<file path=Object 139/content.xml><?xml version="1.0" encoding="utf-8"?>
<math xmlns="http://www.w3.org/1998/Math/MathML" display="block">
  <semantics>
    <msub>
      <mi>u</mi>
      <msup>
        <mn>2</mn>
        <mi>n</mi>
      </msup>
    </msub>
    <annotation encoding="StarMath 5.0">u_{2^n}</annotation>
  </semantics>
</math>
</file>

<file path=Object 14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40/content.xml><?xml version="1.0" encoding="utf-8"?>
<math xmlns="http://www.w3.org/1998/Math/MathML" display="block">
  <semantics>
    <mfrac>
      <mrow>
        <mi>b</mi>
        <mo stretchy="false">−</mo>
        <mi>a</mi>
      </mrow>
      <msup>
        <mn>2</mn>
        <mi>n</mi>
      </msup>
    </mfrac>
    <annotation encoding="StarMath 5.0">{b-a} over 2^n</annotation>
  </semantics>
</math>
</file>

<file path=Object 141/content.xml><?xml version="1.0" encoding="utf-8"?>
<math xmlns="http://www.w3.org/1998/Math/MathML" display="block">
  <semantics>
    <mrow>
      <mfrac>
        <mrow>
          <mi>b</mi>
          <mo stretchy="false">−</mo>
          <mi>a</mi>
        </mrow>
        <msup>
          <mn>2</mn>
          <mi>n</mi>
        </msup>
      </mfrac>
      <mo stretchy="false">×</mo>
      <msup>
        <mn>2</mn>
        <mi>n</mi>
      </msup>
      <mo stretchy="false">×</mo>
      <mi>e</mi>
    </mrow>
    <annotation encoding="StarMath 5.0">{b - a} over 2^n times 2^n times e</annotation>
  </semantics>
</math>
</file>

<file path=Object 142/content.xml><?xml version="1.0" encoding="utf-8"?>
<math xmlns="http://www.w3.org/1998/Math/MathML" display="block">
  <semantics>
    <msub>
      <mi>v</mi>
      <msup>
        <mn>2</mn>
        <mi>n</mi>
      </msup>
    </msub>
    <annotation encoding="StarMath 5.0">v_{2^n}</annotation>
  </semantics>
</math>
</file>

<file path=Object 143/content.xml><?xml version="1.0" encoding="utf-8"?>
<math xmlns="http://www.w3.org/1998/Math/MathML" display="block">
  <semantics>
    <msub>
      <mi>u</mi>
      <msup>
        <mn>2</mn>
        <mi>n</mi>
      </msup>
    </msub>
    <annotation encoding="StarMath 5.0">u_{2^n}</annotation>
  </semantics>
</math>
</file>

<file path=Object 144/content.xml><?xml version="1.0" encoding="utf-8"?>
<math xmlns="http://www.w3.org/1998/Math/MathML" display="block">
  <semantics>
    <mrow>
      <mrow>
        <mi>e</mi>
        <mo stretchy="false">×</mo>
        <mrow>
          <mo fence="true" form="prefix" stretchy="false">(</mo>
          <mrow>
            <mrow>
              <mi>b</mi>
              <mo stretchy="false">−</mo>
              <mi>a</mi>
            </mrow>
          </mrow>
          <mo fence="true" form="postfix" stretchy="false">)</mo>
        </mrow>
      </mrow>
      <mo stretchy="false">→</mo>
      <mn>0</mn>
    </mrow>
    <annotation encoding="StarMath 5.0">e times (b -a) -&gt; 0</annotation>
  </semantics>
</math>
</file>

<file path=Object 15/content.xml><?xml version="1.0" encoding="utf-8"?>
<math xmlns="http://www.w3.org/1998/Math/MathML">
  <semantics>
    <mrow>
      <msup>
        <mi>x</mi>
        <mi>n</mi>
      </msup>
      <mi>,</mi>
      <mrow>
        <mi>n</mi>
        <mo stretchy="false">∈</mo>
        <mo stretchy="false">ℤ</mo>
      </mrow>
    </mrow>
    <annotation encoding="StarMath 5.0">x^n, n in setZ</annotation>
  </semantics>
</math>
</file>

<file path=Object 16/content.xml><?xml version="1.0" encoding="utf-8"?>
<math xmlns="http://www.w3.org/1998/Math/MathML">
  <semantics>
    <mrow>
      <mrow>
        <mfrac>
          <msup>
            <mi>x</mi>
            <mrow>
              <mrow>
                <mi>n</mi>
                <mo stretchy="false">+</mo>
                <mn>1</mn>
              </mrow>
            </mrow>
          </msup>
          <mrow>
            <mrow>
              <mi>n</mi>
              <mo stretchy="false">+</mo>
              <mn>1</mn>
            </mrow>
          </mrow>
        </mfrac>
        <mo stretchy="false">+</mo>
        <mi>C</mi>
      </mrow>
    </mrow>
    <annotation encoding="StarMath 5.0">x^{n+1} over {n+1} + C</annotation>
  </semantics>
</math>
</file>

<file path=Object 17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8/content.xml><?xml version="1.0" encoding="utf-8"?>
<math xmlns="http://www.w3.org/1998/Math/MathML">
  <semantics>
    <mrow>
      <mrow>
        <mi>n</mi>
        <mo stretchy="false">⩾</mo>
        <mn>0</mn>
      </mrow>
    </mrow>
    <annotation encoding="StarMath 5.0">n geslant 0</annotation>
  </semantics>
</math>
</file>

<file path=Object 19/content.xml><?xml version="1.0" encoding="utf-8"?>
<math xmlns="http://www.w3.org/1998/Math/MathML">
  <semantics>
    <mrow>
      <msup>
        <mo stretchy="false">ℝ</mo>
        <mtext>*</mtext>
      </msup>
    </mrow>
    <annotation encoding="StarMath 5.0">setR^"*"</annotation>
  </semantics>
</math>
</file>

<file path=Object 2/content.xml><?xml version="1.0" encoding="utf-8"?>
<math xmlns="http://www.w3.org/1998/Math/MathML" display="block">
  <semantics>
    <mrow>
      <mrow>
        <msub>
          <mi>u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f</mi>
      </mrow>
      <mrow>
        <mo fence="true" form="prefix" stretchy="true">(</mo>
        <mrow>
          <mrow>
            <mrow>
              <mi>a</mi>
              <mo stretchy="false">+</mo>
              <mi>k</mi>
            </mrow>
            <mfrac>
              <mrow>
                <mi>b</mi>
                <mo stretchy="false">−</mo>
                <mi>a</mi>
              </mrow>
              <mi>n</mi>
            </mfrac>
          </mrow>
        </mrow>
        <mo fence="true" form="postfix" stretchy="true">)</mo>
      </mrow>
    </mrow>
    <annotation encoding="StarMath 5.0">u_n = {b-a} over {n} sum from k=0 to {n-1}f left ( a + k {b - a} over n right )</annotation>
  </semantics>
</math>
</file>

<file path=Object 20/content.xml><?xml version="1.0" encoding="utf-8"?>
<math xmlns="http://www.w3.org/1998/Math/MathML">
  <semantics>
    <mrow>
      <mrow>
        <mi>n</mi>
        <mo stretchy="false">⩽</mo>
        <mrow>
          <mo stretchy="false">−</mo>
          <mn>2</mn>
        </mrow>
      </mrow>
    </mrow>
    <annotation encoding="StarMath 5.0">n leslant -2</annotation>
  </semantics>
</math>
</file>

<file path=Object 21/content.xml><?xml version="1.0" encoding="utf-8"?>
<math xmlns="http://www.w3.org/1998/Math/MathML">
  <semantics>
    <mrow>
      <mfrac>
        <mn>1</mn>
        <mi>x</mi>
      </mfrac>
    </mrow>
    <annotation encoding="StarMath 5.0">1 over x</annotation>
  </semantics>
</math>
</file>

<file path=Object 22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ln(x) + C</annotation>
  </semantics>
</math>
</file>

<file path=Object 23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24/content.xml><?xml version="1.0" encoding="utf-8"?>
<math xmlns="http://www.w3.org/1998/Math/MathML">
  <semantics>
    <mrow>
      <mfrac>
        <mn>1</mn>
        <msup>
          <mi>x</mi>
          <mn>2</mn>
        </msup>
      </mfrac>
    </mrow>
    <annotation encoding="StarMath 5.0">1 over x^2</annotation>
  </semantics>
</math>
</file>

<file path=Object 25/content.xml><?xml version="1.0" encoding="utf-8"?>
<math xmlns="http://www.w3.org/1998/Math/MathML">
  <semantics>
    <mrow>
      <mrow>
        <mfrac>
          <mrow>
            <mo stretchy="false">−</mo>
            <mn>1</mn>
          </mrow>
          <mi>x</mi>
        </mfrac>
        <mo stretchy="false">+</mo>
        <mi>C</mi>
      </mrow>
    </mrow>
    <annotation encoding="StarMath 5.0">- 1 over x + C</annotation>
  </semantics>
</math>
</file>

<file path=Object 26/content.xml><?xml version="1.0" encoding="utf-8"?>
<math xmlns="http://www.w3.org/1998/Math/MathML">
  <semantics>
    <mrow>
      <msup>
        <mo stretchy="false">ℝ</mo>
        <mtext>*</mtext>
      </msup>
    </mrow>
    <annotation encoding="StarMath 5.0">setR^"*"</annotation>
  </semantics>
</math>
</file>

<file path=Object 27/content.xml><?xml version="1.0" encoding="utf-8"?>
<math xmlns="http://www.w3.org/1998/Math/MathML">
  <semantics>
    <mrow>
      <mfrac>
        <mn>1</mn>
        <msqrt>
          <mi>x</mi>
        </msqrt>
      </mfrac>
    </mrow>
    <annotation encoding="StarMath 5.0">1 over sqrt x</annotation>
  </semantics>
</math>
</file>

<file path=Object 28/content.xml><?xml version="1.0" encoding="utf-8"?>
<math xmlns="http://www.w3.org/1998/Math/MathML">
  <semantics>
    <mrow>
      <mn>2</mn>
      <mrow>
        <msqrt>
          <mi>x</mi>
        </msqrt>
        <mo stretchy="false">+</mo>
        <mi>C</mi>
      </mrow>
    </mrow>
    <annotation encoding="StarMath 5.0">2 sqrt x + C</annotation>
  </semantics>
</math>
</file>

<file path=Object 29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3/content.xml><?xml version="1.0" encoding="utf-8"?>
<math xmlns="http://www.w3.org/1998/Math/MathML">
  <semantics>
    <mrow>
      <mrow>
        <mi>I</mi>
        <mo stretchy="false">⊂</mo>
        <mo stretchy="false">ℝ</mo>
      </mrow>
    </mrow>
    <annotation encoding="StarMath 5.0">I subset setR</annotation>
  </semantics>
</math>
</file>

<file path=Object 30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31/content.xml><?xml version="1.0" encoding="utf-8"?>
<math xmlns="http://www.w3.org/1998/Math/MathML">
  <semantics>
    <mrow>
      <mrow>
        <mo stretchy="false">−</mo>
        <mi>cos</mi>
      </mrow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-cos(x) + C</annotation>
  </semantics>
</math>
</file>

<file path=Object 32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3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34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sin(x) + C</annotation>
  </semantics>
</math>
</file>

<file path=Object 35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6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7/content.xml><?xml version="1.0" encoding="utf-8"?>
<math xmlns="http://www.w3.org/1998/Math/MathML">
  <semantics>
    <mrow>
      <mrow>
        <msup>
          <mi>e</mi>
          <mi>x</mi>
        </msup>
        <mo stretchy="false">+</mo>
        <mi>C</mi>
      </mrow>
    </mrow>
    <annotation encoding="StarMath 5.0">e^x+C</annotation>
  </semantics>
</math>
</file>

<file path=Object 38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9/content.xml><?xml version="1.0" encoding="utf-8"?>
<math xmlns="http://www.w3.org/1998/Math/MathML" display="block">
  <semantics>
    <mrow>
      <mi>u</mi>
      <mi>'</mi>
      <msup>
        <mi>u</mi>
        <mi>n</mi>
      </msup>
      <mi>,</mi>
      <mrow>
        <mi>n</mi>
        <mo stretchy="false">∈</mo>
        <mi mathvariant="normal">ℤ</mi>
      </mrow>
      <mtext>\{0,1</mtext>
    </mrow>
    <annotation encoding="StarMath 5.0">u'u^n, n in setZ"\{0,1}</annotation>
  </semantics>
</math>
</file>

<file path=Object 4/content.xml><?xml version="1.0" encoding="utf-8"?>
<math xmlns="http://www.w3.org/1998/Math/MathML">
  <semantics>
    <mrow>
      <mrow>
        <mi>a</mi>
        <mo stretchy="false">∈</mo>
        <mo stretchy="false">ℝ</mo>
      </mrow>
      <mi>,</mi>
      <mi mathvariant="italic">aF</mi>
    </mrow>
    <annotation encoding="StarMath 5.0">a in setR, aF</annotation>
  </semantics>
</math>
</file>

<file path=Object 40/content.xml><?xml version="1.0" encoding="utf-8"?>
<math xmlns="http://www.w3.org/1998/Math/MathML" display="block">
  <semantics>
    <mrow>
      <mfrac>
        <msup>
          <mi>u</mi>
          <mrow>
            <mi>n</mi>
            <mo stretchy="false">+</mo>
            <mn>1</mn>
          </mrow>
        </msup>
        <mrow>
          <mi>n</mi>
          <mo stretchy="false">+</mo>
          <mn>1</mn>
        </mrow>
      </mfrac>
      <mo stretchy="false">+</mo>
      <mi>C</mi>
    </mrow>
    <annotation encoding="StarMath 5.0">u^{n+1} over {n+1} + C</annotation>
  </semantics>
</math>
</file>

<file path=Object 4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  <mo stretchy="false">∀</mo>
      <mrow>
        <mi>x</mi>
        <mo stretchy="false">∈</mo>
        <mi>I</mi>
      </mrow>
      <mi mathvariant="italic">si</mi>
      <mrow>
        <mi>n</mi>
        <mo stretchy="false">⩽</mo>
        <mrow>
          <mo stretchy="false">−</mo>
          <mn>2</mn>
        </mrow>
      </mrow>
    </mrow>
    <annotation encoding="StarMath 5.0">u(x) &lt;&gt; 0 forall x in I si n leslant -2</annotation>
  </semantics>
</math>
</file>

<file path=Object 42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</annotation>
  </semantics>
</math>
</file>

<file path=Object 43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</mrow>
    <annotation encoding="StarMath 5.0">ln(u) + C</annotation>
  </semantics>
</math>
</file>

<file path=Object 44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  <mi>,</mi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forall x in I, u(x) &gt; 0</annotation>
  </semantics>
</math>
</file>

<file path=Object 45/content.xml><?xml version="1.0" encoding="utf-8"?>
<math xmlns="http://www.w3.org/1998/Math/MathML" display="block">
  <semantics>
    <mfrac>
      <mrow>
        <mi>u</mi>
        <mi>'</mi>
      </mrow>
      <msup>
        <mi>u</mi>
        <mn>2</mn>
      </msup>
    </mfrac>
    <annotation encoding="StarMath 5.0">{u'} over u^2</annotation>
  </semantics>
</math>
</file>

<file path=Object 46/content.xml><?xml version="1.0" encoding="utf-8"?>
<math xmlns="http://www.w3.org/1998/Math/MathML" display="block">
  <semantics>
    <mrow>
      <mfrac>
        <mrow>
          <mo stretchy="false">−</mo>
          <mn>1</mn>
        </mrow>
        <mi>u</mi>
      </mfrac>
      <mo stretchy="false">+</mo>
      <mi>C</mi>
    </mrow>
    <annotation encoding="StarMath 5.0">- 1 over u + C</annotation>
  </semantics>
</math>
</file>

<file path=Object 47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  <mi>,</mi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forall x in I, u(x) &lt;&gt; 0</annotation>
  </semantics>
</math>
</file>

<file path=Object 48/content.xml><?xml version="1.0" encoding="utf-8"?>
<math xmlns="http://www.w3.org/1998/Math/MathML" display="block">
  <semantics>
    <mfrac>
      <mrow>
        <mi>u</mi>
        <mi>'</mi>
      </mrow>
      <msqrt>
        <mi>u</mi>
      </msqrt>
    </mfrac>
    <annotation encoding="StarMath 5.0">{u'} over sqrt u</annotation>
  </semantics>
</math>
</file>

<file path=Object 49/content.xml><?xml version="1.0" encoding="utf-8"?>
<math xmlns="http://www.w3.org/1998/Math/MathML" display="block">
  <semantics>
    <mrow>
      <mn>2</mn>
      <mrow>
        <msqrt>
          <mi>u</mi>
        </msqrt>
        <mo stretchy="false">+</mo>
        <mi>C</mi>
      </mrow>
    </mrow>
    <annotation encoding="StarMath 5.0">2 sqrt u + C</annotation>
  </semantics>
</math>
</file>

<file path=Object 5/content.xml><?xml version="1.0" encoding="utf-8"?>
<math xmlns="http://www.w3.org/1998/Math/MathML">
  <semantics>
    <mrow>
      <mi mathvariant="italic">af</mi>
    </mrow>
    <annotation encoding="StarMath 5.0">af</annotation>
  </semantics>
</math>
</file>

<file path=Object 50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  <mi>,</mi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forall x in I, u(x) &gt; 0</annotation>
  </semantics>
</math>
</file>

<file path=Object 51/content.xml><?xml version="1.0" encoding="utf-8"?>
<math xmlns="http://www.w3.org/1998/Math/MathML" display="block">
  <semantics>
    <mrow>
      <mi>u</mi>
      <mi>'</mi>
      <mi>sin</mi>
      <mrow>
        <mo fence="true" form="prefix" stretchy="false">(</mo>
        <mrow>
          <mi>u</mi>
        </mrow>
        <mo fence="true" form="postfix" stretchy="false">)</mo>
      </mrow>
    </mrow>
    <annotation encoding="StarMath 5.0">u' sin(u)</annotation>
  </semantics>
</math>
</file>

<file path=Object 52/content.xml><?xml version="1.0" encoding="utf-8"?>
<math xmlns="http://www.w3.org/1998/Math/MathML" display="block">
  <semantics>
    <mrow>
      <mrow>
        <mo stretchy="false">−</mo>
        <mi>cos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</mrow>
    <annotation encoding="StarMath 5.0">- cos(u) + C</annotation>
  </semantics>
</math>
</file>

<file path=Object 53/content.xml><?xml version="1.0" encoding="utf-8"?>
<math xmlns="http://www.w3.org/1998/Math/MathML" display="block">
  <semantics>
    <mrow>
      <mi>u</mi>
      <mi>'</mi>
      <mi>cos</mi>
      <mrow>
        <mo fence="true" form="prefix" stretchy="false">(</mo>
        <mrow>
          <mi>u</mi>
        </mrow>
        <mo fence="true" form="postfix" stretchy="false">)</mo>
      </mrow>
    </mrow>
    <annotation encoding="StarMath 5.0">u' cos(u)</annotation>
  </semantics>
</math>
</file>

<file path=Object 5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</mrow>
    <annotation encoding="StarMath 5.0">sin(u) + C</annotation>
  </semantics>
</math>
</file>

<file path=Object 55/content.xml><?xml version="1.0" encoding="utf-8"?>
<math xmlns="http://www.w3.org/1998/Math/MathML" display="block">
  <semantics>
    <mrow>
      <mi>u</mi>
      <mi>'</mi>
      <msup>
        <mi>e</mi>
        <mi>u</mi>
      </msup>
    </mrow>
    <annotation encoding="StarMath 5.0">u' e^u</annotation>
  </semantics>
</math>
</file>

<file path=Object 56/content.xml><?xml version="1.0" encoding="utf-8"?>
<math xmlns="http://www.w3.org/1998/Math/MathML" display="block">
  <semantics>
    <mrow>
      <msup>
        <mi>e</mi>
        <mi>u</mi>
      </msup>
      <mo stretchy="false">+</mo>
      <mi>C</mi>
    </mrow>
    <annotation encoding="StarMath 5.0">e^u+C</annotation>
  </semantics>
</math>
</file>

<file path=Object 57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
</annotation>
  </semantics>
</math>
</file>

<file path=Object 58/content.xml><?xml version="1.0" encoding="utf-8"?>
<math xmlns="http://www.w3.org/1998/Math/MathML" display="block">
  <semantics>
    <mrow>
      <mi>ln</mi>
      <mrow>
        <mo fence="true" form="prefix" stretchy="false">(</mo>
        <mrow>
          <mrow>
            <mo fence="true" form="prefix" stretchy="true">|</mo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  <mo fence="true" form="postfix" stretchy="true">|</mo>
          </mrow>
        </mrow>
        <mo fence="true" form="postfix" stretchy="false">)</mo>
      </mrow>
    </mrow>
    <annotation encoding="StarMath 5.0">ln(abs(u))</annotation>
  </semantics>
</math>
</file>

<file path=Object 5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/content.xml><?xml version="1.0" encoding="utf-8"?>
<math xmlns="http://www.w3.org/1998/Math/MathML">
  <semantics>
    <mrow>
      <mrow>
        <mi>x</mi>
        <mo stretchy="false">∈</mo>
        <mi>I</mi>
      </mrow>
      <mi>,</mi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x in I, f(x)= ""</annotation>
  </semantics>
</math>
</file>

<file path=Object 60/content.xml><?xml version="1.0" encoding="utf-8"?>
<math xmlns="http://www.w3.org/1998/Math/MathML" display="block">
  <semantics>
    <mrow>
      <mrow>
        <msub>
          <mi>v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i>f</mi>
      </mrow>
      <mrow>
        <mo fence="true" form="prefix" stretchy="true">(</mo>
        <mrow>
          <mrow>
            <mrow>
              <mi>a</mi>
              <mo stretchy="false">+</mo>
              <mi>k</mi>
            </mrow>
            <mfrac>
              <mrow>
                <mi>b</mi>
                <mo stretchy="false">−</mo>
                <mi>a</mi>
              </mrow>
              <mi>n</mi>
            </mfrac>
          </mrow>
        </mrow>
        <mo fence="true" form="postfix" stretchy="true">)</mo>
      </mrow>
    </mrow>
    <annotation encoding="StarMath 5.0">v_n = {b-a} over {n} sum from k=1 to n f left ( a + k {b - a} over n right )</annotation>
  </semantics>
</math>
</file>

<file path=Object 61/content.xml><?xml version="1.0" encoding="utf-8"?>
<math xmlns="http://www.w3.org/1998/Math/MathML" display="block">
  <semantics>
    <mfrac>
      <mrow>
        <mi>b</mi>
        <mo stretchy="false">−</mo>
        <mi>a</mi>
      </mrow>
      <msup>
        <mn>2</mn>
        <mi>n</mi>
      </msup>
    </mfrac>
    <annotation encoding="StarMath 5.0">{b-a} over 2^n</annotation>
  </semantics>
</math>
</file>

<file path=Object 62/content.xml><?xml version="1.0" encoding="utf-8"?>
<math xmlns="http://www.w3.org/1998/Math/MathML">
  <semantics>
    <mrow>
      <mfrac>
        <mn>1</mn>
        <mrow>
          <mrow>
            <mi>b</mi>
            <mo stretchy="false">−</mo>
            <mi>a</mi>
          </mrow>
        </mrow>
      </mfrac>
      <mrow>
        <munderover>
          <mo stretchy="false">∫</mo>
          <mi>a</mi>
          <mi>b</mi>
        </munderover>
        <mi>f</mi>
      </mrow>
      <mrow>
        <mo stretchy="false">(</mo>
        <mrow>
          <mi>t</mi>
        </mrow>
        <mo stretchy="false">)</mo>
      </mrow>
      <mi mathvariant="italic">dt</mi>
    </mrow>
    <annotation encoding="StarMath 5.0">1 over {b-a} int csub a csup b f(t) dt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row>
            <mo stretchy="false">−</mo>
            <mi>f</mi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row>
        <mi mathvariant="italic">dx</mi>
        <mo stretchy="false">=</mo>
        <mrow>
          <mo stretchy="false">−</mo>
          <mrow>
            <munderover>
              <mo stretchy="false">∫</mo>
              <mi>a</mi>
              <mi>b</mi>
            </munderover>
            <mi>f</mi>
          </mrow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{-f(x)}dx = - int from a to b f(x)dx</annotation>
  </semantics>
</math>
</file>

<file path=Object 65/content.xml><?xml version="1.0" encoding="utf-8"?>
<math xmlns="http://www.w3.org/1998/Math/MathML" display="block">
  <semantics>
    <mrow>
      <mfrac>
        <mn>1</mn>
        <mrow>
          <mi>b</mi>
          <mo stretchy="false">−</mo>
          <mi>a</mi>
        </mrow>
      </mfrac>
      <mrow>
        <munderover>
          <mo stretchy="false">∫</mo>
          <mi>a</mi>
          <mi>b</mi>
        </munderover>
        <mi>f</mi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1 over {b-a} int csub a csup b f(t) dt</annotation>
  </semantics>
</math>
</file>

<file path=Object 66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g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g(x)dx</annotation>
  </semantics>
</math>
</file>

<file path=Object 6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9/content.xml><?xml version="1.0" encoding="utf-8"?>
<math xmlns="http://www.w3.org/1998/Math/MathML" display="block">
  <semantics>
    <mfrac>
      <mrow>
        <mi>A</mi>
        <mrow>
          <mo fence="true" form="prefix" stretchy="false">(</mo>
          <mrow>
            <mrow>
              <mi>x</mi>
              <mo stretchy="false">+</mo>
              <mi>h</mi>
            </mrow>
          </mrow>
          <mo fence="true" form="postfix" stretchy="false">)</mo>
        </mrow>
        <mi>–</mi>
        <mi>A</mi>
        <mrow>
          <mo fence="true" form="prefix" stretchy="false">(</mo>
          <mrow>
            <mi>x</mi>
          </mrow>
          <mo fence="true" form="postfix" stretchy="false">)</mo>
        </mrow>
      </mrow>
      <mi>h</mi>
    </mfrac>
    <annotation encoding="StarMath 5.0">{A(x+h) – A(x)} over h</annotation>
  </semantics>
</math>
</file>

<file path=Object 7/content.xml><?xml version="1.0" encoding="utf-8"?>
<math xmlns="http://www.w3.org/1998/Math/MathML">
  <semantics>
    <mrow>
      <mrow>
        <mi>x</mi>
        <mo stretchy="false">∈</mo>
        <mi>I</mi>
      </mrow>
      <mi>,</mi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x in I, F(x)= ""</annotation>
  </semantics>
</math>
</file>

<file path=Object 70/content.xml><?xml version="1.0" encoding="utf-8"?>
<math xmlns="http://www.w3.org/1998/Math/MathML" display="block">
  <semantics>
    <mfrac>
      <mrow>
        <mi>A</mi>
        <mrow>
          <mo fence="true" form="prefix" stretchy="false">(</mo>
          <mrow>
            <mrow>
              <mi>x</mi>
              <mo stretchy="false">+</mo>
              <mi>h</mi>
            </mrow>
          </mrow>
          <mo fence="true" form="postfix" stretchy="false">)</mo>
        </mrow>
        <mi>–</mi>
        <mi>A</mi>
        <mrow>
          <mo fence="true" form="prefix" stretchy="false">(</mo>
          <mrow>
            <mi>x</mi>
          </mrow>
          <mo fence="true" form="postfix" stretchy="false">)</mo>
        </mrow>
      </mrow>
      <mi>h</mi>
    </mfrac>
    <annotation encoding="StarMath 5.0">{A(x+h) – A(x)} over h</annotation>
  </semantics>
</math>
</file>

<file path=Object 71/content.xml><?xml version="1.0" encoding="utf-8"?>
<math xmlns="http://www.w3.org/1998/Math/MathML" display="block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A</mi>
              <mrow>
                <mo fence="true" form="prefix" stretchy="false">(</mo>
                <mrow>
                  <mrow>
                    <mi>x</mi>
                    <mo stretchy="false">+</mo>
                    <mi>h</mi>
                  </mrow>
                </mrow>
                <mo fence="true" form="postfix" stretchy="false">)</mo>
              </mrow>
              <mi>–</mi>
              <mi>A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lim from { h-&gt; 0} {{A(x+h) – A(x)} over h} = f(x)</annotation>
  </semantics>
</math>
</file>

<file path=Object 7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(x)dx = F(b) - f(a)</annotation>
  </semantics>
</math>
</file>

<file path=Object 7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subsup>
          <mrow>
            <mo fence="true" form="prefix" stretchy="true">[</mo>
            <mrow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]</mo>
          </mrow>
          <mi>b</mi>
          <mi>a</mi>
        </msubsup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(x)dx = left [ F(x) right ]^a_b = F(b) - f(a)</annotation>
  </semantics>
</math>
</file>

<file path=Object 7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75/content.xml><?xml version="1.0" encoding="utf-8"?>
<math xmlns="http://www.w3.org/1998/Math/MathML" display="block">
  <semantics>
    <mrow>
      <mrow>
        <mo stretchy="false">−</mo>
        <mrow>
          <munderover>
            <mo stretchy="false">∫</mo>
            <mi>b</mi>
            <mi>a</mi>
          </munderover>
          <mi>f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- int from b to a f(x)dx</annotation>
  </semantics>
</math>
</file>

<file path=Object 76/content.xml><?xml version="1.0" encoding="utf-8"?>
<math xmlns="http://www.w3.org/1998/Math/MathML" display="block">
  <semantics>
    <mrow>
      <mrow>
        <mrow>
          <munderover>
            <mo stretchy="false">∫</mo>
            <mi>b</mi>
            <mi>a</mi>
          </munderover>
          <mrow/>
        </mrow>
        <mo stretchy="false">−</mo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b to a {}- f(x)dx</annotation>
  </semantics>
</math>
</file>

<file path=Object 77/content.xml><?xml version="1.0" encoding="utf-8"?>
<math xmlns="http://www.w3.org/1998/Math/MathML" display="block">
  <semantics>
    <mrow>
      <mrow>
        <munderover>
          <mo stretchy="false">∫</mo>
          <mi>a</mi>
          <mi>x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x f(x)dx</annotation>
  </semantics>
</math>
</file>

<file path=Object 78/content.xml><?xml version="1.0" encoding="utf-8"?>
<math xmlns="http://www.w3.org/1998/Math/MathML" display="block">
  <semantics>
    <mrow>
      <mrow>
        <munderover>
          <mo stretchy="false">∫</mo>
          <mi>a</mi>
          <mi>x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x f(x)dx</annotation>
  </semantics>
</math>
</file>

<file path=Object 79/content.xml><?xml version="1.0" encoding="utf-8"?>
<math xmlns="http://www.w3.org/1998/Math/MathML">
  <semantics>
    <mrow>
      <mrow>
        <mrow>
          <munderover>
            <mo stretchy="false">∫</mo>
            <mi>a</mi>
            <mi>b</mi>
          </munderover>
          <mi>f</mi>
        </mrow>
        <mo stretchy="false">=</mo>
        <mrow>
          <mrow>
            <munderover>
              <mo stretchy="false">∫</mo>
              <mi>a</mi>
              <mi>c</mi>
            </munderover>
            <mi>f</mi>
          </mrow>
          <mo stretchy="false">+</mo>
          <mrow>
            <munderover>
              <mo stretchy="false">∫</mo>
              <mi>c</mi>
              <mi>b</mi>
            </munderover>
            <mi>f</mi>
          </mrow>
        </mrow>
      </mrow>
    </mrow>
    <annotation encoding="StarMath 5.0">int csub a csup b f = int csub a csup c f + int csub c csup b f</annotation>
  </semantics>
</math>
</file>

<file path=Object 8/content.xml><?xml version="1.0" encoding="utf-8"?>
<math xmlns="http://www.w3.org/1998/Math/MathML">
  <semantics>
    <mrow>
      <mrow>
        <mi>I</mi>
        <mo stretchy="false">=</mo>
        <mtext/>
      </mrow>
    </mrow>
    <annotation encoding="StarMath 5.0">I = ""</annotation>
  </semantics>
</math>
</file>

<file path=Object 8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α</mi>
      </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β</mi>
      </mrow>
      <mi>g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α</mi>
      </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+</mo>
        <mi>β</mi>
      </mrow>
      <mrow>
        <munderover>
          <mo stretchy="false">∫</mo>
          <mi>a</mi>
          <mi>b</mi>
        </munderover>
        <mi>α</mi>
      </mrow>
      <mi>g</mi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%alpha f(x) + %beta g(x) dx = %alpha int from a to b f(x)dx + %beta int from a to b %alpha g(x)dx</annotation>
  </semantics>
</math>
</file>

<file path=Object 81/content.xml><?xml version="1.0" encoding="utf-8"?>
<math xmlns="http://www.w3.org/1998/Math/MathML" display="block">
  <semantics>
    <mrow>
      <mn>2</mn>
      <mrow>
        <munderover>
          <mo stretchy="false">∫</mo>
          <mn>0</mn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2 int from 0 to a f(x)dx</annotation>
  </semantics>
</math>
</file>

<file path=Object 82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a</mi>
          </mrow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-a to a f(x)dx</annotation>
  </semantics>
</math>
</file>

<file path=Object 8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a</mi>
          </mrow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-a to a f(x)dx</annotation>
  </semantics>
</math>
</file>

<file path=Object 84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0 to T f(x)dx</annotation>
  </semantics>
</math>
</file>

<file path=Object 85/content.xml><?xml version="1.0" encoding="utf-8"?>
<math xmlns="http://www.w3.org/1998/Math/MathML" display="block">
  <semantics>
    <mrow>
      <mrow>
        <munderover>
          <mo stretchy="false">∫</mo>
          <mi>a</mi>
          <mrow>
            <mi>a</mi>
            <mo stretchy="false">+</mo>
            <mi>T</mi>
          </mrow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{a+T} f(x)dx</annotation>
  </semantics>
</math>
</file>

<file path=Object 86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87/content.xml><?xml version="1.0" encoding="utf-8"?>
<math xmlns="http://www.w3.org/1998/Math/MathML" display="block">
  <semantics>
    <mrow>
      <mo fence="true" form="prefix" stretchy="true">|</mo>
      <mrow>
        <mrow>
          <mrow>
            <munderover>
              <mo stretchy="false">∫</mo>
              <mi>a</mi>
              <mi>b</mi>
            </munderover>
            <mi>f</mi>
          </mrow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</mrow>
      <mo fence="true" form="postfix" stretchy="true">|</mo>
    </mrow>
    <annotation encoding="StarMath 5.0">abs {int from a to b f(x)dx}</annotation>
  </semantics>
</math>
</file>

<file path=Object 88/content.xml><?xml version="1.0" encoding="utf-8"?>
<math xmlns="http://www.w3.org/1998/Math/MathML" display="block">
  <semantics>
    <mrow>
      <mfrac>
        <mn>1</mn>
        <mn>2</mn>
      </mfrac>
      <mi>≤</mi>
      <mfrac>
        <mn>1</mn>
        <mi>x</mi>
      </mfrac>
      <mi>≤</mi>
      <mn>1</mn>
    </mrow>
    <annotation encoding="StarMath 5.0">1 over 2 ≤ 1 over x ≤ 1</annotation>
  </semantics>
</math>
</file>

<file path=Object 89/content.xml><?xml version="1.0" encoding="utf-8"?>
<math xmlns="http://www.w3.org/1998/Math/MathML" display="block">
  <semantics>
    <mrow>
      <mfrac>
        <mn>1</mn>
        <mn>2</mn>
      </mfrac>
      <mi>≤</mi>
      <mrow>
        <munderover>
          <mo stretchy="false">∫</mo>
          <mn>1</mn>
          <mn>2</mn>
        </munderover>
        <mrow>
          <mfrac>
            <mn>1</mn>
            <mi>x</mi>
          </mfrac>
          <mi mathvariant="italic">dx</mi>
        </mrow>
      </mrow>
      <mi>≤</mi>
      <mn>1</mn>
    </mrow>
    <annotation encoding="StarMath 5.0">1 over 2 ≤ int from 1 to 2 { 1 over x dx }≤ 1</annotation>
  </semantics>
</math>
</file>

<file path=Object 9/content.xml><?xml version="1.0" encoding="utf-8"?>
<math xmlns="http://www.w3.org/1998/Math/MathML">
  <semantics>
    <mrow>
      <mrow>
        <mi>k</mi>
        <mo stretchy="false">∈</mo>
        <mo stretchy="false">ℝ</mo>
      </mrow>
    </mrow>
    <annotation encoding="StarMath 5.0">k in setR</annotation>
  </semantics>
</math>
</file>

<file path=Object 90/content.xml><?xml version="1.0" encoding="utf-8"?>
<math xmlns="http://www.w3.org/1998/Math/MathML" display="block">
  <semantics>
    <mrow>
      <mrow>
        <mo stretchy="false">∫</mo>
        <mi>ϕ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row>
              <mo fence="true" form="prefix" stretchy="false">(</mo>
              <mrow>
                <mrow>
                  <msub>
                    <mi>s</mi>
                    <mrow>
                      <mi>k</mi>
                      <mo stretchy="false">+</mo>
                      <mn>1</mn>
                    </mrow>
                  </msub>
                  <mo stretchy="false">−</mo>
                  <msub>
                    <mi>s</mi>
                    <mi>k</mi>
                  </msub>
                </mrow>
              </mrow>
              <mo fence="true" form="postfix" stretchy="false">)</mo>
            </mrow>
            <mi>f</mi>
            <mrow>
              <mo fence="true" form="prefix" stretchy="false">(</mo>
              <mrow>
                <msub>
                  <mi>e</mi>
                  <mi>k</mi>
                </msub>
              </mrow>
              <mo fence="true" form="postfix" stretchy="false">)</mo>
            </mrow>
          </mrow>
        </mrow>
      </mrow>
    </mrow>
    <annotation encoding="StarMath 5.0">int %phi(x) = sum from i=0 to {n-1} {(s_{k+1} - s_k) f(e_k)}</annotation>
  </semantics>
</math>
</file>

<file path=Object 91/content.xml><?xml version="1.0" encoding="utf-8"?>
<math xmlns="http://www.w3.org/1998/Math/MathML" display="block">
  <semantics>
    <mrow>
      <msub>
        <mi>s</mi>
        <mi>k</mi>
      </msub>
      <mo stretchy="false">&lt;</mo>
      <msub>
        <mi>e</mi>
        <mi>k</mi>
      </msub>
      <mo stretchy="false">&lt;</mo>
      <msub>
        <mi>s</mi>
        <mrow>
          <mi>k</mi>
          <mo stretchy="false">+</mo>
          <mn>1</mn>
        </mrow>
      </msub>
    </mrow>
    <annotation encoding="StarMath 5.0">s_k &lt; e_k &lt; s_{k+1}</annotation>
  </semantics>
</math>
</file>

<file path=Object 92/content.xml><?xml version="1.0" encoding="utf-8"?>
<math xmlns="http://www.w3.org/1998/Math/MathML" display="block">
  <semantics>
    <mrow>
      <mrow>
        <mo fence="true" form="prefix" stretchy="true">|</mo>
        <mrow>
          <mrow>
            <mo stretchy="false">∫</mo>
            <mi>f</mi>
          </mrow>
        </mrow>
        <mo fence="true" form="postfix" stretchy="true">|</mo>
      </mrow>
      <mo stretchy="false">≤</mo>
      <mrow>
        <mo stretchy="false">∫</mo>
        <mrow>
          <mo fence="true" form="prefix" stretchy="true">|</mo>
          <mrow>
            <mi>f</mi>
          </mrow>
          <mo fence="true" form="postfix" stretchy="true">|</mo>
        </mrow>
      </mrow>
    </mrow>
    <annotation encoding="StarMath 5.0">abs {int f} &lt;= int abs f</annotation>
  </semantics>
</math>
</file>

<file path=Object 93/content.xml><?xml version="1.0" encoding="utf-8"?>
<math xmlns="http://www.w3.org/1998/Math/MathML" display="block">
  <semantics>
    <mrow>
      <mrow>
        <mo stretchy="false">∫</mo>
        <mi>a</mi>
      </mrow>
      <mrow>
        <mi>f</mi>
        <mo stretchy="false">+</mo>
        <mi>b</mi>
      </mrow>
      <mi>g</mi>
    </mrow>
    <annotation encoding="StarMath 5.0">int a f + b g</annotation>
  </semantics>
</math>
</file>

<file path=Object 94/content.xml><?xml version="1.0" encoding="utf-8"?>
<math xmlns="http://www.w3.org/1998/Math/MathML" display="block">
  <semantics>
    <mrow>
      <mi>a</mi>
      <mrow>
        <mo stretchy="false">∫</mo>
        <mi>f</mi>
      </mrow>
    </mrow>
    <annotation encoding="StarMath 5.0">a int f</annotation>
  </semantics>
</math>
</file>

<file path=Object 95/content.xml><?xml version="1.0" encoding="utf-8"?>
<math xmlns="http://www.w3.org/1998/Math/MathML" display="block">
  <semantics>
    <mrow>
      <mi>b</mi>
      <mrow>
        <mo stretchy="false">∫</mo>
        <mi>g</mi>
      </mrow>
    </mrow>
    <annotation encoding="StarMath 5.0">b int g</annotation>
  </semantics>
</math>
</file>

<file path=Object 96/content.xml><?xml version="1.0" encoding="utf-8"?>
<math xmlns="http://www.w3.org/1998/Math/MathML" display="block">
  <semantics>
    <mi>ϕ</mi>
    <annotation encoding="StarMath 5.0">%phi</annotation>
  </semantics>
</math>
</file>

<file path=Object 97/content.xml><?xml version="1.0" encoding="utf-8"?>
<math xmlns="http://www.w3.org/1998/Math/MathML" display="block">
  <semantics>
    <mi>ϕ</mi>
    <annotation encoding="StarMath 5.0">%phi</annotation>
  </semantics>
</math>
</file>

<file path=Object 98/content.xml><?xml version="1.0" encoding="utf-8"?>
<math xmlns="http://www.w3.org/1998/Math/MathML" display="block">
  <semantics>
    <mrow>
      <mi>η</mi>
      <mo stretchy="false">&gt;</mo>
      <mn>0</mn>
    </mrow>
    <annotation encoding="StarMath 5.0">%eta &gt; 0</annotation>
  </semantics>
</math>
</file>

<file path=Object 99/content.xml><?xml version="1.0" encoding="utf-8"?>
<math xmlns="http://www.w3.org/1998/Math/MathML" display="block">
  <semantics>
    <mi>η</mi>
    <annotation encoding="StarMath 5.0">%eta</annotation>
  </semantics>
</math>
</file>