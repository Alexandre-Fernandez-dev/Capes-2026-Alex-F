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060798e" officeooo:paragraph-rsid="0060798e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fo:language="fr" fo:country="FR" officeooo:paragraph-rsid="0006c1c5"/>
    </style:style>
    <style:style style:name="P7" style:family="paragraph" style:parent-style-name="Standard">
      <style:paragraph-properties style:writing-mode="lr-tb"/>
      <style:text-properties fo:language="fr" fo:country="FR" fo:font-weight="normal" officeooo:rsid="002aae56" officeooo:paragraph-rsid="0006c1c5" style:font-weight-asian="normal" style:font-weight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b2a0bf" officeooo:paragraph-rsid="00b2a0bf"/>
    </style:style>
    <style:style style:name="P10" style:family="paragraph" style:parent-style-name="Heading_20_2">
      <style:text-properties officeooo:rsid="00ad4cce" officeooo:paragraph-rsid="00ad4cce"/>
    </style:style>
    <style:style style:name="P11" style:family="paragraph" style:parent-style-name="Text_20_body">
      <style:text-properties fo:font-weight="bold" officeooo:rsid="00b16843" officeooo:paragraph-rsid="00b16843" style:font-weight-asian="bold" style:font-weight-complex="bold"/>
    </style:style>
    <style:style style:name="P12" style:family="paragraph" style:parent-style-name="Text_20_body" style:list-style-name="L1">
      <style:text-properties fo:font-weight="normal" officeooo:rsid="00b16843" officeooo:paragraph-rsid="00b16843" style:font-weight-asian="normal" style:font-weight-complex="normal"/>
    </style:style>
    <style:style style:name="P13" style:family="paragraph" style:parent-style-name="Text_20_body">
      <style:text-properties fo:font-weight="normal" officeooo:rsid="00b1d3e2" officeooo:paragraph-rsid="00b1d3e2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b1d3e2" officeooo:paragraph-rsid="00b1d3e2" style:font-weight-asian="normal" style:font-weight-complex="normal"/>
    </style:style>
    <style:style style:name="P15" style:family="paragraph" style:parent-style-name="Text_20_body">
      <style:text-properties fo:font-weight="normal" officeooo:rsid="00b2a0bf" officeooo:paragraph-rsid="00b2a0bf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b2a0bf" officeooo:paragraph-rsid="00b2a0bf" style:font-weight-asian="normal" style:font-weight-complex="normal"/>
    </style:style>
    <style:style style:name="P17" style:family="paragraph" style:parent-style-name="Text_20_body">
      <style:text-properties fo:font-weight="normal" officeooo:rsid="00b3416c" officeooo:paragraph-rsid="00b3416c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officeooo:rsid="00b3416c" officeooo:paragraph-rsid="00b3416c"/>
    </style:style>
    <style:style style:name="P19" style:family="paragraph" style:parent-style-name="Text_20_body">
      <style:text-properties officeooo:rsid="00ad4cce" officeooo:paragraph-rsid="00ad4cce"/>
    </style:style>
    <style:style style:name="P20" style:family="paragraph" style:parent-style-name="Text_20_body">
      <style:text-properties officeooo:paragraph-rsid="00ad4cce"/>
    </style:style>
    <style:style style:name="P21" style:family="paragraph" style:parent-style-name="Heading_20_1">
      <style:paragraph-properties fo:break-before="page"/>
      <style:text-properties officeooo:paragraph-rsid="00ad4cce"/>
    </style:style>
    <style:style style:name="P22" style:family="paragraph" style:parent-style-name="Text_20_body">
      <style:text-properties fo:font-weight="bold" officeooo:rsid="00d65d61" officeooo:paragraph-rsid="00ad4cce" style:font-weight-asian="bold" style:font-weight-complex="bold"/>
    </style:style>
    <style:style style:name="P23" style:family="paragraph" style:parent-style-name="Text_20_body">
      <style:text-properties fo:font-weight="normal" officeooo:rsid="00d65d61" officeooo:paragraph-rsid="00ad4cce" style:font-weight-asian="normal" style:font-weight-complex="normal"/>
    </style:style>
    <style:style style:name="P24" style:family="paragraph" style:parent-style-name="Text_20_body">
      <style:text-properties fo:font-weight="bold" officeooo:rsid="00d7c896" officeooo:paragraph-rsid="00ad4cce" style:font-weight-asian="bold" style:font-weight-complex="bold"/>
    </style:style>
    <style:style style:name="P25" style:family="paragraph" style:parent-style-name="Text_20_body">
      <style:text-properties fo:font-weight="bold" officeooo:rsid="00d9c455" officeooo:paragraph-rsid="00ad4cce" style:font-weight-asian="bold" style:font-weight-complex="bold"/>
    </style:style>
    <style:style style:name="P26" style:family="paragraph" style:parent-style-name="Text_20_body">
      <style:text-properties fo:font-weight="bold" officeooo:rsid="00daf7b4" officeooo:paragraph-rsid="00ad4cce" style:font-weight-asian="bold" style:font-weight-complex="bold"/>
    </style:style>
    <style:style style:name="P27" style:family="paragraph" style:parent-style-name="Text_20_body">
      <style:text-properties fo:font-weight="normal" officeooo:rsid="00daf7b4" officeooo:paragraph-rsid="00ad4cce" style:font-weight-asian="normal" style:font-weight-complex="normal"/>
    </style:style>
    <style:style style:name="P28" style:family="paragraph" style:parent-style-name="Text_20_body">
      <style:text-properties fo:font-weight="bold" officeooo:rsid="00de2bf6" officeooo:paragraph-rsid="00ad4cce" style:font-weight-asian="bold" style:font-weight-complex="bold"/>
    </style:style>
    <style:style style:name="P29" style:family="paragraph" style:parent-style-name="Text_20_body">
      <style:text-properties fo:font-weight="bold" officeooo:rsid="012381bb" officeooo:paragraph-rsid="00ae297c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normal" officeooo:rsid="012381bb" officeooo:paragraph-rsid="00ae297c" style:font-weight-asian="normal" style:font-weight-complex="normal"/>
    </style:style>
    <style:style style:name="P31" style:family="paragraph" style:parent-style-name="Text_20_body">
      <style:paragraph-properties fo:text-align="left" style:justify-single-word="false"/>
      <style:text-properties fo:font-weight="normal" officeooo:rsid="012450b6" officeooo:paragraph-rsid="00ae297c" style:font-weight-asian="normal" style:font-weight-complex="normal"/>
    </style:style>
    <style:style style:name="P32" style:family="paragraph" style:parent-style-name="Text_20_body">
      <style:paragraph-properties fo:text-align="left" style:justify-single-word="false"/>
      <style:text-properties fo:font-weight="normal" officeooo:rsid="0127275d" officeooo:paragraph-rsid="00ae297c" style:font-weight-asian="normal" style:font-weight-complex="normal"/>
    </style:style>
    <style:style style:name="P33" style:family="paragraph" style:parent-style-name="Heading_20_1">
      <style:text-properties officeooo:paragraph-rsid="00ad4cce"/>
    </style:style>
    <style:style style:name="P34" style:family="paragraph" style:parent-style-name="Text_20_body">
      <style:text-properties officeooo:rsid="01276dc3" officeooo:paragraph-rsid="00ae297c"/>
    </style:style>
    <style:style style:name="P35" style:family="paragraph" style:parent-style-name="Text_20_body">
      <style:text-properties style:text-underline-style="none" fo:font-weight="normal" officeooo:rsid="01276dc3" officeooo:paragraph-rsid="00ae297c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1294c83" officeooo:paragraph-rsid="00ae297c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12a5579" officeooo:paragraph-rsid="00ae297c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12bfb2a" officeooo:paragraph-rsid="00ae297c" style:font-weight-asian="normal" style:font-weight-complex="normal"/>
    </style:style>
    <style:style style:name="P39" style:family="paragraph" style:parent-style-name="Text_20_body">
      <style:text-properties officeooo:rsid="012bfb2a" officeooo:paragraph-rsid="00ae297c"/>
    </style:style>
    <style:style style:name="P40" style:family="paragraph" style:parent-style-name="Text_20_body">
      <style:paragraph-properties fo:text-align="left" style:justify-single-word="false"/>
      <style:text-properties officeooo:rsid="012bfb2a" officeooo:paragraph-rsid="00ae297c"/>
    </style:style>
    <style:style style:name="P41" style:family="paragraph" style:parent-style-name="Text_20_body">
      <style:paragraph-properties fo:text-align="center" style:justify-single-word="false"/>
      <style:text-properties officeooo:rsid="012bfb2a" officeooo:paragraph-rsid="00ae297c"/>
    </style:style>
    <style:style style:name="P42" style:family="paragraph" style:parent-style-name="Text_20_body">
      <style:text-properties officeooo:rsid="00b7e00a" officeooo:paragraph-rsid="00ae29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bold" officeooo:rsid="002aae56" style:font-weight-asian="bold" style:font-weight-complex="bold"/>
    </style:style>
    <style:style style:name="T4" style:family="text">
      <style:text-properties fo:font-weight="normal" officeooo:rsid="002aae56" style:font-weight-asian="normal" style:font-weight-complex="normal"/>
    </style:style>
    <style:style style:name="T5" style:family="text">
      <style:text-properties officeooo:rsid="00b3977c"/>
    </style:style>
    <style:style style:name="T6" style:family="text">
      <style:text-properties officeooo:rsid="00ad4cce"/>
    </style:style>
    <style:style style:name="T7" style:family="text">
      <style:text-properties fo:font-weight="normal" officeooo:rsid="00d7e7f8" style:font-weight-asian="normal" style:font-weight-complex="normal"/>
    </style:style>
    <style:style style:name="T8" style:family="text">
      <style:text-properties fo:font-weight="bold" officeooo:rsid="00daf7b4" style:font-weight-asian="bold" style:font-weight-complex="bold"/>
    </style:style>
    <style:style style:name="T9" style:family="text">
      <style:text-properties fo:font-weight="normal" officeooo:rsid="00daf7b4" style:font-weight-asian="normal" style:font-weight-complex="normal"/>
    </style:style>
    <style:style style:name="T10" style:family="text">
      <style:text-properties officeooo:rsid="00dd07d5"/>
    </style:style>
    <style:style style:name="T11" style:family="text">
      <style:text-properties fo:font-weight="normal" officeooo:rsid="00de2bf6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officeooo:rsid="00ae297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s métriques et angulaires dans le triangle.</text:p>
      <text:h text:style-name="P2" text:outline-level="4">Rapport jury :</text:h>
      <text:p text:style-name="P3">La leçon « Relations métriques et angulaires dans le triangle « n’est pas spécifique au collège et doit conduire à s’interroger sur l’articulation entre les définitions proposées au collège et au lycée. Envisager le cas où un triangle possède un angle obtus dans la démonstration du théorème d’Al-Kashi pose des problèmes à de nombreux candidats. Le jury apprécie que les exemples proposés ne se limitent pas à une simple application rapide du cours.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/text:p>
      <text:p text:style-name="P7"/>
      <text:h text:style-name="P8" text:outline-level="1" text:is-list-header="true"><text:bookmark-start text:name="__DdeLink__7013_893668783"/><text:bookmark-start text:name="__DdeLink__7009_893668783"/>I/ Relations métriques<text:bookmark-end text:name="__DdeLink__7013_893668783"/><text:bookmark-end text:name="__DdeLink__7009_893668783"/></text:h>
      <text:p text:style-name="P9">On se place dans un plan euclidien.</text:p>
      <text:h text:style-name="P10" text:outline-level="2">a) Inégalités longueurs</text:h>
      <text:p text:style-name="P11">Propriété <text:span text:style-name="T1">: Dans un triangle, la longueur d’un côté est toujours inférieure à la somme des longueurs des autres côtés. Dans le cas d’un triangle ABC, on a :</text:span></text:p>
      <text:list text:style-name="L1">
        <text:list-item>
          <text:p text:style-name="P12"><draw:frame draw:style-name="fr1" draw:name="Object18" text:anchor-type="as-char" svg:y="-0.1492in" svg:width="0.9563in" svg:height="0.1854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2"><draw:frame draw:style-name="fr1" draw:name="Object19" text:anchor-type="as-char" svg:y="-0.1492in" svg:width="0.9563in" svg:height="0.1854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12"><draw:frame draw:style-name="fr1" draw:name="Object20" text:anchor-type="as-char" svg:y="-0.1492in" svg:width="0.9563in" svg:height="0.1854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p text:style-name="P13">Remarques :</text:p>
      <text:list text:style-name="L2">
        <text:list-item>
          <text:p text:style-name="P14">s’il y a égalité, les 3 points sont alignés, et le triangle est plat. </text:p>
        </text:list-item>
        <text:list-item>
          <text:p text:style-name="P14">Si ces inégalités ne sont pas vérifiées on dit que le triangle ABC n’est pas constructible.</text:p>
        </text:list-item>
      </text:list>
      <text:p text:style-name="P15">Démo :</text:p>
      <text:p text:style-name="P15">Cela revient à démontrer l’inégalité triangulaire. Pour tous vecteurs <draw:frame draw:style-name="fr1" draw:name="Object21" text:anchor-type="as-char" svg:y="-0.1492in" svg:width="0.2661in" svg:height="0.1854in" draw:z-index="40"><draw:object xlink:href="./Object 41" xlink:type="simple" xlink:show="embed" xlink:actuate="onLoad"/><draw:image xlink:href="./ObjectReplacements/Object 41" xlink:type="simple" xlink:show="embed" xlink:actuate="onLoad"/></draw:frame><text:s/>on a <draw:frame draw:style-name="fr1" draw:name="Object22" text:anchor-type="as-char" svg:y="-0.1492in" svg:width="1.1929in" svg:height="0.1937in" draw:z-index="41"><draw:object xlink:href="./Object 42" xlink:type="simple" xlink:show="embed" xlink:actuate="onLoad"/><draw:image xlink:href="./ObjectReplacements/Object 42" xlink:type="simple" xlink:show="embed" xlink:actuate="onLoad"/></draw:frame>. Comme on est dans un espace préhilbertien, on a (en notant <draw:frame draw:style-name="fr1" draw:name="Object24" text:anchor-type="as-char" svg:y="-0.1492in" svg:width="0.7465in" svg:height="0.1854in" draw:z-index="43"><draw:object xlink:href="./Object 44" xlink:type="simple" xlink:show="embed" xlink:actuate="onLoad"/><draw:image xlink:href="./ObjectReplacements/Object 44" xlink:type="simple" xlink:show="embed" xlink:actuate="onLoad"/></draw:frame>):</text:p>
      <text:p text:style-name="P16"><draw:frame draw:style-name="fr1" draw:name="Object23" text:anchor-type="as-char" svg:y="-0.1728in" svg:width="1.9866in" svg:height="0.2173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On a l’inégalité de cauchy-shwartz : <draw:frame draw:style-name="fr1" draw:name="Object25" text:anchor-type="as-char" svg:y="-0.1492in" svg:width="1.8008in" svg:height="0.1937in" draw:z-index="44"><draw:object xlink:href="./Object 45" xlink:type="simple" xlink:show="embed" xlink:actuate="onLoad"/><draw:image xlink:href="./ObjectReplacements/Object 45" xlink:type="simple" xlink:show="embed" xlink:actuate="onLoad"/></draw:frame>, <text:span text:style-name="T5">donc :</text:span></text:p>
      <text:p text:style-name="P18"><text:span text:style-name="T1"><draw:frame draw:style-name="fr1" draw:name="Object26" text:anchor-type="as-char" svg:y="-0.2634in" svg:width="3.239in" svg:height="0.42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h text:style-name="P10" text:outline-level="2">b) Théorème de Pythagore</text:h>
      <text:p text:style-name="P19">Preuve pdt scalaire. Et preuve graphique</text:p>
      <text:h text:style-name="P10" text:outline-level="2"><text:bookmark-start text:name="__DdeLink__7007_893668783"/>c) Théorème de thalès<text:bookmark-end text:name="__DdeLink__7007_893668783"/></text:h>
      <text:p text:style-name="P20"/>
      <text:h text:style-name="P10" text:outline-level="2">d) Théorème de la médiane</text:h>
      <text:p text:style-name="P20"/>
      <text:h text:style-name="P21" text:outline-level="1" text:is-list-header="true"><text:bookmark-start text:name="__DdeLink__7009_893668783 Copy 1"/><text:bookmark-start text:name="__DdeLink__7023_893668783"/>I<text:span text:style-name="T6">I</text:span>/ Relations <text:bookmark-end text:name="__DdeLink__7009_893668783 Copy 1"/><text:span text:style-name="T6">angulaires</text:span><text:bookmark-end text:name="__DdeLink__7023_893668783"/><text:span text:style-name="T6"> </text:span></text:h>
      <text:p text:style-name="P20"/>
      <text:h text:style-name="Heading_20_2" text:outline-level="2">a) Somme des angles</text:h>
      <text:p text:style-name="P19"/>
      <text:h text:style-name="P10" text:outline-level="2">b) Trigonométrie : rapport angle / métriques</text:h>
      <text:p text:style-name="P22">Définition <text:span text:style-name="T1">: Dans le triangle ABC rectangle en B, les rapports </text:span><text:span text:style-name="T1"><draw:frame draw:style-name="fr2" draw:name="Object1" text:anchor-type="as-char" svg:y="-0.2445in" svg:width="0.2752in" svg:height="0.395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</text:span><text:span text:style-name="T1"><draw:frame draw:style-name="fr2" draw:name="Object2" text:anchor-type="as-char" svg:y="-0.2445in" svg:width="0.2752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</text:span><text:span text:style-name="T1"><draw:frame draw:style-name="fr2" draw:name="Object3" text:anchor-type="as-char" svg:y="-0.2445in" svg:width="0.2638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s/>ne dépendent que de la mesure de l’angle </text:span><text:span text:style-name="T1"><draw:frame draw:style-name="fr2" draw:name="Object4" text:anchor-type="as-char" svg:y="-0.1693in" svg:width="0.1299in" svg:height="0.205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 Ces rapports sont respectivement appelés </text:span>cosinus, sinus, tangente <text:span text:style-name="T1"><text:s/>de l’angle </text:span><text:span text:style-name="T1"><draw:frame draw:style-name="fr2" draw:name="Object5" text:anchor-type="as-char" svg:y="-0.1693in" svg:width="0.1299in" svg:height="0.205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<text:s/>et notés </text:span><text:span text:style-name="T1"><draw:frame draw:style-name="fr2" draw:name="Object6" text:anchor-type="as-char" svg:y="-0.1693in" svg:width="1.2453in" svg:height="0.205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 :</text:span></text:p>
      <text:p text:style-name="P23"><text:tab/><draw:frame draw:style-name="fr2" draw:name="Object7" text:anchor-type="as-char" svg:y="-0.2445in" svg:width="1.7228in" svg:height="0.395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3"><text:tab/><draw:frame draw:style-name="fr2" draw:name="Object8" text:anchor-type="as-char" svg:y="-0.2445in" svg:width="1.6984in" svg:height="0.395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3"><text:tab/><draw:frame draw:style-name="fr2" draw:name="Object9" text:anchor-type="as-char" svg:y="-0.2445in" svg:width="1.5335in" svg:height="0.3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4">Démo <text:span text:style-name="T1">: La définition ne dépends en effet que de la mesure de langle et non des longueurs des cotés. Soit un triangle </text:span><text:span text:style-name="T1"><draw:frame draw:style-name="fr2" draw:name="Object10" text:anchor-type="as-char" svg:y="-0.1492in" svg:width="0.4937in" svg:height="0.185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rectangle en B, alors il est semblable (mêmes angles) à </text:span><text:span text:style-name="T1"><draw:frame draw:style-name="fr2" draw:name="Object11" text:anchor-type="as-char" svg:y="-0.1492in" svg:width="0.3437in" svg:height="0.185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</text:span><text:span text:style-name="T7">donc les rapports des longueurs sont les mêmes.</text:span></text:p>
      <text:p text:style-name="P25">Prop <text:span text:style-name="T1">: On a aussi </text:span><text:span text:style-name="T1"><draw:frame draw:style-name="fr2" draw:name="Object12" text:anchor-type="as-char" svg:y="-0.2646in" svg:width="0.9126in" svg:height="0.435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6">Prop <text:span text:style-name="T1">: Le cosinus et le sinus d’un angle aigu est compris entre 0 et 1.</text:span></text:p>
      <text:p text:style-name="P20"><text:span text:style-name="T8">Remarque </text:span><text:span text:style-name="T9">: La tangente d’un angle aigu est strictement positif.</text:span></text:p>
      <text:p text:style-name="P26">Prop <text:span text:style-name="T1">: Pour tout angle aigu </text:span><text:span text:style-name="T1"><draw:frame draw:style-name="fr2" draw:name="Object13" text:anchor-type="as-char" svg:y="-0.1693in" svg:width="0.1299in" svg:height="0.205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, </text:span><text:span text:style-name="T1"><draw:frame draw:style-name="fr2" draw:name="Object14" text:anchor-type="as-char" svg:y="-0.1728in" svg:width="1.4035in" svg:height="0.221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.</text:span></text:p>
      <text:p text:style-name="P27">Démo : <text:span text:style-name="T10">On </text:span><text:span text:style-name="T10"><draw:frame draw:style-name="fr2" draw:name="Object15" text:anchor-type="as-char" svg:y="-0.2681in" svg:width="2.3in" svg:height="0.442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<text:s/>par le théorème de pythagore.</text:span></text:p>
      <text:p text:style-name="P28">Prop <text:span text:style-name="T1">: On a </text:span><text:span text:style-name="T1"><draw:frame draw:style-name="fr2" draw:name="Object16" text:anchor-type="as-char" svg:y="-0.1528in" svg:width="1.3453in" svg:height="0.201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text:s/>et </text:span><text:span text:style-name="T1"><draw:frame draw:style-name="fr2" draw:name="Object17" text:anchor-type="as-char" svg:y="-0.1528in" svg:width="1.3453in" svg:height="0.201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<text:p text:style-name="P20"><text:span text:style-name="T11">Démo : Il suffit de construire un rectangle à partir du triangle rectangle.</text:span></text:p>
      <text:h text:style-name="Heading_20_2" text:outline-level="2"/>
      <text:p text:style-name="P19">- calcul dangles</text:p>
      <text:p text:style-name="P19">- calculs de longueurs</text:p>
      <text:h text:style-name="Heading_20_2" text:outline-level="2"><text:span text:style-name="T6">b</text:span><text:bookmark-start text:name="__DdeLink__7019_893668783"/>) Al-Kashi<text:bookmark-end text:name="__DdeLink__7019_893668783"/></text:h>
      <text:p text:style-name="P19"/>
      <text:h text:style-name="Heading_20_2" text:outline-level="2"><text:soft-page-break/><text:span text:style-name="T6">c</text:span>) 3 sinus</text:h>
      <text:p text:style-name="P29">Proposition <text:span text:style-name="T1">(loi des sinus) : Pour un triangle quelconque ABC, on a </text:span><text:span text:style-name="T1"><draw:frame draw:style-name="fr2" draw:name="Object160" text:anchor-type="as-char" svg:y="-0.2445in" svg:width="1.3071in" svg:height="0.395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.<text:line-break/>Démo : Soit H la base de la hauteur issue de C. On calcule l’aire de ABC : </text:span><text:span text:style-name="T1"><draw:frame draw:style-name="fr2" draw:name="Object161" text:anchor-type="as-char" svg:y="-0.2445in" svg:width="0.9819in" svg:height="0.395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, dans commme le triangle </text:span><text:span text:style-name="T1"><draw:frame draw:style-name="fr2" draw:name="Object162" text:anchor-type="as-char" svg:y="-0.1492in" svg:width="0.3626in" svg:height="0.185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<text:s/>est rectangle en H, on a : </text:span><text:span text:style-name="T1"><draw:frame draw:style-name="fr2" draw:name="Object163" text:anchor-type="as-char" svg:y="-0.2445in" svg:width="0.8953in" svg:height="0.395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<text:s/>donc on peut réccrire :</text:span></text:p>
      <text:p text:style-name="P30"><draw:frame draw:style-name="fr2" draw:name="Object164" text:anchor-type="as-char" svg:y="-0.2445in" svg:width="2.4811in" svg:height="0.395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1">De la même manière on trouve <draw:frame draw:style-name="fr2" draw:name="Object165" text:anchor-type="as-char" svg:y="-0.2445in" svg:width="1.5626in" svg:height="0.395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/>et <draw:frame draw:style-name="fr2" draw:name="Object166" text:anchor-type="as-char" svg:y="-0.2445in" svg:width="1.5846in" svg:height="0.395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32">En multipliant ces trois expressions par <draw:frame draw:style-name="fr2" draw:name="Object167" text:anchor-type="as-char" svg:y="-0.2445in" svg:width="1.0146in" svg:height="0.395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on obtient le résultat voulu.</text:p>
      <text:p text:style-name="P32"/>
      <text:h text:style-name="P33" text:outline-level="1"><text:bookmark-start text:name="__DdeLink__7009_893668783 Copy 1 Copy 1"/>II<text:span text:style-name="T6">I</text:span>/ <text:bookmark-end text:name="__DdeLink__7009_893668783 Copy 1 Copy 1"/><text:span text:style-name="T6">Applications</text:span></text:h>
      <text:p text:style-name="P20"/>
      <text:p text:style-name="P19">3 carrés</text:p>
      <text:p text:style-name="P19">aire max rectangle inscrit</text:p>
      <text:p text:style-name="P19"/>
      <text:p text:style-name="P34"><text:span text:style-name="T12">Conséquence</text:span> (Forumes de héron) : <text:span text:style-name="T13">Dans le triangle ABC, on note </text:span><text:span text:style-name="T13"><draw:frame draw:style-name="fr3" draw:name="Objet206" text:anchor-type="as-char" svg:width="2.7362in" svg:height="0.393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,</text:span></text:p>
      <text:p text:style-name="P35"><text:span text:style-name="T14">Preuve : </text:span>On a vu précédemment (loi des sinus) que <text:s/><draw:frame draw:style-name="fr2" draw:name="Object168" text:anchor-type="as-char" svg:y="-0.2445in" svg:width="1.5098in" svg:height="0.3953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35">Par Al-Kashi, <draw:frame draw:style-name="fr3" draw:name="Objet207" text:anchor-type="as-char" svg:width="1.5965in" svg:height="0.2083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donc <draw:frame draw:style-name="fr2" draw:name="Objet209" text:anchor-type="as-char" svg:y="-0.2681in" svg:width="1.3634in" svg:height="0.418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35"><draw:frame draw:style-name="fr2" draw:name="Object169" text:anchor-type="as-char" svg:y="-0.1728in" svg:width="2.9992in" svg:height="0.2217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p text:style-name="P36">Or <draw:frame draw:style-name="fr2" draw:name="Object191" text:anchor-type="as-char" svg:y="-0.2681in" svg:width="2.8575in" svg:height="0.418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7">De plus, <draw:frame draw:style-name="fr2" draw:name="Object192" text:anchor-type="as-char" svg:y="-0.2681in" svg:width="6.2827in" svg:height="0.418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8">Donc <draw:frame draw:style-name="fr2" draw:name="Object193" text:anchor-type="as-char" svg:y="-0.2602in" svg:width="1.4272in" svg:height="0.41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9">De même on montre <draw:frame draw:style-name="fr3" draw:name="Objet212" text:anchor-type="as-char" svg:width="1.8484in" svg:height="0.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. Donc <draw:frame draw:style-name="fr2" draw:name="Object194" text:anchor-type="as-char" svg:y="-0.2602in" svg:width="2.3228in" svg:height="0.41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<text:p text:style-name="P40"><text:soft-page-break/>Donc <draw:frame draw:style-name="fr2" draw:name="Object195" text:anchor-type="as-char" svg:y="-0.2752in" svg:width="2.2457in" svg:height="0.425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, donc l’aire du triangle est :</text:p>
      <text:p text:style-name="P41"><draw:frame draw:style-name="fr2" draw:name="Object196" text:anchor-type="as-char" svg:y="-0.2445in" svg:width="2.4346in" svg:height="0.3953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2"/>
      <text:p text:style-name="P35"/>
      <text:p text:style-name="P19">mesure terre</text:p>
      <text:p text:style-name="P19">paralla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2.2$Linux_X86_64 LibreOffice_project/b9471b3c5a2111cbbaf29a51d1151c2156d577ad</meta:generator>
    <dc:date>2026-04-27T17:31:07.893650861</dc:date>
    <meta:editing-duration>PT23H53M41S</meta:editing-duration>
    <meta:editing-cycles>110</meta:editing-cycles>
    <meta:document-statistic meta:table-count="0" meta:image-count="0" meta:object-count="46" meta:page-count="5" meta:paragraph-count="63" meta:word-count="546" meta:character-count="2934" meta:non-whitespace-character-count="2422"/>
  </office:meta>
</office:document-meta>
</file>

<file path=Object 1/content.xml><?xml version="1.0" encoding="utf-8"?>
<math xmlns="http://www.w3.org/1998/Math/MathML" display="block">
  <semantics>
    <mfrac>
      <mi mathvariant="italic">AB</mi>
      <mi mathvariant="italic">AC</mi>
    </mfrac>
    <annotation encoding="StarMath 5.0">AB over AC</annotation>
  </semantics>
</math>
</file>

<file path=Object 10/content.xml><?xml version="1.0" encoding="utf-8"?>
<math xmlns="http://www.w3.org/1998/Math/MathML" display="block">
  <semantics>
    <mrow>
      <mi mathvariant="italic">AB</mi>
      <mi>'</mi>
      <mi>C</mi>
      <mi>'</mi>
    </mrow>
    <annotation encoding="StarMath 5.0">AB'C'</annotation>
  </semantics>
</math>
</file>

<file path=Object 11/content.xml><?xml version="1.0" encoding="utf-8"?>
<math xmlns="http://www.w3.org/1998/Math/MathML" display="block">
  <semantics>
    <mi mathvariant="italic">ABC</mi>
    <annotation encoding="StarMath 5.0">ABC</annotation>
  </semantics>
</math>
</file>

<file path=Object 12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row>
            <mi>sin</mi>
            <mover accent="true">
              <mi>A</mi>
              <mo stretchy="false">^</mo>
            </mover>
          </mrow>
          <mrow>
            <mi>cos</mi>
            <mover accent="true">
              <mi>A</mi>
              <mo stretchy="false">^</mo>
            </mover>
          </mrow>
        </mfrac>
      </mrow>
    </mrow>
    <annotation encoding="StarMath 5.0">tan hat A = {sin hat A} over {cos hat A}</annotation>
  </semantics>
</math>
</file>

<file path=Object 13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14/content.xml><?xml version="1.0" encoding="utf-8"?>
<math xmlns="http://www.w3.org/1998/Math/MathML" display="block">
  <semantics>
    <mrow>
      <msup>
        <mi>cos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+</mo>
        <msup>
          <mi>sin</mi>
          <mn>2</mn>
        </msup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n>1</mn>
      </mrow>
    </mrow>
    <annotation encoding="StarMath 5.0">cos^2(hat A) + sin^2(hat A) = 1</annotation>
  </semantics>
</math>
</file>

<file path=Object 15/content.xml><?xml version="1.0" encoding="utf-8"?>
<math xmlns="http://www.w3.org/1998/Math/MathML" display="block">
  <semantics>
    <mrow>
      <mrow>
        <mfrac>
          <msup>
            <mi mathvariant="italic">AB</mi>
            <mn>2</mn>
          </msup>
          <msup>
            <mi mathvariant="italic">AC</mi>
            <mn>2</mn>
          </msup>
        </mfrac>
        <mo stretchy="false">+</mo>
        <mfrac>
          <msup>
            <mi mathvariant="italic">BC</mi>
            <mn>2</mn>
          </msup>
          <msup>
            <mi mathvariant="italic">AC</mi>
            <mn>2</mn>
          </msup>
        </mfrac>
      </mrow>
      <mo stretchy="false">=</mo>
      <mfrac>
        <mrow>
          <msup>
            <mi mathvariant="italic">AB</mi>
            <mn>2</mn>
          </msup>
          <mo stretchy="false">+</mo>
          <msup>
            <mi mathvariant="italic">BC</mi>
            <mn>2</mn>
          </msup>
        </mrow>
        <msup>
          <mi mathvariant="italic">AC</mi>
          <mn>2</mn>
        </msup>
      </mfrac>
      <mo stretchy="false">=</mo>
      <mfrac>
        <msup>
          <mi mathvariant="italic">BC</mi>
          <mn>2</mn>
        </msup>
        <msup>
          <mi mathvariant="italic">BC</mi>
          <mn>2</mn>
        </msup>
      </mfrac>
      <mo stretchy="false">=</mo>
      <mn>1</mn>
    </mrow>
    <annotation encoding="StarMath 5.0">AB^2 over AC^2 + BC^2 over AC^2 = {AB^2 + BC^2} over AC^2 = BC^2 over BC^2 = 1</annotation>
  </semantics>
</math>
</file>

<file path=Object 1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</mrow>
    <annotation encoding="StarMath 5.0">cos(90 -x) = sin(x)</annotation>
  </semantics>
</math>
</file>

<file path=Object 1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(90-x) = cos(x)</annotation>
  </semantics>
</math>
</file>

<file path=Object 18/content.xml><?xml version="1.0" encoding="utf-8"?>
<math xmlns="http://www.w3.org/1998/Math/MathML" display="block">
  <semantics>
    <mrow>
      <mfrac>
        <mrow>
          <mi>sin</mi>
          <mi>a</mi>
        </mrow>
        <mi mathvariant="italic">BC</mi>
      </mfrac>
      <mo stretchy="false">=</mo>
      <mfrac>
        <mrow>
          <mi>sin</mi>
          <mi>b</mi>
        </mrow>
        <mi mathvariant="italic">AC</mi>
      </mfrac>
      <mo stretchy="false">=</mo>
      <mfrac>
        <mrow>
          <mi>sin</mi>
          <mi>c</mi>
        </mrow>
        <mi mathvariant="italic">AB</mi>
      </mfrac>
    </mrow>
    <annotation encoding="StarMath 5.0">{sin a} over BC = {sin b} over AC = {sin c} over AB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CH</mi>
      </mrow>
    </mrow>
    <annotation encoding="StarMath 5.0">a= 1 over 2 AB times CH</annotation>
  </semantics>
</math>
</file>

<file path=Object 2/content.xml><?xml version="1.0" encoding="utf-8"?>
<math xmlns="http://www.w3.org/1998/Math/MathML" display="block">
  <semantics>
    <mfrac>
      <mi mathvariant="italic">BC</mi>
      <mi mathvariant="italic">AC</mi>
    </mfrac>
    <annotation encoding="StarMath 5.0">BC over AC</annotation>
  </semantics>
</math>
</file>

<file path=Object 20/content.xml><?xml version="1.0" encoding="utf-8"?>
<math xmlns="http://www.w3.org/1998/Math/MathML" display="block">
  <semantics>
    <mi mathvariant="italic">AHC</mi>
    <annotation encoding="StarMath 5.0">AHC</annotation>
  </semantics>
</math>
</file>

<file path=Object 21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i mathvariant="italic">HC</mi>
          <mi mathvariant="italic">AC</mi>
        </mfrac>
      </mrow>
    </mrow>
    <annotation encoding="StarMath 5.0">sin(hat A) = HC over AC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row>
          <mi mathvariant="italic">AB</mi>
          <mo stretchy="false">×</mo>
          <mi mathvariant="italic">CH</mi>
        </mrow>
        <mo stretchy="false">=</mo>
        <mfrac>
          <mn>1</mn>
          <mn>2</mn>
        </mfrac>
      </mrow>
      <mrow>
        <mi mathvariant="italic">AB</mi>
        <mo stretchy="false">×</mo>
        <mi mathvariant="italic">AC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= 1 over 2 AB times CH = 1 over 2 AB  times AC times sin(hat A)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B</mi>
            <mo stretchy="false">^</mo>
          </mover>
        </mrow>
        <mo fence="true" form="postfix" stretchy="false">)</mo>
      </mrow>
    </mrow>
    <annotation encoding="StarMath 5.0">a= 1 over 2 AB  times BC times sin(hat B)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C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C</mi>
            <mo stretchy="false">^</mo>
          </mover>
        </mrow>
        <mo fence="true" form="postfix" stretchy="false">)</mo>
      </mrow>
    </mrow>
    <annotation encoding="StarMath 5.0">a= 1 over 2 AC times BC times sin(hat C)</annotation>
  </semantics>
</math>
</file>

<file path=Object 25/content.xml><?xml version="1.0" encoding="utf-8"?>
<math xmlns="http://www.w3.org/1998/Math/MathML" display="block">
  <semantics>
    <mfrac>
      <mn>2</mn>
      <mrow>
        <mi mathvariant="italic">AB</mi>
        <mo stretchy="false">×</mo>
        <mi mathvariant="italic">AC</mi>
        <mo stretchy="false">×</mo>
        <mi mathvariant="italic">BC</mi>
      </mrow>
    </mfrac>
    <annotation encoding="StarMath 5.0">2 over {AB times AC times BC}</annotation>
  </semantics>
</math>
</file>

<file path=Object 26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n>1</mn>
          <mo stretchy="false">−</mo>
          <msup>
            <mi>cos</mi>
            <mn>2</mn>
          </msup>
        </mrow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over accent="true">
                <mi>A</mi>
                <mo stretchy="false">^</mo>
              </mover>
            </mrow>
          </mrow>
          <mo fence="true" form="postfix" stretchy="false">)</mo>
        </mrow>
      </mrow>
      <mrow>
        <mo fence="true" form="prefix" stretchy="false">(</mo>
        <mrow>
          <mrow>
            <mrow>
              <mn>1</mn>
              <mo stretchy="false">+</mo>
              <mi>cos</mi>
            </mrow>
            <mover accent="true">
              <mi>A</mi>
              <mo stretchy="false">^</mo>
            </mover>
          </mrow>
        </mrow>
        <mo fence="true" form="postfix" stretchy="false">)</mo>
      </mrow>
    </mrow>
    <annotation encoding="StarMath 5.0">sin^2(hat A) = 1 - cos^2(hat A) = (1- cos hat A) (1 + cos hat A)</annotation>
  </semantics>
</math>
</file>

<file path=Object 27/content.xml><?xml version="1.0" encoding="utf-8"?>
<math xmlns="http://www.w3.org/1998/Math/MathML">
  <semantics>
    <mrow>
      <mrow>
        <mi>a</mi>
        <mo stretchy="false">=</mo>
        <mi mathvariant="italic">BC</mi>
      </mrow>
      <mi>;</mi>
      <mrow>
        <mi>b</mi>
        <mo stretchy="false">=</mo>
        <mi mathvariant="italic">AC</mi>
      </mrow>
      <mi>;</mi>
      <mrow>
        <mi>c</mi>
        <mo stretchy="false">=</mo>
        <mi mathvariant="italic">AB</mi>
      </mrow>
      <mtext> et </mtext>
      <mrow>
        <mi>p</mi>
        <mo stretchy="false">=</mo>
        <mfrac>
          <mrow>
            <mrow>
              <mrow>
                <mi>a</mi>
                <mo stretchy="false">+</mo>
                <mi>b</mi>
              </mrow>
              <mo stretchy="false">+</mo>
              <mi>c</mi>
            </mrow>
          </mrow>
          <mn>2</mn>
        </mfrac>
      </mrow>
    </mrow>
    <annotation encoding="StarMath 5.0">a=BC ; b=AC; c=AB " et " p = {a+b+c} over 2</annotation>
  </semantics>
</math>
</file>

<file path=Object 28/content.xml><?xml version="1.0" encoding="utf-8"?>
<math xmlns="http://www.w3.org/1998/Math/MathML" display="block">
  <semantics>
    <mrow>
      <mrow>
        <mi mathvariant="italic">Aire</mi>
        <mo stretchy="false">=</mo>
        <mfrac>
          <mn>1</mn>
          <mn>2</mn>
        </mfrac>
      </mrow>
      <mrow>
        <mi>c</mi>
        <mo stretchy="false">×</mo>
        <mi>b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ire = 1 over 2 c times b times sin( hat A )</annotation>
  </semantics>
</math>
</file>

<file path=Object 29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</mn>
        </mrow>
      </mrow>
      <mi>b</mi>
      <mi>c</mi>
      <mi>cos</mi>
      <mi>Â</mi>
    </mrow>
    <annotation encoding="StarMath 5.0">a^2 = b^2 + c^2 - 2 b c cos Â</annotation>
  </semantics>
</math>
</file>

<file path=Object 3/content.xml><?xml version="1.0" encoding="utf-8"?>
<math xmlns="http://www.w3.org/1998/Math/MathML" display="block">
  <semantics>
    <mfrac>
      <mi mathvariant="italic">BC</mi>
      <mi mathvariant="italic">AB</mi>
    </mfrac>
    <annotation encoding="StarMath 5.0">BC over AB</annotation>
  </semantics>
</math>
</file>

<file path=Object 30/content.xml><?xml version="1.0" encoding="utf-8"?>
<math xmlns="http://www.w3.org/1998/Math/MathML" display="block">
  <semantics>
    <mrow>
      <mi>cos</mi>
      <mrow>
        <mi>Â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>b</mi>
            <mi>c</mi>
          </mrow>
        </mfrac>
      </mrow>
    </mrow>
    <annotation encoding="StarMath 5.0">cos Â = {b^2 + c^2 - a^2} over {2 b c}</annotation>
  </semantics>
</math>
</file>

<file path=Object 31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row>
          <mn>1</mn>
          <mo stretchy="false">+</mo>
          <mfrac>
            <mrow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  <mrow>
              <mn>2</mn>
              <mi>b</mi>
              <mi>c</mi>
            </mrow>
          </mfrac>
        </mrow>
        <mo stretchy="false">=</mo>
        <mfrac>
          <mrow>
            <mn>2</mn>
            <mrow>
              <mi mathvariant="italic">bc</mi>
              <mo stretchy="false">+</mo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</mrow>
          <mrow>
            <mn>2</mn>
            <mi>b</mi>
            <mi>c</mi>
          </mrow>
        </mfrac>
      </mrow>
    </mrow>
    <annotation encoding="StarMath 5.0">1 + cos hat A = 1 + {b^2 + c^2 - a^2} over {2 b c} = {2bc + b^2 + c^2 - a^2} over {2 b c}</annotation>
  </semantics>
</math>
</file>

<file path=Object 32/content.xml><?xml version="1.0" encoding="utf-8"?>
<math xmlns="http://www.w3.org/1998/Math/MathML" display="block">
  <semantics>
    <mrow>
      <mn>2</mn>
      <mi>p</mi>
      <mrow>
        <mrow>
          <mo fence="true" form="prefix" stretchy="false">(</mo>
          <mrow>
            <mrow>
              <mi>p</mi>
              <mo stretchy="false">−</mo>
              <mi>a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</mrow>
          </mrow>
          <mo fence="true" form="postfix" stretchy="false">)</mo>
        </mrow>
      </mrow>
      <mrow>
        <mfrac>
          <mrow>
            <mo fence="true" form="prefix" stretchy="false">(</mo>
            <mrow>
              <mrow>
                <mrow>
                  <mo stretchy="false">−</mo>
                  <mi>a</mi>
                </mrow>
                <mo stretchy="false">+</mo>
                <mi>b</mi>
                <mo stretchy="false">+</mo>
                <mi>c</mi>
              </mrow>
            </mrow>
            <mo fence="true" form="postfix" stretchy="false">)</mo>
          </mrow>
          <mn>2</mn>
        </mfrac>
        <mo stretchy="false">=</mo>
        <mfrac>
          <mrow>
            <mrow>
              <mo stretchy="false">−</mo>
              <msup>
                <mi>a</mi>
                <mn>2</mn>
              </msup>
            </mrow>
            <mo stretchy="false">+</mo>
            <mi mathvariant="italic">ab</mi>
            <mo stretchy="false">+</mo>
            <mi mathvariant="italic">ac</mi>
            <mo stretchy="false">−</mo>
            <mi mathvariant="italic">ba</mi>
            <mo stretchy="false">+</mo>
            <mi mathvariant="italic">bb</mi>
            <mo stretchy="false">+</mo>
            <msup>
              <mi>b</mi>
              <mn>2</mn>
            </msup>
            <mo stretchy="false">−</mo>
            <mi mathvariant="italic">ca</mi>
            <mo stretchy="false">+</mo>
            <mi mathvariant="italic">bc</mi>
            <mo stretchy="false">+</mo>
            <msup>
              <mi>c</mi>
              <mn>2</mn>
            </msup>
          </mrow>
          <mn>2</mn>
        </mfrac>
        <mo stretchy="false">=</mo>
        <mfrac>
          <mrow>
            <mrow>
              <mrow>
                <mo stretchy="false">−</mo>
                <msup>
                  <mi>a</mi>
                  <mn>2</mn>
                </msup>
              </mrow>
              <mo stretchy="false">+</mo>
              <msup>
                <mi>b</mi>
                <mn>2</mn>
              </msup>
              <mo stretchy="false">+</mo>
              <mn>2</mn>
            </mrow>
            <mrow>
              <mi mathvariant="italic">bc</mi>
              <mo stretchy="false">+</mo>
              <msup>
                <mi>c</mi>
                <mn>2</mn>
              </msup>
            </mrow>
          </mrow>
          <mn>2</mn>
        </mfrac>
      </mrow>
    </mrow>
    <annotation encoding="StarMath 5.0">2p(p-a) = (a+b+c)(-a+b+c) over 2 = {-a^2 + ab + ac -ba + bb + b^2 -ca + bc + c^2} over 2 = {-a^2 + b^2 + 2bc + c^2} over 2</annotation>
  </semantics>
</math>
</file>

<file path=Object 33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frac>
          <mrow>
            <mn>2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1+ cos hat A = {2p ( p-a )} over bc</annotation>
  </semantics>
</math>
</file>

<file path=Object 34/content.xml><?xml version="1.0" encoding="utf-8"?>
<math xmlns="http://www.w3.org/1998/Math/MathML">
  <semantics>
    <mrow>
      <mrow>
        <mn>1</mn>
        <mo stretchy="false">−</mo>
        <mi>cos</mi>
      </mrow>
      <mrow>
        <mi>Â</mi>
        <mo stretchy="false">=</mo>
        <mfrac>
          <mrow>
            <mn>2</mn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  <mi mathvariant="italic">bc</mi>
        </mfrac>
      </mrow>
    </mrow>
    <annotation encoding="StarMath 5.0">1-cos Â = {2(p-b)(p-c)} over bc</annotation>
  </semantics>
</math>
</file>

<file path=Object 35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row>
            <mn>4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sin^2(hat A) = {4p (p - a) (p - b) (p- c)} over bc</annotation>
  </semantics>
</math>
</file>

<file path=Object 36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n>2</mn>
      </mrow>
      <mfrac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  <mi mathvariant="italic">bc</mi>
      </mfrac>
    </mrow>
    <annotation encoding="StarMath 5.0">sin hat A = 2 {sqrt {p (p-a) (p-b) (p-c) }} over bc</annotation>
  </semantics>
</math>
</file>

<file path=Object 37/content.xml><?xml version="1.0" encoding="utf-8"?>
<math xmlns="http://www.w3.org/1998/Math/MathML" display="block">
  <semantics>
    <mrow>
      <mfrac>
        <mn>1</mn>
        <mn>2</mn>
      </mfrac>
      <mi mathvariant="italic">bc</mi>
      <mi>sin</mi>
      <mrow>
        <mover accent="true">
          <mi>A</mi>
          <mo stretchy="false">^</mo>
        </mover>
        <mo stretchy="false">=</mo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</mrow>
    </mrow>
    <annotation encoding="StarMath 5.0">1 over 2 bc sin hat A = {sqrt {p (p-a) (p-b) (p-c)}}</annotation>
  </semantics>
</math>
</file>

<file path=Object 38/content.xml><?xml version="1.0" encoding="utf-8"?>
<math xmlns="http://www.w3.org/1998/Math/MathML" display="block">
  <semantics>
    <mrow>
      <mi mathvariant="italic">AC</mi>
      <mo stretchy="false">≤</mo>
      <mrow>
        <mi mathvariant="italic">AB</mi>
        <mo stretchy="false">+</mo>
        <mi mathvariant="italic">BC</mi>
      </mrow>
    </mrow>
    <annotation encoding="StarMath 5.0">AC&lt;=AB + BC</annotation>
  </semantics>
</math>
</file>

<file path=Object 39/content.xml><?xml version="1.0" encoding="utf-8"?>
<math xmlns="http://www.w3.org/1998/Math/MathML" display="block">
  <semantics>
    <mrow>
      <mi mathvariant="italic">AB</mi>
      <mo stretchy="false">≤</mo>
      <mrow>
        <mi mathvariant="italic">BC</mi>
        <mo stretchy="false">+</mo>
        <mi mathvariant="italic">AC</mi>
      </mrow>
    </mrow>
    <annotation encoding="StarMath 5.0">AB &lt;= BC + AC 
</annotation>
  </semantics>
</math>
</file>

<file path=Object 4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40/content.xml><?xml version="1.0" encoding="utf-8"?>
<math xmlns="http://www.w3.org/1998/Math/MathML" display="block">
  <semantics>
    <mrow>
      <mi mathvariant="italic">BC</mi>
      <mo stretchy="false">≤</mo>
      <mrow>
        <mi mathvariant="italic">AC</mi>
        <mo stretchy="false">+</mo>
        <mi mathvariant="italic">AB</mi>
      </mrow>
    </mrow>
    <annotation encoding="StarMath 5.0">BC &lt;= AC + AB
</annotation>
  </semantics>
</math>
</file>

<file path=Object 41/content.xml><?xml version="1.0" encoding="utf-8"?>
<math xmlns="http://www.w3.org/1998/Math/MathML" display="block">
  <semantics>
    <mrow>
      <mover accent="true">
        <mi>u</mi>
        <mo stretchy="false">⃗</mo>
      </mover>
      <mi>,</mi>
      <mover accent="true">
        <mi>v</mi>
        <mo stretchy="false">⃗</mo>
      </mover>
    </mrow>
    <annotation encoding="StarMath 5.0">vec u , vec v</annotation>
  </semantics>
</math>
</file>

<file path=Object 42/content.xml><?xml version="1.0" encoding="utf-8"?>
<math xmlns="http://www.w3.org/1998/Math/MathML" display="block">
  <semantics>
    <mrow>
      <mrow>
        <mo fence="true" form="prefix" stretchy="false">‖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false">⃗</mo>
            </mover>
          </mrow>
        </mrow>
        <mo fence="true" form="postfix" stretchy="false">‖</mo>
      </mrow>
      <mo stretchy="false">≤</mo>
      <mrow>
        <mrow>
          <mo fence="true" form="prefix" stretchy="false">‖</mo>
          <mrow>
            <mover accent="true">
              <mi>u</mi>
              <mo stretchy="false">⃗</mo>
            </mover>
          </mrow>
          <mo fence="true" form="postfix" stretchy="false">‖</mo>
        </mrow>
        <mo stretchy="false">+</mo>
        <mrow>
          <mo fence="true" form="prefix" stretchy="false">‖</mo>
          <mrow>
            <mover accent="true">
              <mi>v</mi>
              <mo stretchy="false">⃗</mo>
            </mover>
          </mrow>
          <mo fence="true" form="postfix" stretchy="false">‖</mo>
        </mrow>
      </mrow>
    </mrow>
    <annotation encoding="StarMath 5.0">ldline vec u + vec v rdline &lt;= ldline vec u rdline + ldline vec v rdline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form="prefix" stretchy="false">‖</mo>
            <mrow>
              <mrow>
                <mi>x</mi>
                <mo stretchy="false">+</mo>
                <mi>y</mi>
              </mrow>
            </mrow>
            <mo fence="true" form="postfix" stretchy="false">‖</mo>
          </mrow>
          <mn>2</mn>
        </msup>
        <mo stretchy="false">=</mo>
        <mrow>
          <msup>
            <mrow>
              <mo fence="true" form="prefix" stretchy="false">‖</mo>
              <mrow>
                <mi>x</mi>
              </mrow>
              <mo fence="true" form="postfix" stretchy="false">‖</mo>
            </mrow>
            <mn>2</mn>
          </msup>
          <mo stretchy="false">+</mo>
          <msup>
            <mrow>
              <mo fence="true" form="prefix" stretchy="false">‖</mo>
              <mrow>
                <mi>y</mi>
              </mrow>
              <mo fence="true" form="postfix" stretchy="false">‖</mo>
            </mrow>
            <mn>2</mn>
          </msup>
          <mo stretchy="false">+</mo>
          <mn>2</mn>
        </mrow>
      </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</mrow>
    <annotation encoding="StarMath 5.0">ldline x + y rdline^2 = ldline x rdline^2 + ldline y rdline^2 + 2langle x, y rangle</annotation>
  </semantics>
</math>
</file>

<file path=Object 44/content.xml><?xml version="1.0" encoding="utf-8"?>
<math xmlns="http://www.w3.org/1998/Math/MathML" display="block">
  <semantics>
    <mrow>
      <mrow>
        <mi>x</mi>
        <mo stretchy="false">=</mo>
        <mover accent="true">
          <mi>u</mi>
          <mo stretchy="false">⃗</mo>
        </mover>
      </mrow>
      <mi>,</mi>
      <mrow>
        <mi>y</mi>
        <mo stretchy="false">=</mo>
        <mover accent="true">
          <mi>v</mi>
          <mo stretchy="false">⃗</mo>
        </mover>
      </mrow>
    </mrow>
    <annotation encoding="StarMath 5.0">x=vec u, y = vec v</annotation>
  </semantics>
</math>
</file>

<file path=Object 45/content.xml><?xml version="1.0" encoding="utf-8"?>
<math xmlns="http://www.w3.org/1998/Math/MathML" display="block">
  <semantics>
    <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  <mo stretchy="false">≤</mo>
      <mrow>
        <mo fence="true" form="prefix" stretchy="true">|</mo>
        <mrow>
          <mrow>
            <mo fence="true" form="prefix" stretchy="false">⟨</mo>
            <mrow>
              <mrow>
                <mi>x</mi>
                <mi>,</mi>
                <mi>y</mi>
              </mrow>
            </mrow>
            <mo fence="true" form="postfix" stretchy="false">⟩</mo>
          </mrow>
        </mrow>
        <mo fence="true" form="postfix" stretchy="true">|</mo>
      </mrow>
      <mo stretchy="false">≤</mo>
      <mrow>
        <mrow>
          <mo fence="true" form="prefix" stretchy="false">‖</mo>
          <mrow>
            <mi>x</mi>
          </mrow>
          <mo fence="true" form="postfix" stretchy="false">‖</mo>
        </mrow>
        <mo stretchy="false">×</mo>
        <mrow>
          <mo fence="true" form="prefix" stretchy="false">‖</mo>
          <mrow>
            <mi>y</mi>
          </mrow>
          <mo fence="true" form="postfix" stretchy="false">‖</mo>
        </mrow>
      </mrow>
    </mrow>
    <annotation encoding="StarMath 5.0">langle x, y rangle &lt;= abs langle x, y rangle &lt;= ldline x rdline times ldline y rdline</annotation>
  </semantics>
</math>
</file>

<file path=Object 46/content.xml><?xml version="1.0" encoding="utf-8"?>
<math xmlns="http://www.w3.org/1998/Math/MathML" display="block">
  <semantics>
    <mtable>
      <mtr>
        <mtd>
          <mrow/>
        </mtd>
        <mtd>
          <mrow>
            <mrow>
              <msup>
                <mrow>
                  <mo fence="true" form="prefix" stretchy="false">‖</mo>
                  <mrow>
                    <mrow>
                      <mi>x</mi>
                      <mo stretchy="false">+</mo>
                      <mi>y</mi>
                    </mrow>
                  </mrow>
                  <mo fence="true" form="postfix" stretchy="false">‖</mo>
                </mrow>
                <mn>2</mn>
              </msup>
              <mo stretchy="false">≤</mo>
              <mrow>
                <msup>
                  <mrow>
                    <mo fence="true" form="prefix" stretchy="false">‖</mo>
                    <mrow>
                      <mi>x</mi>
                    </mrow>
                    <mo fence="true" form="postfix" stretchy="false">‖</mo>
                  </mrow>
                  <mn>2</mn>
                </msup>
                <mo stretchy="false">+</mo>
                <msup>
                  <mrow>
                    <mo fence="true" form="prefix" stretchy="false">‖</mo>
                    <mrow>
                      <mi>y</mi>
                    </mrow>
                    <mo fence="true" form="postfix" stretchy="false">‖</mo>
                  </mrow>
                  <mn>2</mn>
                </msup>
                <mo stretchy="false">+</mo>
                <mn>2</mn>
              </mrow>
            </mrow>
            <mrow>
              <mo fence="true" form="prefix" stretchy="false">‖</mo>
              <mrow>
                <mi>x</mi>
              </mrow>
              <mo fence="true" form="postfix" stretchy="false">‖</mo>
            </mrow>
            <mrow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  <mo stretchy="false">=</mo>
              <msup>
                <mrow>
                  <mo fence="true" form="prefix" stretchy="false">(</mo>
                  <mrow>
                    <mrow>
                      <mrow>
                        <mo fence="true" form="prefix" stretchy="false">‖</mo>
                        <mrow>
                          <mi>x</mi>
                        </mrow>
                        <mo fence="true" form="postfix" stretchy="false">‖</mo>
                      </mrow>
                      <mo stretchy="false">+</mo>
                      <mrow>
                        <mo fence="true" form="prefix" stretchy="false">‖</mo>
                        <mrow>
                          <mi>y</mi>
                        </mrow>
                        <mo fence="true" form="postfix" stretchy="false">‖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o stretchy="false">⇔</mo>
        </mtd>
        <mtd>
          <mrow>
            <mrow>
              <mo fence="true" form="prefix" stretchy="false">‖</mo>
              <mrow>
                <mrow>
                  <mi>x</mi>
                  <mo stretchy="false">+</mo>
                  <mi>y</mi>
                </mrow>
              </mrow>
              <mo fence="true" form="postfix" stretchy="false">‖</mo>
            </mrow>
            <mo stretchy="false">≤</mo>
            <mrow>
              <mrow>
                <mo fence="true" form="prefix" stretchy="false">‖</mo>
                <mrow>
                  <mi>x</mi>
                </mrow>
                <mo fence="true" form="postfix" stretchy="false">‖</mo>
              </mrow>
              <mo stretchy="false">+</mo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</mrow>
          </mrow>
        </mtd>
      </mtr>
    </mtable>
    <annotation encoding="StarMath 5.0">matrix {
{} # ldline x + y rdline^2 &lt;= ldline x rdline^2 + ldline y rdline^2 + 2ldline x rdline ldline y rdline = (ldline x rdline + ldline y rdline)^2##
dlrarrow #ldline x + y rdline &lt;= ldline x rdline + ldline y rdline
}</annotation>
  </semantics>
</math>
</file>

<file path=Object 5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6/content.xml><?xml version="1.0" encoding="utf-8"?>
<math xmlns="http://www.w3.org/1998/Math/MathML" display="block">
  <semantics>
    <mrow>
      <mi>cos</mi>
      <mover accent="true">
        <mi>A</mi>
        <mo stretchy="false">^</mo>
      </mover>
      <mi>,</mi>
      <mi>sin</mi>
      <mover accent="true">
        <mi>A</mi>
        <mo stretchy="false">^</mo>
      </mover>
      <mi>,</mi>
      <mi>tan</mi>
      <mover accent="true">
        <mi>A</mi>
        <mo stretchy="false">^</mo>
      </mover>
    </mrow>
    <annotation encoding="StarMath 5.0">cos hat A, sin hat A, tan hat A</annotation>
  </semantics>
</math>
</file>

<file path=Object 7/content.xml><?xml version="1.0" encoding="utf-8"?>
<math xmlns="http://www.w3.org/1998/Math/MathML" display="block">
  <semantics>
    <mrow>
      <mi>cos</mi>
      <mrow>
        <mover accent="true">
          <mi>A</mi>
          <mo stretchy="false">^</mo>
        </mover>
        <mo stretchy="false">=</mo>
        <mfrac>
          <mi mathvariant="italic">adjacent</mi>
          <mi mathvariant="italic">hypoténuse</mi>
        </mfrac>
        <mo stretchy="false">=</mo>
        <mfrac>
          <mi mathvariant="italic">AB</mi>
          <mi mathvariant="italic">AC</mi>
        </mfrac>
      </mrow>
    </mrow>
    <annotation encoding="StarMath 5.0">cos hat A = adjacent over hypoténuse = AB over AC</annotation>
  </semantics>
</math>
</file>

<file path=Object 8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frac>
          <mi mathvariant="italic">oppposé</mi>
          <mi mathvariant="italic">hypoténuse</mi>
        </mfrac>
        <mo stretchy="false">=</mo>
        <mfrac>
          <mi mathvariant="italic">BC</mi>
          <mi mathvariant="italic">AC</mi>
        </mfrac>
      </mrow>
    </mrow>
    <annotation encoding="StarMath 5.0">sin hat A = oppposé over hypoténuse = BC over AC</annotation>
  </semantics>
</math>
</file>

<file path=Object 9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i mathvariant="italic">opposé</mi>
          <mi mathvariant="italic">adjacent</mi>
        </mfrac>
        <mo stretchy="false">=</mo>
        <mfrac>
          <mi mathvariant="italic">BC</mi>
          <mi mathvariant="italic">AB</mi>
        </mfrac>
      </mrow>
    </mrow>
    <annotation encoding="StarMath 5.0">tan hat A = opposé over adjacent = BC over AB</annotation>
  </semantics>
</math>
</file>