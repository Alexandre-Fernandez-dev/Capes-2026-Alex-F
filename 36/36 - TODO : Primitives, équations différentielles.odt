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text-properties officeooo:rsid="0281142e" officeooo:paragraph-rsid="0281142e"/>
    </style:style>
    <style:style style:name="P8" style:family="paragraph" style:parent-style-name="Text_20_body" style:list-style-name="L1">
      <style:text-properties officeooo:rsid="02c71e7b" officeooo:paragraph-rsid="02bda252"/>
    </style:style>
    <style:style style:name="P9" style:family="paragraph" style:parent-style-name="Heading_20_1">
      <style:paragraph-properties fo:break-before="page"/>
      <style:text-properties officeooo:rsid="0281142e" officeooo:paragraph-rsid="0281142e"/>
    </style:style>
    <style:style style:name="P10" style:family="paragraph" style:parent-style-name="Heading_20_2">
      <style:text-properties officeooo:rsid="02825ea1" officeooo:paragraph-rsid="02825ea1"/>
    </style:style>
    <style:style style:name="T1" style:family="text">
      <style:text-properties officeooo:rsid="02f30b1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mitives, équations différentielles</text:span>.</text:p>
      <text:h text:style-name="P2" text:outline-level="4">Rapport jury :</text:h>
      <text:p text:style-name="P3">Pour la leçon « Primitives, équations différentielles », il est attendu de maitriser les démonstrations présentes dans le programme du lycée et d’illustrer la leçon par des exemples issus des autres disciplines. Certains candidats se sont trouvés en difficulté pour déterminer une primitive de la fonction ln. La méthode d’Euler a toute sa place dans cette leçon.</text:p>
      <text:p text:style-name="P4">Livres : </text:p>
      <text:p text:style-name="P4"/>
      <text:p text:style-name="P5">Niveau : </text:p>
      <text:p text:style-name="P6">Pré-requis :</text:p>
      <text:h text:style-name="P7" text:outline-level="1" text:is-list-header="true"/>
      <text:list text:style-name="L1">
        <text:list-item>
          <text:p text:style-name="P8"/>
        </text:list-item>
      </text:list>
      <text:h text:style-name="P9" text:outline-level="1">I/ Introduction</text:h>
      <text:h text:style-name="P10" text:outline-level="2">a) Définition géométriqu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5T14:14:18.999796259</dc:date>
    <meta:editing-duration>P3DT4H55M36S</meta:editing-duration>
    <meta:editing-cycles>540</meta:editing-cycles>
    <meta:document-statistic meta:table-count="0" meta:image-count="0" meta:object-count="0" meta:page-count="2" meta:paragraph-count="9" meta:word-count="75" meta:character-count="487" meta:non-whitespace-character-count="419"/>
  </office:meta>
</office:document-meta>
</file>