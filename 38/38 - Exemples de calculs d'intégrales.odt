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2296758" officeooo:paragraph-rsid="02296758"/>
    </style:style>
    <style:style style:name="P2" style:family="paragraph" style:parent-style-name="Heading_20_4">
      <style:text-properties fo:language="fr" fo:country="FR" officeooo:paragraph-rsid="0006c1c5"/>
    </style:style>
    <style:style style:name="P3" style:family="paragraph" style:parent-style-name="Text_20_body">
      <style:text-properties fo:language="fr" fo:country="FR" officeooo:paragraph-rsid="0006c1c5"/>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Heading_20_1">
      <style:text-properties officeooo:rsid="0281142e" officeooo:paragraph-rsid="0281142e"/>
    </style:style>
    <style:style style:name="P8" style:family="paragraph" style:parent-style-name="Text_20_body" style:list-style-name="L1">
      <style:paragraph-properties fo:break-before="page"/>
      <style:text-properties officeooo:rsid="031ba468" officeooo:paragraph-rsid="031ba468"/>
    </style:style>
    <style:style style:name="P9" style:family="paragraph" style:parent-style-name="Text_20_body" style:list-style-name="L1">
      <style:text-properties officeooo:rsid="031ba468" officeooo:paragraph-rsid="031ba468"/>
    </style:style>
    <style:style style:name="P10" style:family="paragraph" style:parent-style-name="Text_20_body" style:list-style-name="L1">
      <style:text-properties officeooo:rsid="031d92ec" officeooo:paragraph-rsid="031d92ec"/>
    </style:style>
    <style:style style:name="P11" style:family="paragraph" style:parent-style-name="Text_20_body" style:list-style-name="L1">
      <style:text-properties officeooo:rsid="031eb5c3" officeooo:paragraph-rsid="031eb5c3"/>
    </style:style>
    <style:style style:name="P12" style:family="paragraph" style:parent-style-name="Text_20_body" style:list-style-name="L2">
      <style:text-properties officeooo:paragraph-rsid="031eb5c3"/>
    </style:style>
    <style:style style:name="P13" style:family="paragraph" style:parent-style-name="Text_20_body" style:list-style-name="L2">
      <style:text-properties officeooo:rsid="031eb5c3" officeooo:paragraph-rsid="031eb5c3"/>
    </style:style>
    <style:style style:name="P14" style:family="paragraph" style:parent-style-name="Text_20_body" style:list-style-name="L1">
      <style:text-properties officeooo:rsid="031fd987" officeooo:paragraph-rsid="031fd987"/>
    </style:style>
    <style:style style:name="P15" style:family="paragraph" style:parent-style-name="Text_20_body" style:list-style-name="L1">
      <style:text-properties officeooo:rsid="031ba468" officeooo:paragraph-rsid="031fd987"/>
    </style:style>
    <style:style style:name="T1" style:family="text">
      <style:text-properties officeooo:rsid="031d92ec"/>
    </style:style>
    <style:style style:name="T2" style:family="text">
      <style:text-properties officeooo:rsid="031eb5c3"/>
    </style:style>
    <style:style style:name="fr1"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mples de calculs d’intégrales (méthodes exactes, méthodes approchées)</text:p>
      <text:h text:style-name="P2" text:outline-level="4">Rapport jury :</text:h>
      <text:p text:style-name="P3">La leçon « Exemples de calculs d’intégrales (méthodes exactes, méthodes approchées) « doit rester centrée sur les méthodes exactes et approchées. Le temps dédié à la définition et aux propriétés de l’intégrale doit être mesuré pour centrer la leçon sur les calculs. Pour cette leçon, l'utilisation de l’outil numérique est un attendu. L’aspect “méthodes approchées” ne doit pas se limiter à la seule méthode des rectangles. Les candidats s’interrogent trop rarement sur la convergence de la méthode et l’estimation de l’erreur.</text:p>
      <text:p text:style-name="P4">Livres : </text:p>
      <text:p text:style-name="P4"/>
      <text:p text:style-name="P5">Niveau : </text:p>
      <text:p text:style-name="P6">Pré-requis :</text:p>
      <text:h text:style-name="P7" text:outline-level="1" text:is-list-header="true"/>
      <text:list xml:id="list34351912" text:style-name="L1">
        <text:list-item>
          <text:p text:style-name="P8">Méthodes exactes</text:p>
          <text:list>
            <text:list-item>
              <text:p text:style-name="P9">Sommes de riemann sur fonctions continues sur segment</text:p>
              <text:p text:style-name="P9">On def la somme « par dessous »</text:p>
              <text:p text:style-name="P9">On montre la convergence en l’infini.</text:p>
              <text:list>
                <text:list-item>
                  <text:p text:style-name="P9">On a besoin de heine</text:p>
                </text:list-item>
                <text:list-item>
                  <text:p text:style-name="P9">on peut etendre a continue par morceaux.</text:p>
                </text:list-item>
                <text:list-item>
                  <text:p text:style-name="P9">Cas particulier avec subdivision régulière</text:p>
                </text:list-item>
                <text:list-item>
                  <text:p text:style-name="P9">Cas particulier régulier sur [0,1].</text:p>
                </text:list-item>
                <text:list-item>
                  <text:p text:style-name="P9">Exemple limite somme <draw:frame draw:style-name="fr1" draw:name="Object1" text:anchor-type="as-char" svg:y="-0.2445in" svg:width="0.289in" svg:height="0.3953in" draw:z-index="1"><draw:object xlink:href="./Object 1" xlink:type="simple" xlink:show="embed" xlink:actuate="onLoad"/><draw:image xlink:href="./ObjectReplacements/Object 1" xlink:type="simple" xlink:show="embed" xlink:actuate="onLoad"/></draw:frame><text:s/>pour i variant de 1 à n.</text:p>
                  <text:p text:style-name="P9">On passe par la fonction définie sur [0,1] <draw:frame draw:style-name="fr1" draw:name="Object2" text:anchor-type="as-char" svg:y="-0.2445in" svg:width="0.3252in" svg:height="0.3953in" draw:z-index="0"><draw:object xlink:href="./Object 2" xlink:type="simple" xlink:show="embed" xlink:actuate="onLoad"/><draw:image xlink:href="./ObjectReplacements/Object 2" xlink:type="simple" xlink:show="embed" xlink:actuate="onLoad"/></draw:frame><text:s/>on applique le cas particulier et on trouve ln 2.</text:p>
                </text:list-item>
              </text:list>
            </text:list-item>
            <text:list-item>
              <text:p text:style-name="P9">Intégration avec primitives :</text:p>
              <text:list>
                <text:list-item>
                  <text:p text:style-name="P10">Rappel props prim</text:p>
                  <text:list>
                    <text:list-item>
                      <text:p text:style-name="P9">Def prim<text:span text:style-name="T1">s</text:span></text:p>
                    </text:list-item>
                    <text:list-item>
                      <text:p text:style-name="P10">TFA positif sur segment ( encadrer avec carrés de pas 2^n )</text:p>
                    </text:list-item>
                    <text:list-item>
                      <text:p text:style-name="P9">TFA avec fonctions continues pas forcément positives. Dans le cas ou I est fermé.</text:p>
                    </text:list-item>
                    <text:list-item>
                      <text:p text:style-name="P9">Les primitives sont = à une constante près.</text:p>
                    </text:list-item>
                    <text:list-item>
                      <text:p text:style-name="P9">Conditions initiales donnent unicité de primitive</text:p>
                    </text:list-item>
                  </text:list>
                </text:list-item>
                <text:list-item>
                  <text:p text:style-name="P10">Application au calcul intégral. Si f continue et positive et F une primitive de f sur [a, b] alors <draw:frame draw:style-name="fr1" draw:name="Object3" text:anchor-type="as-char" svg:y="-0.2937in" svg:width="2.2634in" svg:height="0.4752in" draw:z-index="2"><draw:object xlink:href="./Object 3" xlink:type="simple" xlink:show="embed" xlink:actuate="onLoad"/><draw:image xlink:href="./ObjectReplacements/Object 3" xlink:type="simple" xlink:show="embed" xlink:actuate="onLoad"/></draw:frame>.</text:p>
                  <text:list>
                    <text:list-item>
                      <text:p text:style-name="P11">On introduit l’intégrale <draw:frame draw:style-name="fr1" draw:name="Object4" text:anchor-type="as-char" svg:y="-0.2937in" svg:width="1.2354in" svg:height="0.4752in" draw:z-index="3"><draw:object xlink:href="./Object 4" xlink:type="simple" xlink:show="embed" xlink:actuate="onLoad"/><draw:image xlink:href="./ObjectReplacements/Object 4" xlink:type="simple" xlink:show="embed" xlink:actuate="onLoad"/></draw:frame><text:s/>telle que <draw:frame draw:style-name="fr1" draw:name="Object5" text:anchor-type="as-char" svg:y="-0.2937in" svg:width="0.6547in" svg:height="0.4752in" draw:z-index="4"><draw:object xlink:href="./Object 5" xlink:type="simple" xlink:show="embed" xlink:actuate="onLoad"/><draw:image xlink:href="./ObjectReplacements/Object 5" xlink:type="simple" xlink:show="embed" xlink:actuate="onLoad"/><svg:desc>formula</svg:desc></draw:frame><text:s/>= p(b)</text:p>
                      <text:p text:style-name="P11">p et F sont 2 primitives donc il existe une constantek telle que p = F <text:s/>+ k.</text:p>
                      <text:p text:style-name="P11">Comme p(a) = 0 on a F(a) = - k. Et donc <draw:frame draw:style-name="fr1" draw:name="Object6" text:anchor-type="as-char" svg:y="-0.2937in" svg:width="0.6547in" svg:height="0.4752in" draw:z-index="5"><draw:object xlink:href="./Object 6" xlink:type="simple" xlink:show="embed" xlink:actuate="onLoad"/><draw:image xlink:href="./ObjectReplacements/Object 6" xlink:type="simple" xlink:show="embed" xlink:actuate="onLoad"/><svg:desc>formula</svg:desc></draw:frame><text:s/>= F(b) – F(a).</text:p>
                    </text:list-item>
                  </text:list>
                </text:list-item>
                <text:list-item>
                  <text:p text:style-name="P11">Corollaire formule newton leibtnitz, pareil mais f pas positive et pour tout a, b dans i</text:p>
                </text:list-item>
                <text:list-item>
                  <text:p text:style-name="P11">Exemples </text:p>
                </text:list-item>
              </text:list>
            </text:list-item>
          </text:list>
        </text:list-item>
      </text:list>
      <text:list text:style-name="L2">
        <text:list-item>
          <text:list>
            <text:list-item>
              <text:list>
                <text:list-item>
                  <text:list>
                    <text:list-item>
                      <text:p text:style-name="P12"><text:span text:style-name="T2">int 0 1 e^t</text:span></text:p>
                    </text:list-item>
                    <text:list-item>
                      <text:p text:style-name="P13">int 0 1 x^n</text:p>
                    </text:list-item>
                    <text:list-item>
                      <text:p text:style-name="P13">int 2 e de 1/(xln(x))</text:p>
                    </text:list-item>
                  </text:list>
                </text:list-item>
              </text:list>
            </text:list-item>
          </text:list>
        </text:list-item>
      </text:list>
      <text:list text:continue-list="list34351912" text:style-name="L1">
        <text:list-item>
          <text:list>
            <text:list-item>
              <text:p text:style-name="P11"><text:soft-page-break/>IPP</text:p>
              <text:list>
                <text:list-item>
                  <text:p text:style-name="P11">Def classe C1.</text:p>
                </text:list-item>
                <text:list-item>
                  <text:p text:style-name="P11">Théorème IPP</text:p>
                </text:list-item>
                <text:list-item>
                  <text:p text:style-name="P11">Exemples, </text:p>
                  <text:list>
                    <text:list-item>
                      <text:p text:style-name="P11">sur 0 1, t e^t</text:p>
                    </text:list-item>
                    <text:list-item>
                      <text:p text:style-name="P11">J(x) = int de 1 à x de ln(t) (primitive de ln il faut IPP « 1 x ln(t) »</text:p>
                    </text:list-item>
                  </text:list>
                </text:list-item>
              </text:list>
            </text:list-item>
            <text:list-item>
              <text:p text:style-name="P11">Changement de variables</text:p>
              <text:list>
                <text:list-item>
                  <text:p text:style-name="P11">Theorème démo admise hors programme BTS , idée de preuve ?</text:p>
                </text:list-item>
                <text:list-item>
                  <text:p text:style-name="P14">Preuve</text:p>
                </text:list-item>
                <text:list-item>
                  <text:p text:style-name="P14">Exemples :</text:p>
                  <text:list>
                    <text:list-item>
                      <text:p text:style-name="P14">Calcul integrale 1 / polynôme → forme canonique → on arrive a changer avec arctan.</text:p>
                    </text:list-item>
                  </text:list>
                </text:list-item>
                <text:list-item>
                  <text:p text:style-name="P14">Fonction T périodique, intégrale sur T est constante.</text:p>
                </text:list-item>
                <text:list-item>
                  <text:p text:style-name="P14">Exo Intégrales de wallis</text:p>
                </text:list-item>
              </text:list>
            </text:list-item>
            <text:list-item>
              <text:p text:style-name="P14">Intégration fractions rationnelles</text:p>
              <text:list>
                <text:list-item>
                  <text:p text:style-name="P14">Exo méthode.</text:p>
                </text:list-item>
              </text:list>
            </text:list-item>
          </text:list>
        </text:list-item>
        <text:list-item>
          <text:p text:style-name="P14">Calcul approché.</text:p>
          <text:list>
            <text:list-item>
              <text:p text:style-name="P14">Reconnaitre des calcul daire connus</text:p>
            </text:list-item>
            <text:list-item>
              <text:p text:style-name="P14">Méthode des rectangles</text:p>
              <text:list>
                <text:list-item>
                  <text:p text:style-name="P14">lien avec sommes de riemann</text:p>
                </text:list-item>
                <text:list-item>
                  <text:p text:style-name="P14">Erreur ?</text:p>
                </text:list-item>
              </text:list>
            </text:list-item>
            <text:list-item>
              <text:p text:style-name="P14">Méthode des trpèzes</text:p>
              <text:list>
                <text:list-item>
                  <text:p text:style-name="P14">Erreur ?</text:p>
                </text:list-item>
              </text:list>
            </text:list-item>
          </text:list>
        </text:list-item>
        <text:list-item>
          <text:p text:style-name="P14">Autres calculs de primitives …. (calcul exact)</text:p>
          <text:list>
            <text:list-item>
              <text:p text:style-name="P14">Prim polynôme on suppose degré +1. Puis identification des coefficients après dérivation.</text:p>
            </text:list-item>
            <text:list-item>
              <text:p text:style-name="P14">Linéarisation trigo</text:p>
            </text:list-item>
          </text:list>
          <text:p text:style-name="P15"/>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7d74455cffae7a589951233f185ae0303c082020</meta:generator>
    <dc:date>2026-05-28T19:02:26.731898881</dc:date>
    <meta:editing-duration>P3DT6H26M1S</meta:editing-duration>
    <meta:editing-cycles>558</meta:editing-cycles>
    <meta:document-statistic meta:table-count="0" meta:image-count="0" meta:object-count="6" meta:page-count="3" meta:paragraph-count="57" meta:word-count="481" meta:character-count="2561" meta:non-whitespace-character-count="2172"/>
  </office:meta>
</office:document-meta>
</file>

<file path=Object 1/content.xml><?xml version="1.0" encoding="utf-8"?>
<math xmlns="http://www.w3.org/1998/Math/MathML" display="block">
  <semantics>
    <mfrac>
      <mn>1</mn>
      <mrow>
        <mi>n</mi>
        <mo stretchy="false">+</mo>
        <mi>i</mi>
      </mrow>
    </mfrac>
    <annotation encoding="StarMath 5.0">1 over {n+i}</annotation>
  </semantics>
</math>
</file>

<file path=Object 2/content.xml><?xml version="1.0" encoding="utf-8"?>
<math xmlns="http://www.w3.org/1998/Math/MathML" display="block">
  <semantics>
    <mfrac>
      <mn>1</mn>
      <mrow>
        <mn>1</mn>
        <mo stretchy="false">+</mo>
        <mi>x</mi>
      </mrow>
    </mfrac>
    <annotation encoding="StarMath 5.0">1 over {1+x}</annotation>
  </semantics>
</math>
</file>

<file path=Object 3/content.xml><?xml version="1.0" encoding="utf-8"?>
<math xmlns="http://www.w3.org/1998/Math/MathML" display="block">
  <semantics>
    <mrow>
      <mrow>
        <munderover>
          <mo stretchy="false">∫</mo>
          <mi>a</mi>
          <mi>b</mi>
        </munderover>
        <mi>f</mi>
      </mrow>
      <mrow>
        <mo fence="true" form="prefix" stretchy="false">(</mo>
        <mrow>
          <mi>x</mi>
        </mrow>
        <mo fence="true" form="postfix" stretchy="false">)</mo>
      </mrow>
      <mrow>
        <mi mathvariant="italic">dx</mi>
        <mo stretchy="false">=</mo>
        <msubsup>
          <mrow>
            <mo fence="true" form="prefix" stretchy="true">[</mo>
            <mrow>
              <mrow>
                <mi>F</mi>
                <mrow>
                  <mo fence="true" form="prefix" stretchy="false">(</mo>
                  <mrow>
                    <mi>x</mi>
                  </mrow>
                  <mo fence="true" form="postfix" stretchy="false">)</mo>
                </mrow>
              </mrow>
            </mrow>
            <mo fence="true" form="postfix" stretchy="true">]</mo>
          </mrow>
          <mi>a</mi>
          <mi>b</mi>
        </msubsup>
        <mo stretchy="false">=</mo>
        <mi>F</mi>
      </mrow>
      <mrow>
        <mrow>
          <mo fence="true" form="prefix" stretchy="false">(</mo>
          <mrow>
            <mi>b</mi>
          </mrow>
          <mo fence="true" form="postfix" stretchy="false">)</mo>
        </mrow>
        <mo stretchy="false">−</mo>
        <mi>F</mi>
      </mrow>
      <mrow>
        <mo fence="true" form="prefix" stretchy="false">(</mo>
        <mrow>
          <mi>a</mi>
        </mrow>
        <mo fence="true" form="postfix" stretchy="false">)</mo>
      </mrow>
    </mrow>
    <annotation encoding="StarMath 5.0">int from a to b f(x) dx = left [F(x) right ]_a^b = F(b) -F(a)</annotation>
  </semantics>
</math>
</file>

<file path=Object 4/content.xml><?xml version="1.0" encoding="utf-8"?>
<math xmlns="http://www.w3.org/1998/Math/MathML" display="block">
  <semantics>
    <mrow>
      <mi>p</mi>
      <mi mathvariant="normal">:</mi>
      <mi>x</mi>
      <mo stretchy="false">→</mo>
      <mrow>
        <munderover>
          <mo stretchy="false">∫</mo>
          <mi>a</mi>
          <mi>x</mi>
        </munderover>
        <mi>f</mi>
      </mrow>
      <mrow>
        <mo fence="true" form="prefix" stretchy="false">(</mo>
        <mrow>
          <mi>x</mi>
        </mrow>
        <mo fence="true" form="postfix" stretchy="false">)</mo>
      </mrow>
      <mi>d</mi>
      <mrow>
        <mo fence="true" form="prefix" stretchy="false">(</mo>
        <mrow>
          <mi>x</mi>
        </mrow>
        <mo fence="true" form="postfix" stretchy="false">)</mo>
      </mrow>
    </mrow>
    <annotation encoding="StarMath 5.0">p : x -&gt; int from a to x f(x) d(x)</annotation>
  </semantics>
</math>
</file>

<file path=Object 5/content.xml><?xml version="1.0" encoding="utf-8"?>
<math xmlns="http://www.w3.org/1998/Math/MathML" display="block">
  <semantics>
    <mrow>
      <mrow>
        <munderover>
          <mo stretchy="false">∫</mo>
          <mi>a</mi>
          <mi>b</mi>
        </munderover>
        <mi>f</mi>
      </mrow>
      <mrow>
        <mo fence="true" form="prefix" stretchy="false">(</mo>
        <mrow>
          <mi>x</mi>
        </mrow>
        <mo fence="true" form="postfix" stretchy="false">)</mo>
      </mrow>
      <mi mathvariant="italic">dx</mi>
    </mrow>
    <annotation encoding="StarMath 5.0">int from a to b f(x) dx
</annotation>
  </semantics>
</math>
</file>

<file path=Object 6/content.xml><?xml version="1.0" encoding="utf-8"?>
<math xmlns="http://www.w3.org/1998/Math/MathML" display="block">
  <semantics>
    <mrow>
      <mrow>
        <munderover>
          <mo stretchy="false">∫</mo>
          <mi>a</mi>
          <mi>b</mi>
        </munderover>
        <mi>f</mi>
      </mrow>
      <mrow>
        <mo fence="true" form="prefix" stretchy="false">(</mo>
        <mrow>
          <mi>x</mi>
        </mrow>
        <mo fence="true" form="postfix" stretchy="false">)</mo>
      </mrow>
      <mi mathvariant="italic">dx</mi>
    </mrow>
    <annotation encoding="StarMath 5.0">int from a to b f(x) dx
</annotation>
  </semantics>
</math>
</file>