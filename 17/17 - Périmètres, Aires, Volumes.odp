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F00000221FF5495BB.png" manifest:media-type="image/png"/>
  <manifest:file-entry manifest:full-path="Pictures/1000000100000208000002C741793130.png" manifest:media-type="image/png"/>
  <manifest:file-entry manifest:full-path="Pictures/100000010000020E00000300BF988C5E.png" manifest:media-type="image/png"/>
  <manifest:file-entry manifest:full-path="Pictures/1000000100000166000000FB9B1552F4.png" manifest:media-type="image/png"/>
  <manifest:file-entry manifest:full-path="Pictures/100000010000014600000154FE626AA0.png" manifest:media-type="image/png"/>
  <manifest:file-entry manifest:full-path="Pictures/100000010000024C000001816CE5C3E4.png" manifest:media-type="image/png"/>
  <manifest:file-entry manifest:full-path="Pictures/100000010000032D0000009C2CA36FE4.png" manifest:media-type="image/png"/>
  <manifest:file-entry manifest:full-path="Pictures/10000001000003580000006C1F17B0EF.png" manifest:media-type="image/png"/>
  <manifest:file-entry manifest:full-path="Pictures/1000000100000330000000F2E551DE52.png" manifest:media-type="image/png"/>
  <manifest:file-entry manifest:full-path="Pictures/10000001000002D3000000EE2288C735.png" manifest:media-type="image/png"/>
  <manifest:file-entry manifest:full-path="Pictures/1000000100000340000000CBA203A925.png" manifest:media-type="image/png"/>
  <manifest:file-entry manifest:full-path="Pictures/10000001000002E0000000EA3C5A40AD.png" manifest:media-type="image/png"/>
  <manifest:file-entry manifest:full-path="Pictures/100000010000033C0000011672EB0162.png" manifest:media-type="image/png"/>
  <manifest:file-entry manifest:full-path="Pictures/100000010000033500000120C97DDDF7.png" manifest:media-type="image/png"/>
  <manifest:file-entry manifest:full-path="Pictures/100000010000028F000001A9D71B1DD8.png" manifest:media-type="image/png"/>
  <manifest:file-entry manifest:full-path="Pictures/100000010000033C000000C193CF5AF4.png" manifest:media-type="image/png"/>
  <manifest:file-entry manifest:full-path="Pictures/1000000100000148000000C7C0CCA3E8.png" manifest:media-type="image/png"/>
  <manifest:file-entry manifest:full-path="Pictures/1000000100000355000000EF01330B40.png" manifest:media-type="image/png"/>
  <manifest:file-entry manifest:full-path="Pictures/10000001000002CA0000025960254C74.png" manifest:media-type="image/png"/>
  <manifest:file-entry manifest:full-path="Pictures/100000010000034C000000C1339E2A9B.png" manifest:media-type="image/png"/>
  <manifest:file-entry manifest:full-path="Pictures/10000001000002E5000000DDE238A982.png" manifest:media-type="image/png"/>
  <manifest:file-entry manifest:full-path="Pictures/10000001000001410000015977E6A209.png" manifest:media-type="image/png"/>
  <manifest:file-entry manifest:full-path="Pictures/10000001000002E90000018F8100F5D6.png" manifest:media-type="image/png"/>
  <manifest:file-entry manifest:full-path="Pictures/1000000100000343000001C70436D660.png" manifest:media-type="image/png"/>
  <manifest:file-entry manifest:full-path="Pictures/10000001000003AE0000014C177478B9.png" manifest:media-type="image/png"/>
  <manifest:file-entry manifest:full-path="Pictures/1000000100000343000000B42751FE3A.png" manifest:media-type="image/png"/>
  <manifest:file-entry manifest:full-path="Pictures/10000001000003560000020EB8BE3510.png" manifest:media-type="image/png"/>
  <manifest:file-entry manifest:full-path="Pictures/100000010000030A0000006D12D187BD.png" manifest:media-type="image/png"/>
  <manifest:file-entry manifest:full-path="Pictures/1000000100000241000001AD9B9B7E7E.png" manifest:media-type="image/png"/>
  <manifest:file-entry manifest:full-path="Pictures/1000000100000349000000FF5D62A1E5.png" manifest:media-type="image/png"/>
  <manifest:file-entry manifest:full-path="Pictures/100000010000034A000000B3E0BF4E77.png" manifest:media-type="image/png"/>
  <manifest:file-entry manifest:full-path="Pictures/10000001000002E80000016FDB9C863D.png" manifest:media-type="image/png"/>
  <manifest:file-entry manifest:full-path="Pictures/100000010000034A0000008B9629E8FE.png" manifest:media-type="image/png"/>
  <manifest:file-entry manifest:full-path="Pictures/100000010000030F0000022B678C1568.png" manifest:media-type="image/png"/>
  <manifest:file-entry manifest:full-path="Pictures/100000010000035100000124ADF4FC3D.png" manifest:media-type="image/png"/>
  <manifest:file-entry manifest:full-path="Pictures/1000000100000347000000CE6C307942.png" manifest:media-type="image/png"/>
  <manifest:file-entry manifest:full-path="Pictures/10000001000002270000024BC1F1C6E3.png" manifest:media-type="image/png"/>
  <manifest:file-entry manifest:full-path="Pictures/10000001000002DA000000E51718CF27.png" manifest:media-type="image/png"/>
  <manifest:file-entry manifest:full-path="Pictures/1000000100000345000000EE297ECFCB.png" manifest:media-type="image/png"/>
  <manifest:file-entry manifest:full-path="Pictures/100000010000034F000000AD2563C213.png" manifest:media-type="image/png"/>
  <manifest:file-entry manifest:full-path="Pictures/100000010000034000000084B6A463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3cm" fo:margin-bottom="0.212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fo:font-size="11pt" style:font-size-asian="11pt" style:font-size-complex="11pt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<text:span text:style-name="T1">Périmètres, aires, volumes.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>Ressources :</text:p>
            <text:p>6eme Mission indigo et tout en math</text:p>
            <text:p>4eme mission indigo</text:p>
            <text:p text:style-name="P2">5eme mission indigo</text:p>
            <text:p>1ère décli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Périmèt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ngueur et unités</text:p>
              </text:list-item>
              <text:list-item>
                <text:p>Polygones</text:p>
              </text:list-item>
              <text:list-item>
                <text:p>Cerc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<text:span text:style-name="T2">I/</text:span>a) Longueur et unité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6" draw:layer="layout" svg:width="24.923cm" svg:height="8.783cm" svg:x="1.689cm" svg:y="3.466cm">
          <draw:image xlink:href="Pictures/10000001000003AE0000014C177478B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<text:span text:style-name="T2">I/</text:span>a) Longueur et unités</text:p>
          </draw:text-box>
        </draw:frame>
        <draw:frame draw:style-name="gr2" draw:text-style-name="P6" draw:layer="layout" svg:width="26.5cm" svg:height="8.035cm" svg:x="1cm" svg:y="4.465cm">
          <draw:image xlink:href="Pictures/1000000100000349000000FF5D62A1E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<text:span text:style-name="T2">I/b</text:span>) Périmèt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olygones</text:p>
                <text:p/>
                <text:p/>
              </text:list-item>
            </text:list>
          </draw:text-box>
        </draw:frame>
        <draw:frame draw:style-name="gr2" draw:text-style-name="P6" draw:layer="layout" svg:width="20.584cm" svg:height="2.883cm" svg:x="1cm" svg:y="5.5cm">
          <draw:image xlink:href="Pictures/100000010000030A0000006D12D187BD.png" xlink:type="simple" xlink:show="embed" xlink:actuate="onLoad" draw:mime-type="image/png">
            <text:p/>
          </draw:image>
        </draw:frame>
        <draw:frame draw:style-name="gr2" draw:text-style-name="P6" draw:layer="layout" svg:width="5.5cm" svg:height="3.337cm" svg:x="21.5cm" svg:y="5cm">
          <draw:image xlink:href="Pictures/1000000100000148000000C7C0CCA3E8.png" xlink:type="simple" xlink:show="embed" xlink:actuate="onLoad" draw:mime-type="image/png">
            <text:p/>
          </draw:image>
        </draw:frame>
        <draw:frame draw:style-name="gr2" draw:text-style-name="P6" draw:layer="layout" svg:width="22.568cm" svg:height="6.323cm" svg:x="2cm" svg:y="8.677cm">
          <draw:image xlink:href="Pictures/1000000100000355000000EF01330B4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<text:span text:style-name="T2">I/</text:span>a) Longueur et unité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ercle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La circonférence peut être approchée par </text:p>
                <text:p>la méthode d’archimède. </text:p>
                <text:p/>
              </text:list-item>
            </text:list>
          </draw:text-box>
        </draw:frame>
        <draw:frame draw:style-name="gr2" draw:text-style-name="P6" draw:layer="layout" svg:width="21.907cm" svg:height="5.105cm" svg:x="3.237cm" svg:y="5.305cm">
          <draw:image xlink:href="Pictures/100000010000033C000000C193CF5AF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/ Ai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ef intuitive</text:p>
              </text:list-item>
              <text:list-item>
                <text:p>Comparaison : égalités, inégalités</text:p>
              </text:list-item>
              <text:list-item>
                <text:p>Multiples et agrandissement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/a</text:span>) Def intuitive</text:p>
          </draw:text-box>
        </draw:frame>
        <draw:frame draw:style-name="gr2" draw:text-style-name="P6" draw:layer="layout" svg:width="21.721cm" svg:height="7.619cm" svg:x="3.331cm" svg:y="4.032cm">
          <draw:image xlink:href="Pictures/100000010000033500000120C97DDD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/b</text:span>) Comparaisons</text:p>
          </draw:text-box>
        </draw:frame>
        <draw:frame presentation:style-name="pr4" draw:layer="layout" svg:width="25.199cm" svg:height="9.134cm" svg:x="1.4cm" svg:y="2.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" draw:text-style-name="P6" draw:layer="layout" svg:width="15cm" svg:height="12.626cm" svg:x="7cm" svg:y="2.874cm">
          <draw:image xlink:href="Pictures/10000001000002CA0000025960254C7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/b</text:span>) Comparaisons</text:p>
          </draw:text-box>
        </draw:frame>
        <draw:frame presentation:style-name="pr4" draw:layer="layout" svg:width="25.199cm" svg:height="9.134cm" svg:x="1.4cm" svg:y="2.5cm" presentation:class="outline" presentation:user-transformed="true">
          <draw:text-box>
            <text:list text:style-name="L3">
              <text:list-item>
                <text:p>Découpage</text:p>
                <text:p/>
              </text:list-item>
            </text:list>
          </draw:text-box>
        </draw:frame>
        <draw:frame draw:style-name="gr2" draw:text-style-name="P6" draw:layer="layout" svg:width="19.701cm" svg:height="10.735cm" svg:x="4.299cm" svg:y="3.765cm">
          <draw:image xlink:href="Pictures/1000000100000343000001C70436D66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/b</text:span>) Comparaisons</text:p>
          </draw:text-box>
        </draw:frame>
        <draw:frame draw:style-name="gr2" draw:text-style-name="P6" draw:layer="layout" svg:width="21.953cm" svg:height="11.757cm" svg:x="3.047cm" svg:y="3cm">
          <draw:image xlink:href="Pictures/10000001000002E90000018F8100F5D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/b) Comparaisons</text:span></text:p>
          </draw:text-box>
        </draw:frame>
        <draw:frame draw:style-name="gr2" draw:text-style-name="P6" draw:layer="layout" svg:width="26.5cm" svg:height="8.424cm" svg:x="1cm" svg:y="4.076cm">
          <draw:image xlink:href="Pictures/10000001000002E0000000EA3C5A40A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/c) Calculs d’aires</text:span></text:p>
          </draw:text-box>
        </draw:frame>
        <draw:frame draw:style-name="gr2" draw:text-style-name="P6" draw:layer="layout" svg:width="27.883cm" svg:height="9.36cm" svg:x="0.5cm" svg:y="3.5cm">
          <draw:image xlink:href="Pictures/100000010000033C0000011672EB016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/c) Calculs d’air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écoupage : Triangle rectangle → rectangle</text:p>
              </text:list-item>
            </text:list>
          </draw:text-box>
        </draw:frame>
        <draw:frame draw:style-name="gr2" draw:text-style-name="P6" draw:layer="layout" svg:width="19.314cm" svg:height="6.058cm" svg:x="4.441cm" svg:y="6cm">
          <draw:image xlink:href="Pictures/10000001000002DA000000E51718CF2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/c) Calculs d’air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écoupage : Parallélogramme → rectangle</text:p>
              </text:list-item>
            </text:list>
            <text:p/>
          </draw:text-box>
        </draw:frame>
        <draw:frame draw:style-name="gr2" draw:text-style-name="P6" draw:layer="layout" svg:width="27.098cm" svg:height="6.195cm" svg:x="0.5cm" svg:y="5.805cm">
          <draw:image xlink:href="Pictures/100000010000034C000000C1339E2A9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/c) Calculs d’air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riangle : avec trigonométrie</text:p>
              </text:list-item>
            </text:list>
          </draw:text-box>
        </draw:frame>
        <draw:frame draw:style-name="gr2" draw:text-style-name="P6" draw:layer="layout" svg:width="19.128cm" svg:height="6.296cm" svg:x="4cm" svg:y="6cm">
          <draw:image xlink:href="Pictures/10000001000002D3000000EE2288C73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/d) Autres polygones</text:span></text:p>
          </draw:text-box>
        </draw:frame>
        <draw:frame presentation:style-name="pr4" draw:layer="layout" svg:width="25.199cm" svg:height="9.134cm" svg:x="1.4cm" svg:y="2.866cm" presentation:class="outline" presentation:user-transformed="true">
          <draw:text-box>
            <text:list text:style-name="L3">
              <text:list-item>
                <text:p><text:span text:style-name="T3">Triangle : formule de héron : aire en fonction du périmètre</text:span></text:p>
              </text:list-item>
            </text:list>
          </draw:text-box>
        </draw:frame>
        <draw:frame draw:style-name="gr2" draw:text-style-name="P6" draw:layer="layout" svg:width="18.494cm" svg:height="11.391cm" svg:x="5cm" svg:y="4cm">
          <draw:image xlink:href="Pictures/10000001000003560000020EB8BE351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/d) Autres polygon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rapèze</text:p>
              </text:list-item>
            </text:list>
          </draw:text-box>
        </draw:frame>
        <draw:frame draw:style-name="gr2" draw:text-style-name="P6" draw:layer="layout" svg:width="15.265cm" svg:height="11.35cm" svg:x="6.735cm" svg:y="3.65cm">
          <draw:image xlink:href="Pictures/1000000100000241000001AD9B9B7E7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/e) Disqu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tuitivement (collège) </text:p>
              </text:list-item>
            </text:list>
          </draw:text-box>
        </draw:frame>
        <draw:frame draw:style-name="gr2" draw:text-style-name="P6" draw:layer="layout" svg:width="13.689cm" svg:height="6.752cm" svg:x="5cm" svg:y="5.5cm">
          <draw:image xlink:href="Pictures/10000001000002E80000016FDB9C863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/e) Unités</text:span></text:p>
          </draw:text-box>
        </draw:frame>
        <draw:frame draw:style-name="gr2" draw:text-style-name="P6" draw:layer="layout" svg:width="26.38cm" svg:height="7.5cm" svg:x="0.859cm" svg:y="3cm">
          <draw:image xlink:href="Pictures/1000000100000345000000EE297ECFCB.png" xlink:type="simple" xlink:show="embed" xlink:actuate="onLoad" draw:mime-type="image/png">
            <text:p/>
          </draw:image>
        </draw:frame>
        <draw:frame draw:style-name="gr2" draw:text-style-name="P6" draw:layer="layout" svg:width="22.277cm" svg:height="3.677cm" svg:x="2.223cm" svg:y="10.823cm">
          <draw:image xlink:href="Pictures/100000010000034A0000008B9629E8F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I/ Volum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éfinition</text:p>
              </text:list-item>
              <text:list-item>
                <text:p>Solides usuels</text:p>
                <text:list>
                  <text:list-item>
                    <text:p>Pavés droits</text:p>
                  </text:list-item>
                  <text:list-item>
                    <text:p>Prismes et cylindres</text:p>
                  </text:list-item>
                  <text:list-item>
                    <text:p>Pyramides et cônes</text:p>
                  </text:list-item>
                  <text:list-item>
                    <text:p>Boule, sphèr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I/a) Définition</text:span></text:p>
          </draw:text-box>
        </draw:frame>
        <draw:frame draw:style-name="gr2" draw:text-style-name="P6" draw:layer="layout" svg:width="33.736cm" svg:height="6.889cm" svg:x="0cm" svg:y="4.611cm">
          <draw:image xlink:href="Pictures/100000010000034F000000AD2563C21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<text:span text:style-name="T2">III/b) Solides usuels</text:span></text:p>
          </draw:text-box>
        </draw:frame>
        <draw:frame draw:style-name="gr2" draw:text-style-name="P6" draw:layer="layout" svg:width="15.205cm" svg:height="10.777cm" svg:x="6cm" svg:y="3.5cm">
          <draw:image xlink:href="Pictures/100000010000030F0000022B678C15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I/c/1) Pavés droits</text:span></text:p>
          </draw:text-box>
        </draw:frame>
        <draw:frame draw:style-name="gr2" draw:text-style-name="P6" draw:layer="layout" svg:width="22.462cm" svg:height="7.725cm" svg:x="2.116cm" svg:y="3.995cm">
          <draw:image xlink:href="Pictures/100000010000035100000124ADF4FC3D.png" xlink:type="simple" xlink:show="embed" xlink:actuate="onLoad" draw:mime-type="image/png">
            <text:p/>
          </draw:image>
        </draw:frame>
        <draw:frame draw:style-name="gr3" draw:text-style-name="P7" draw:layer="layout" svg:width="23.5cm" svg:height="1cm" svg:x="2cm" svg:y="13cm">
          <draw:text-box>
            <text:p>Cas particulier : Volume cube de côté c : c³ </text:p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I/c/2)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ismes et cylindres</text:p>
              </text:list-item>
            </text:list>
          </draw:text-box>
        </draw:frame>
        <draw:frame draw:style-name="gr2" draw:text-style-name="P6" draw:layer="layout" svg:width="25.223cm" svg:height="7.521cm" svg:x="1.376cm" svg:y="5.298cm">
          <draw:image xlink:href="Pictures/10000001000002E5000000DDE238A98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I/c/2)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ismes et cylindres</text:p>
              </text:list-item>
            </text:list>
          </draw:text-box>
        </draw:frame>
        <draw:frame draw:style-name="gr2" draw:text-style-name="P6" draw:layer="layout" svg:width="27cm" svg:height="5.739cm" svg:x="0.5cm" svg:y="5.761cm">
          <draw:image xlink:href="Pictures/100000010000034A000000B3E0BF4E7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I/c/3)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yramides et cônes 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6" draw:layer="layout" svg:width="26.984cm" svg:height="6.583cm" svg:x="0.516cm" svg:y="5.417cm">
          <draw:image xlink:href="Pictures/1000000100000340000000CBA203A92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I/c/3)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yramides et cônes 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6" draw:layer="layout" svg:width="25.938cm" svg:height="6.367cm" svg:x="1cm" svg:y="5.133cm">
          <draw:image xlink:href="Pictures/1000000100000347000000CE6C30794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<text:span text:style-name="T2">III/c/4) Multiples</text:span></text:p>
          </draw:text-box>
        </draw:frame>
        <draw:frame draw:style-name="gr2" draw:text-style-name="P6" draw:layer="layout" svg:width="27cm" svg:height="4.283cm" svg:x="0.5cm" svg:y="5.717cm">
          <draw:image xlink:href="Pictures/100000010000034000000084B6A463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2">III/c/4) Solides de révolution</text:span></text:p>
          </draw:text-box>
        </draw:frame>
        <draw:frame presentation:style-name="pr4" draw:layer="layout" svg:width="24.6cm" svg:height="10.815cm" svg:x="1.4cm" svg:y="3.685cm" presentation:class="outline" presentation:user-transformed="true">
          <draw:text-box>
            <text:list text:style-name="L3">
              <text:list-item>
                <text:p>Volume boule</text:p>
              </text:list-item>
            </text:list>
            <text:p/>
            <text:p/>
            <text:p/>
            <text:p/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draw:frame draw:style-name="gr2" draw:text-style-name="P6" draw:layer="layout" svg:width="22.092cm" svg:height="4.762cm" svg:x="3.644cm" svg:y="5.477cm">
          <draw:image xlink:href="Pictures/1000000100000343000000B42751FE3A.png" xlink:type="simple" xlink:show="embed" xlink:actuate="onLoad" draw:mime-type="image/png">
            <text:p/>
          </draw:image>
        </draw:frame>
        <draw:frame draw:style-name="gr2" draw:text-style-name="P6" draw:layer="layout" svg:width="22.647cm" svg:height="2.857cm" svg:x="3.5cm" svg:y="10.143cm">
          <draw:image xlink:href="Pictures/10000001000003580000006C1F17B0E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V/ Calcul avec intégration</text:p>
          </draw:text-box>
        </draw:frame>
        <draw:frame draw:style-name="gr2" draw:text-style-name="P6" draw:layer="layout" svg:width="27.346cm" svg:height="5.246cm" svg:x="0.5cm" svg:y="5.754cm">
          <draw:image xlink:href="Pictures/100000010000032D0000009C2CA36F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V/b) Lien primitives</text:p>
          </draw:text-box>
        </draw:frame>
        <draw:frame draw:style-name="gr2" draw:text-style-name="P6" draw:layer="layout" svg:width="27.507cm" svg:height="8.157cm" svg:x="0.493cm" svg:y="4.843cm">
          <draw:image xlink:href="Pictures/1000000100000330000000F2E551DE5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V/c) Applic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rapèze</text:p>
              </text:list-item>
            </text:list>
          </draw:text-box>
        </draw:frame>
        <draw:frame draw:style-name="gr2" draw:text-style-name="P6" draw:layer="layout" svg:width="17.329cm" svg:height="11.244cm" svg:x="7.171cm" svg:y="3.257cm">
          <draw:image xlink:href="Pictures/100000010000028F000001A9D71B1DD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IV/c) Applic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ercle</text:p>
              </text:list-item>
            </text:list>
          </draw:text-box>
        </draw:frame>
        <draw:frame draw:style-name="gr2" draw:text-style-name="P6" draw:layer="layout" svg:width="15.557cm" svg:height="10.185cm" svg:x="6.943cm" svg:y="4cm">
          <draw:image xlink:href="Pictures/100000010000024C000001816CE5C3E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IV/c) Applic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ythagore par découpages</text:p>
              </text:list-item>
            </text:list>
          </draw:text-box>
        </draw:frame>
        <draw:frame draw:style-name="gr2" draw:text-style-name="P6" draw:layer="layout" svg:width="8.492cm" svg:height="9.127cm" svg:x="5cm" svg:y="5.5cm">
          <draw:image xlink:href="Pictures/10000001000001410000015977E6A209.png" xlink:type="simple" xlink:show="embed" xlink:actuate="onLoad" draw:mime-type="image/png">
            <text:p/>
          </draw:image>
        </draw:frame>
        <draw:frame draw:style-name="gr2" draw:text-style-name="P6" draw:layer="layout" svg:width="8.624cm" svg:height="8.995cm" svg:x="17.376cm" svg:y="5.505cm">
          <draw:image xlink:href="Pictures/100000010000014600000154FE626AA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IV/c) Applications</text:p>
          </draw:text-box>
        </draw:frame>
        <draw:frame presentation:style-name="pr4" draw:layer="layout" svg:width="25.099cm" svg:height="11.815cm" svg:x="1.5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  <text:p/>
            <text:p/>
            <text:p/>
            <text:p text:style-name="P8"><text:span text:style-name="T4"/></text:p>
          </draw:text-box>
        </draw:frame>
        <draw:frame draw:style-name="gr2" draw:text-style-name="P6" draw:layer="layout" svg:width="11cm" svg:height="11.719cm" svg:x="2.5cm" svg:y="3.565cm">
          <draw:image xlink:href="Pictures/10000001000002270000024BC1F1C6E3.png" xlink:type="simple" xlink:show="embed" xlink:actuate="onLoad" draw:mime-type="image/png">
            <text:p/>
          </draw:image>
        </draw:frame>
        <draw:frame draw:style-name="gr2" draw:text-style-name="P6" draw:layer="layout" svg:width="12.124cm" svg:height="8.5cm" svg:x="14.475cm" svg:y="5cm">
          <draw:image xlink:href="Pictures/1000000100000166000000FB9B1552F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IV/c) Applications</text:p>
          </draw:text-box>
        </draw:frame>
        <draw:frame presentation:style-name="pr4" draw:layer="layout" svg:width="25.099cm" svg:height="11.815cm" svg:x="1.5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  <text:p/>
            <text:p/>
            <text:p/>
            <text:p text:style-name="P8"><text:span text:style-name="T4"/></text:p>
          </draw:text-box>
        </draw:frame>
        <draw:frame draw:style-name="gr2" draw:text-style-name="P6" draw:layer="layout" svg:width="8.191cm" svg:height="11.96cm" svg:x="1.309cm" svg:y="3cm">
          <draw:image xlink:href="Pictures/100000010000020E00000300BF988C5E.png" xlink:type="simple" xlink:show="embed" xlink:actuate="onLoad" draw:mime-type="image/png">
            <text:p/>
          </draw:image>
        </draw:frame>
        <draw:frame draw:style-name="gr2" draw:text-style-name="P6" draw:layer="layout" svg:width="8.58cm" svg:height="11.732cm" svg:x="9.42cm" svg:y="3.268cm">
          <draw:image xlink:href="Pictures/1000000100000208000002C741793130.png" xlink:type="simple" xlink:show="embed" xlink:actuate="onLoad" draw:mime-type="image/png">
            <text:p/>
          </draw:image>
        </draw:frame>
        <draw:frame draw:style-name="gr2" draw:text-style-name="P6" draw:layer="layout" svg:width="9.67cm" svg:height="10cm" svg:x="18cm" svg:y="3.685cm">
          <draw:image xlink:href="Pictures/100000010000020F00000221FF5495B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fr" fo:country="FR" style:letter-kerning="true" style:font-name-asian="F" style:font-family-generic-asian="roman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fr" style:country-complex="FR"/>
    </style:style>
    <style:style style:name="heading_20_1" style:display-name="heading 1" style:family="graphic">
      <style:paragraph-properties fo:margin-top="0.746cm" fo:margin-bottom="0.374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Title" style:family="graphic">
      <style:paragraph-properties fo:text-align="center" style:text-autospace="none"/>
      <style:text-properties fo:font-size="28pt" fo:font-weight="bold" style:font-size-asian="28pt" style:font-weight-asian="bold" style:font-size-complex="28pt" style:font-weight-complex="bold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6T13:07:42.403793900</meta:creation-date>
    <dc:date>2026-06-06T19:23:48.400438666</dc:date>
    <meta:editing-duration>PT1H1M49S</meta:editing-duration>
    <meta:editing-cycles>18</meta:editing-cycles>
    <meta:generator>LibreOffice/26.2.3.2$Linux_X86_64 LibreOffice_project/7d74455cffae7a589951233f185ae0303c082020</meta:generator>
    <meta:document-statistic meta:object-count="199"/>
  </office:meta>
</office:document-meta>
</file>