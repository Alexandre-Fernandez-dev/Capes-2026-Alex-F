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5.209cm" svg:x="1.4cm" svg:y="0.291cm" presentation:class="title" presentation:user-transformed="true">
          <draw:text-box>
            <text:p>Statistiques à une ou deux variables représentation et analyse de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Vocabulair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érie statistiqu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Vocabulair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opulation, individu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/ Vocabulair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aractère : quantitatif, vs quatlitatif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1">II/a) </text:span>Données général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ffectif, effectif total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 Statistiqu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) Données général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1">II/a) </text:span>Données général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ffectif cumulé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1">II/a) </text:span>Données général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équence et fréquences cumulées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b) A une variabl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dicateurs</text:p>
                <text:list>
                  <text:list-item>
                    <text:p>De position</text:p>
                  </text:list-item>
                  <text:list-item>
                    <text:p>De dispersion</text:p>
                  </text:list-item>
                </text:list>
              </text:list-item>
              <text:list-item>
                <text:p>Interprétat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b/1) Indicateurs de posi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yenne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b/1) Indicateurs de posi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yenne : calcul par milieu de chaque classes</text:p>
              </text:list-item>
              <text:list-item>
                <text:p>Même unité que les donnée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b/1) Indicateurs de posi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yenne : Linéarité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b/1) Indicateurs de posi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édiane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b/2) Indicateurs de dispers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yenne : Variance et écart-type</text:p>
              </text:list-item>
              <text:list-item>
                <text:p>Écart-type : même unité que donnée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b/2) Indicateurs de dispers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yenne : Variance et écart-type</text:p>
              </text:list-item>
              <text:list-item>
                <text:p>Écart-type :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/b/2) Indicateurs de dispers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édiane : Quartiles et écart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b/3) Interpréta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biner position + dispersion</text:p>
              </text:list-item>
              <text:list-item>
                <text:p>Médiane + eq interquartile pas sensible aux valeurs extrêm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b/3) Interpréta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yenne + equart type sensible aux valeurs extrème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c/1) A deux variabl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résentation : nuage de points et point moyen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c/2) Ajustemen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justement : Droite d’ajustement affin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c/3) Méthodes d’ajustemen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 jugé 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c/3) Méthodes d’ajustemen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éthode de maye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c/3) Méthodes d’ajustemen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éthode de moindres carré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c/4) Complémen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varianc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c/4) Complémen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efficient de corrélat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c/4) Complémen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en avec moindres carré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I/c/4) Complémen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ésidu quadratiqu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16:49:43.057942472</meta:creation-date>
    <meta:generator>LibreOffice/26.2.4.2$Linux_X86_64 LibreOffice_project/c44d3140fc62714965bf5d98735e0d79ba4b1ebd</meta:generator>
    <dc:date>2026-06-11T17:07:26.076659939</dc:date>
    <meta:editing-duration>PT17M38S</meta:editing-duration>
    <meta:editing-cycles>11</meta:editing-cycles>
    <meta:document-statistic meta:object-count="128"/>
  </office:meta>
</office:document-meta>
</file>