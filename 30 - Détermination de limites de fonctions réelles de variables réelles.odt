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paragraph-properties style:writing-mode="lr-tb" style:writing-mode-automatic="false"/>
      <style:text-properties fo:language="fr" fo:country="FR" officeooo:rsid="01e1e427" officeooo:paragraph-rsid="0207494f"/>
    </style:style>
    <style:style style:name="P2" style:family="paragraph" style:parent-style-name="Heading_20_4">
      <style:text-properties fo:language="fr" fo:country="FR" officeooo:paragraph-rsid="0006c1c5"/>
    </style:style>
    <style:style style:name="P3" style:family="paragraph" style:parent-style-name="Standard">
      <style:text-properties fo:language="fr" fo:country="FR" fo:font-weight="normal" officeooo:rsid="002aae56" officeooo:paragraph-rsid="0006c1c5" style:font-weight-asian="normal" style:font-weight-complex="normal"/>
    </style:style>
    <style:style style:name="P4" style:family="paragraph" style:parent-style-name="Standard">
      <style:text-properties fo:language="fr" fo:country="FR" fo:font-weight="bold" officeooo:rsid="0081bd26" officeooo:paragraph-rsid="0006c1c5" style:font-weight-asian="bold" style:font-weight-complex="bold"/>
    </style:style>
    <style:style style:name="P5" style:family="paragraph" style:parent-style-name="Standard">
      <style:text-properties fo:language="fr" fo:country="FR" fo:font-weight="bold" officeooo:rsid="002aae56" officeooo:paragraph-rsid="0006c1c5" style:font-weight-asian="bold" style:font-weight-complex="bold"/>
    </style:style>
    <style:style style:name="P6" style:family="paragraph" style:parent-style-name="Standard">
      <style:paragraph-properties style:writing-mode="lr-tb"/>
      <style:text-properties officeooo:paragraph-rsid="0006c1c5"/>
    </style:style>
    <style:style style:name="P7" style:family="paragraph" style:parent-style-name="Standard">
      <style:paragraph-properties style:writing-mode="lr-tb"/>
      <style:text-properties fo:font-weight="normal" officeooo:rsid="01e3472a" officeooo:paragraph-rsid="01e3472a" style:font-weight-asian="normal" style:font-weight-complex="normal"/>
    </style:style>
    <style:style style:name="P8" style:family="paragraph" style:parent-style-name="Heading_20_1">
      <style:paragraph-properties fo:break-before="page"/>
      <style:text-properties officeooo:paragraph-rsid="0207e05d"/>
    </style:style>
    <style:style style:name="P9" style:family="paragraph" style:parent-style-name="Heading_20_2">
      <style:text-properties officeooo:rsid="0207e05d" officeooo:paragraph-rsid="0207e05d"/>
    </style:style>
    <style:style style:name="P10" style:family="paragraph" style:parent-style-name="Text_20_body">
      <style:text-properties officeooo:rsid="0207e05d" officeooo:paragraph-rsid="0207e05d"/>
    </style:style>
    <style:style style:name="P11" style:family="paragraph" style:parent-style-name="Text_20_body">
      <style:text-properties officeooo:rsid="0207e05d" officeooo:paragraph-rsid="02094206"/>
    </style:style>
    <style:style style:name="P12" style:family="paragraph" style:parent-style-name="Text_20_body">
      <style:text-properties officeooo:rsid="02094206" officeooo:paragraph-rsid="02094206"/>
    </style:style>
    <style:style style:name="P13" style:family="paragraph" style:parent-style-name="Text_20_body">
      <style:text-properties officeooo:rsid="020b443c" officeooo:paragraph-rsid="020b443c"/>
    </style:style>
    <style:style style:name="P14" style:family="paragraph" style:parent-style-name="Text_20_body">
      <style:text-properties officeooo:rsid="020ad6d1" officeooo:paragraph-rsid="020ad6d1"/>
    </style:style>
    <style:style style:name="P15" style:family="paragraph" style:parent-style-name="Heading_20_1">
      <style:text-properties officeooo:paragraph-rsid="02094206"/>
    </style:style>
    <style:style style:name="T1" style:family="text">
      <style:text-properties fo:font-weight="normal" style:font-weight-asian="normal" style:font-weight-complex="normal"/>
    </style:style>
    <style:style style:name="T2" style:family="text">
      <style:text-properties officeooo:rsid="002c044c"/>
    </style:style>
    <style:style style:name="T3" style:family="text">
      <style:text-properties fo:language="fr" fo:country="FR" fo:font-weight="bold" officeooo:rsid="002aae56" style:font-weight-asian="bold" style:font-weight-complex="bold"/>
    </style:style>
    <style:style style:name="T4" style:family="text">
      <style:text-properties fo:language="fr" fo:country="FR" fo:font-weight="normal" officeooo:rsid="002aae56" style:font-weight-asian="normal" style:font-weight-complex="normal"/>
    </style:style>
    <style:style style:name="T5" style:family="text">
      <style:text-properties fo:font-weight="normal" officeooo:rsid="0194ae76" style:font-weight-asian="normal" style:font-weight-complex="normal"/>
    </style:style>
    <style:style style:name="T6" style:family="text">
      <style:text-properties officeooo:rsid="0207e05d"/>
    </style:style>
    <style:style style:name="T7" style:family="text">
      <style:text-properties officeooo:rsid="020942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étermination de limites de fonctions réelles de variable réelle.</text:p>
      <text:h text:style-name="P2" text:outline-level="4">Rapport jury :</text:h>
      <text:p text:style-name="P3">La leçon « Détermination de limites de fonctions réelles de variable réelle. » a évolué dans son intitulé par rapport aux sessions précédentes. On attend des candidats qu'ils soient en capacité d’écrire les définitions de la limite et qu’ils développent les autres parties du programme dans lesquelles la notion de limite intervient.</text:p>
      <text:p text:style-name="P4">Livres <text:span text:style-name="T1">: </text:span></text:p>
      <text:p text:style-name="P4"/>
      <text:p text:style-name="P5"><text:span text:style-name="T2">Niveau</text:span> <text:span text:style-name="T1">: </text:span></text:p>
      <text:p text:style-name="P6"><text:span text:style-name="T3">Pré-requis </text:span><text:span text:style-name="T4">:</text:span><text:span text:style-name="T5"> </text:span></text:p>
      <text:p text:style-name="P7"/>
      <text:h text:style-name="P8" text:outline-level="1" text:is-list-header="true">I/ Définitions de limites </text:h>
      <text:h text:style-name="P9" text:outline-level="2">a) Limites en l’infini</text:h>
      <text:p text:style-name="P10">Def intuit, Def quantif vers +- inf, ou un point. :</text:p>
      <text:p text:style-name="P10">Ex: limites fonctions usuelles.</text:p>
      <text:p text:style-name="P10">Pareil avec -inf</text:p>
      <text:p text:style-name="P10">Asympt horiz</text:p>
      <text:h text:style-name="P9" text:outline-level="2">b) Limites en un point</text:h>
      <text:p text:style-name="P10">Def intuit, Def quantif vers +- inf, ou un point. :</text:p>
      <text:p text:style-name="P10">Ex: limites fonctions usuelles.</text:p>
      <text:p text:style-name="P10">Contre ex : pas de limite en un point 1/X</text:p>
      <text:p text:style-name="P10">Asympt vert</text:p>
      <text:h text:style-name="P9" text:outline-level="2">c) Limites à droite et à gauche</text:h>
      <text:p text:style-name="P10">Def lim droite et gauche</text:p>
      <text:p text:style-name="P10">1/x a lim droite et gauche.</text:p>
      <text:p text:style-name="P10">Contre exemple sin(1/x)</text:p>
      <text:p text:style-name="P10"/>
      <text:h text:style-name="P8" text:outline-level="1" text:is-list-header="true"><text:span text:style-name="T6">I</text:span>I/ <text:span text:style-name="T6">Opérations sur les</text:span> limites</text:h>
      <text:p text:style-name="P10">Somme, produit, quotient</text:p>
      <text:p text:style-name="P10">formes indeterminées : en soit 2 types</text:p>
      <text:p text:style-name="P10"/>
      <text:p text:style-name="P11">remarques peuvent etre parfois résolues :</text:p>
      <text:p text:style-name="P12"><text:tab/>fraction rationnelles on factorise par + haut degré</text:p>
      <text:p text:style-name="P12"><text:tab/>simplifier expression en multipliant par conjugué</text:p>
      <text:p text:style-name="P10">Exemples : Prop lim poly et fract rationnelle</text:p>
      <text:p text:style-name="P10"/>
      <text:p text:style-name="P13">Composition et limites </text:p>
      <text:h text:style-name="P8" text:outline-level="1"><text:span text:style-name="T6">I</text:span>II/ <text:span text:style-name="T6">Comparaisons de limites</text:span></text:h>
      <text:p text:style-name="P12">a)</text:p>
      <text:p text:style-name="P10">Prrop x vers l’infi et f &lt; g a partir d’un rang.</text:p>
      <text:p text:style-name="P10">Prop similaire pour -inf</text:p>
      <text:p text:style-name="P10">Prop en a</text:p>
      <text:p text:style-name="P10"/>
      <text:p text:style-name="P12">Exemples</text:p>
      <text:p text:style-name="P12"/>
      <text:p text:style-name="P12">Théorème des gendarmes</text:p>
      <text:p text:style-name="P12"/>
      <text:p text:style-name="P12">b) Fonctions usuelles et formes intet</text:p>
      <text:p text:style-name="P14">CROISSANCE comparée</text:p>
      <text:p text:style-name="P12">en l’infini :</text:p>
      <text:p text:style-name="P12">x^m / x^n</text:p>
      <text:p text:style-name="P12">e^x/ x^n</text:p>
      <text:p text:style-name="P12">ln(x) / x n</text:p>
      <text:p text:style-name="P12">x^n / sq(x)</text:p>
      <text:p text:style-name="P12">en 0</text:p>
      <text:p text:style-name="P12">sin(x) / x</text:p>
      <text:p text:style-name="P12">Appl : x e^{-x^2}</text:p>
      <text:p text:style-name="P12"/>
      <text:h text:style-name="P15" text:outline-level="1" text:is-list-header="true"><text:span text:style-name="T6">I</text:span><text:span text:style-name="T7">V</text:span>/ <text:span text:style-name="T7">Applications</text:span></text:h>
      <text:p text:style-name="P12">Exos : evol population, alcoleemie</text:p>
      <text:p text:style-name="P12">Calcul lim sinx / x</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7T13:05:57.347693646</meta:creation-date>
    <meta:generator>LibreOffice/26.2.3.2$Linux_X86_64 LibreOffice_project/ca14918b0fa569b9db704e10d20c5d2a5a16ac6d</meta:generator>
    <dc:date>2026-05-12T20:35:27.711557409</dc:date>
    <meta:editing-duration>P2DT10H2M21S</meta:editing-duration>
    <meta:editing-cycles>378</meta:editing-cycles>
    <meta:document-statistic meta:table-count="0" meta:image-count="0" meta:object-count="0" meta:page-count="4" meta:paragraph-count="49" meta:word-count="269" meta:character-count="1514" meta:non-whitespace-character-count="1287"/>
  </office:meta>
</office:document-meta>
</file>