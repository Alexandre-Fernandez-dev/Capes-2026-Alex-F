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8000002E332EA36FD.png" manifest:media-type="image/png"/>
  <manifest:file-entry manifest:full-path="Pictures/100000010000034200000233F04CD7C6.png" manifest:media-type="image/png"/>
  <manifest:file-entry manifest:full-path="Pictures/1000000100000356000001978F3DEC3E.png" manifest:media-type="image/png"/>
  <manifest:file-entry manifest:full-path="Pictures/10000001000001AE0000006FA5AB006B.png" manifest:media-type="image/png"/>
  <manifest:file-entry manifest:full-path="Pictures/10000001000001E400000052E3F78F07.png" manifest:media-type="image/png"/>
  <manifest:file-entry manifest:full-path="Pictures/100000010000021A00000109F6D286FC.png" manifest:media-type="image/png"/>
  <manifest:file-entry manifest:full-path="Pictures/100000010000021F00000176EB02DF26.png" manifest:media-type="image/png"/>
  <manifest:file-entry manifest:full-path="Pictures/10000001000003400000009D9407145D.png" manifest:media-type="image/png"/>
  <manifest:file-entry manifest:full-path="Pictures/10000001000002D1000000580A38D1D2.png" manifest:media-type="image/png"/>
  <manifest:file-entry manifest:full-path="Pictures/100000010000024E000000BF9C3FC38D.png" manifest:media-type="image/png"/>
  <manifest:file-entry manifest:full-path="Pictures/10000001000003780000008ACE10382D.png" manifest:media-type="image/png"/>
  <manifest:file-entry manifest:full-path="Pictures/10000001000002EC00000092BC6DF110.png" manifest:media-type="image/png"/>
  <manifest:file-entry manifest:full-path="Pictures/10000001000005BD000000AB7D04B091.png" manifest:media-type="image/png"/>
  <manifest:file-entry manifest:full-path="Pictures/1000000100000307000002004F71E54E.png" manifest:media-type="image/png"/>
  <manifest:file-entry manifest:full-path="Pictures/100000010000023C00000156B6B62949.png" manifest:media-type="image/png"/>
  <manifest:file-entry manifest:full-path="Pictures/10000001000002EC000000BCC8EC8BF8.png" manifest:media-type="image/png"/>
  <manifest:file-entry manifest:full-path="Pictures/100000010000030B00000257985158F4.png" manifest:media-type="image/png"/>
  <manifest:file-entry manifest:full-path="Pictures/100000010000022300000223FC8A4BBA.png" manifest:media-type="image/png"/>
  <manifest:file-entry manifest:full-path="Pictures/100000010000031A000000600BE7BCEA.png" manifest:media-type="image/png"/>
  <manifest:file-entry manifest:full-path="Pictures/100000010000018A00000188D1054945.png" manifest:media-type="image/png"/>
  <manifest:file-entry manifest:full-path="Pictures/10000001000002FA0000009AD31078C9.png" manifest:media-type="image/png"/>
  <manifest:file-entry manifest:full-path="Pictures/100000010000037B00000036116B00A2.png" manifest:media-type="image/png"/>
  <manifest:file-entry manifest:full-path="Pictures/10000001000005B9000001BD0307C14A.png" manifest:media-type="image/png"/>
  <manifest:file-entry manifest:full-path="Pictures/100000010000034F0000010A00F1BF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fo:min-height="3.473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3cm" fo:margin-bottom="0.212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2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<text:span text:style-name="T1">Exemples de résolution de problèmes de géométrie plane à l’aide des vecteurs.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(seconde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draw:style-name="gr2" draw:text-style-name="P3" draw:layer="layout" svg:width="22.012cm" svg:height="4.153cm" svg:x="2.988cm" svg:y="5cm">
          <draw:image xlink:href="Pictures/10000001000003400000009D9407145D.png" xlink:type="simple" xlink:show="embed" xlink:actuate="onLoad" draw:mime-type="image/png">
            <text:p/>
          </draw:image>
        </draw:frame>
        <draw:frame draw:style-name="gr2" draw:text-style-name="P3" draw:layer="layout" svg:width="20.16cm" svg:height="4.074cm" svg:x="2.5cm" svg:y="9.426cm">
          <draw:image xlink:href="Pictures/10000001000002FA0000009AD31078C9.png" xlink:type="simple" xlink:show="embed" xlink:actuate="onLoad" draw:mime-type="image/png">
            <text:p/>
          </draw:image>
        </draw:frame>
        <draw:frame draw:style-name="gr2" draw:text-style-name="P3" draw:layer="layout" svg:width="23.532cm" svg:height="4.592cm" svg:x="3.067cm" svg:y="2.908cm">
          <draw:image xlink:href="Pictures/10000001000002EC00000092BC6DF1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presentation:style-name="pr4" draw:layer="layout" svg:width="25.199cm" svg:height="9.134cm" svg:x="1.4cm" svg:y="2.366cm" presentation:class="outline" presentation:user-transformed="true">
          <draw:text-box>
            <text:p>Vecteurs et parallélogrammes</text:p>
            <text:p/>
          </draw:text-box>
        </draw:frame>
        <draw:frame draw:style-name="gr2" draw:text-style-name="P3" draw:layer="layout" svg:width="21.887cm" svg:height="5.5cm" svg:x="3.113cm" svg:y="9cm">
          <draw:image xlink:href="Pictures/10000001000002EC000000BCC8EC8BF8.png" xlink:type="simple" xlink:show="embed" xlink:actuate="onLoad" draw:mime-type="image/png">
            <text:p/>
          </draw:image>
        </draw:frame>
        <draw:frame draw:style-name="gr2" draw:text-style-name="P3" draw:layer="layout" svg:width="21.007cm" svg:height="2.539cm" svg:x="2.993cm" svg:y="4.461cm">
          <draw:image xlink:href="Pictures/100000010000031A000000600BE7B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draw:style-name="gr2" draw:text-style-name="P3" draw:layer="layout" svg:width="12cm" svg:height="12cm" svg:x="2cm" svg:y="3cm">
          <draw:image xlink:href="Pictures/100000010000022300000223FC8A4BBA.png" xlink:type="simple" xlink:show="embed" xlink:actuate="onLoad" draw:mime-type="image/png">
            <text:p/>
          </draw:image>
        </draw:frame>
        <draw:frame draw:style-name="gr2" draw:text-style-name="P3" draw:layer="layout" svg:width="10.424cm" svg:height="10.371cm" svg:x="16cm" svg:y="3.257cm">
          <draw:image xlink:href="Pictures/100000010000018A00000188D10549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Relation de Chasles, colinéarité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Montrer points alignés en utilisant la proportionnalité</text:p>
            <text:p/>
          </draw:text-box>
        </draw:frame>
        <draw:frame draw:style-name="gr2" draw:text-style-name="P3" draw:layer="layout" svg:width="22.657cm" svg:height="2.764cm" svg:x="1.5cm" svg:y="6.736cm">
          <draw:image xlink:href="Pictures/10000001000002D1000000580A38D1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draw:style-name="gr2" draw:text-style-name="P3" draw:layer="layout" svg:width="23.573cm" svg:height="1.428cm" svg:x="2cm" svg:y="4.5cm">
          <draw:image xlink:href="Pictures/100000010000037B00000036116B00A2.png" xlink:type="simple" xlink:show="embed" xlink:actuate="onLoad" draw:mime-type="image/png">
            <text:p/>
          </draw:image>
        </draw:frame>
        <draw:frame draw:style-name="gr2" draw:text-style-name="P3" draw:layer="layout" svg:width="20.999cm" svg:height="6.378cm" svg:x="3.501cm" svg:y="5.928cm">
          <draw:image xlink:href="Pictures/10000001000005B9000001BD0307C14A.png" xlink:type="simple" xlink:show="embed" xlink:actuate="onLoad" draw:mime-type="image/png">
            <text:p/>
          </draw:image>
        </draw:frame>
        <draw:frame draw:style-name="gr2" draw:text-style-name="P3" draw:layer="layout" svg:width="21.499cm" svg:height="2.502cm" svg:x="3.501cm" svg:y="12.306cm">
          <draw:image xlink:href="Pictures/10000001000005BD000000AB7D04B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f eq cart. + prop points sur droite ssi solution</text:p>
              </text:list-item>
            </text:list>
          </draw:text-box>
        </draw:frame>
        <draw:frame draw:style-name="gr2" draw:text-style-name="P3" draw:layer="layout" svg:width="22.409cm" svg:height="7.037cm" svg:x="3.091cm" svg:y="5.5cm">
          <draw:image xlink:href="Pictures/100000010000034F0000010A00F1B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o tablette de chocolat « magique » on trouve l’astuce à car 2 vecteurs semblant alignés, ne sont pas colinéaire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draw:style-name="gr2" draw:text-style-name="P3" draw:layer="layout" svg:width="24.6cm" svg:height="7.964cm" svg:x="1.4cm" svg:y="3.679cm">
          <draw:image xlink:href="Pictures/100000010000024E000000BF9C3FC3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I/ Déterminant et équations cartésiennes de droites</text:p>
          </draw:text-box>
        </draw:frame>
        <draw:frame draw:style-name="gr2" draw:text-style-name="P3" draw:layer="layout" svg:width="14.366cm" svg:height="9.894cm" svg:x="1cm" svg:y="4cm">
          <draw:image xlink:href="Pictures/100000010000021F00000176EB02DF26.png" xlink:type="simple" xlink:show="embed" xlink:actuate="onLoad" draw:mime-type="image/png">
            <text:p/>
          </draw:image>
        </draw:frame>
        <draw:frame draw:style-name="gr2" draw:text-style-name="P3" draw:layer="layout" svg:width="11.799cm" svg:height="5.811cm" svg:x="15.701cm" svg:y="5.689cm">
          <draw:image xlink:href="Pictures/100000010000021A00000109F6D286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ractérisations du cercle</text:p>
              </text:list-item>
            </text:list>
          </draw:text-box>
        </draw:frame>
        <draw:frame draw:style-name="gr2" draw:text-style-name="P3" draw:layer="layout" svg:width="15.133cm" svg:height="9.048cm" svg:x="4.867cm" svg:y="6cm">
          <draw:image xlink:href="Pictures/100000010000023C00000156B6B629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-Kashi</text:p>
                <text:p/>
                <text:p/>
                <text:p><text:s/></text:p>
                <text:p>Preuve vectorielle développe carré sclaire</text:p>
              </text:list-header>
            </text:list>
          </draw:text-box>
        </draw:frame>
        <draw:frame draw:style-name="gr2" draw:text-style-name="P3" draw:layer="layout" svg:width="27cm" svg:height="4.574cm" svg:x="0cm" svg:y="5.426cm">
          <draw:image xlink:href="Pictures/10000001000001E400000052E3F78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quation cartésienne de droite et vec normal.</text:p>
              </text:list-item>
            </text:list>
          </draw:text-box>
        </draw:frame>
        <draw:frame draw:style-name="gr2" draw:text-style-name="P3" draw:layer="layout" svg:width="11.376cm" svg:height="2.936cm" svg:x="6cm" svg:y="6cm">
          <draw:image xlink:href="Pictures/10000001000001AE0000006FA5AB006B.png" xlink:type="simple" xlink:show="embed" xlink:actuate="onLoad" draw:mime-type="image/png">
            <text:p/>
          </draw:image>
        </draw:frame>
        <draw:frame draw:style-name="gr2" draw:text-style-name="P3" draw:layer="layout" svg:width="23.494cm" svg:height="3.65cm" svg:x="1cm" svg:y="9.35cm">
          <draw:image xlink:href="Pictures/10000001000003780000008ACE103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I/ Produit scalai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plication en physique : </text:p>
                <text:p/>
              </text:list-item>
            </text:list>
          </draw:text-box>
        </draw:frame>
        <draw:frame draw:style-name="gr2" draw:text-style-name="P3" draw:layer="layout" svg:width="15cm" svg:height="9.909cm" svg:x="4.5cm" svg:y="5cm">
          <draw:image xlink:href="Pictures/1000000100000307000002004F71E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V / Barycentres</text:p>
          </draw:text-box>
        </draw:frame>
        <draw:frame draw:style-name="gr2" draw:text-style-name="P3" draw:layer="layout" svg:width="14.424cm" svg:height="6.874cm" svg:x="0.076cm" svg:y="5cm">
          <draw:image xlink:href="Pictures/1000000100000356000001978F3DEC3E.png" xlink:type="simple" xlink:show="embed" xlink:actuate="onLoad" draw:mime-type="image/png">
            <text:p/>
          </draw:image>
        </draw:frame>
        <draw:frame draw:style-name="gr2" draw:text-style-name="P3" draw:layer="layout" svg:width="10.481cm" svg:height="7.075cm" svg:x="14.5cm" svg:y="5.425cm">
          <draw:image xlink:href="Pictures/100000010000034200000233F04CD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199cm" svg:height="2.629cm" svg:x="1.4cm" svg:y="0.628cm" presentation:class="title">
          <draw:text-box>
            <text:p>IV / Barycentres</text:p>
          </draw:text-box>
        </draw:frame>
        <draw:frame draw:style-name="gr2" draw:text-style-name="P3" draw:layer="layout" svg:width="16.315cm" svg:height="12.545cm" svg:x="5.685cm" svg:y="2.955cm">
          <draw:image xlink:href="Pictures/100000010000030B00000257985158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V / Barycent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roite d’euler</text:p>
              </text:list-item>
            </text:list>
          </draw:text-box>
        </draw:frame>
        <draw:frame draw:style-name="gr2" draw:text-style-name="P3" draw:layer="layout" svg:width="23.999cm" svg:height="10.03cm" svg:x="1.4cm" svg:y="4.97cm">
          <draw:image xlink:href="Pictures/10000001000006E8000002E332EA36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fr" fo:country="FR" style:letter-kerning="true" style:font-name-asian="DejaVu Sans" style:font-family-asian="'DejaVu Sans'" style:font-family-generic-asian="roman" style:font-pitch-asian="variable" style:language-asian="zh" style:country-asian="CN" style:font-name-complex="Noto Sans Devanagari" style:font-family-complex="'Noto Sans Devanagari'" style:font-pitch-complex="variable" style:font-size-complex="12pt" style:language-complex="fr" style:country-complex="F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itle" style:family="graphic">
      <style:paragraph-properties fo:text-align="center" style:text-autospace="none"/>
      <style:text-properties fo:font-size="28pt" fo:font-weight="bold" style:font-size-asian="28pt" style:font-weight-asian="bold" style:font-size-complex="28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16:09:26.230827608</meta:creation-date>
    <meta:generator>LibreOffice/26.2.4.2$Linux_X86_64 LibreOffice_project/c44d3140fc62714965bf5d98735e0d79ba4b1ebd</meta:generator>
    <dc:date>2026-06-09T19:27:33.289098327</dc:date>
    <meta:editing-duration>PT48M58S</meta:editing-duration>
    <meta:editing-cycles>7</meta:editing-cycles>
    <meta:document-statistic meta:object-count="110"/>
  </office:meta>
</office:document-meta>
</file>