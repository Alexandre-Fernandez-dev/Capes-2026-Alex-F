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E00000124FC0DA15F.png" manifest:media-type="image/png"/>
  <manifest:file-entry manifest:full-path="Pictures/1000000100000201000001A4731EC18A.png" manifest:media-type="image/png"/>
  <manifest:file-entry manifest:full-path="Pictures/10000001000002E500000160932A88FD.png" manifest:media-type="image/png"/>
  <manifest:file-entry manifest:full-path="Pictures/100000010000033B0000019D7F6CAF23.png" manifest:media-type="image/png"/>
  <manifest:file-entry manifest:full-path="Pictures/1000000100000339000001E69B0925FD.png" manifest:media-type="image/png"/>
  <manifest:file-entry manifest:full-path="Pictures/10000001000003180000020D5E2AAAF6.png" manifest:media-type="image/png"/>
  <manifest:file-entry manifest:full-path="Pictures/100000010000035500000137D792732B.png" manifest:media-type="image/png"/>
  <manifest:file-entry manifest:full-path="Pictures/100000010000035F00000142D7D4F2D8.png" manifest:media-type="image/png"/>
  <manifest:file-entry manifest:full-path="Pictures/100000010000037D0000007DBF898177.png" manifest:media-type="image/png"/>
  <manifest:file-entry manifest:full-path="Pictures/100000010000032D0000021A12BAE0DA.png" manifest:media-type="image/png"/>
  <manifest:file-entry manifest:full-path="Pictures/10000001000001D30000007DBD267972.png" manifest:media-type="image/png"/>
  <manifest:file-entry manifest:full-path="Pictures/10000001000002F0000000ED7B46B4DE.png" manifest:media-type="image/png"/>
  <manifest:file-entry manifest:full-path="Pictures/1000000100000376000000B8D52BC3A1.png" manifest:media-type="image/png"/>
  <manifest:file-entry manifest:full-path="Pictures/100000010000030D0000017822B8F73F.png" manifest:media-type="image/png"/>
  <manifest:file-entry manifest:full-path="Pictures/100000010000037C000000787D55E66D.png" manifest:media-type="image/png"/>
  <manifest:file-entry manifest:full-path="Pictures/10000001000001F6000000B1EC087186.png" manifest:media-type="image/png"/>
  <manifest:file-entry manifest:full-path="Pictures/10000001000003300000009BB43ED01D.png" manifest:media-type="image/png"/>
  <manifest:file-entry manifest:full-path="Pictures/10000001000003430000011454011EBE.png" manifest:media-type="image/png"/>
  <manifest:file-entry manifest:full-path="Pictures/1000000100000322000000F80186BB7E.png" manifest:media-type="image/png"/>
  <manifest:file-entry manifest:full-path="Pictures/100000010000036C00000096340DDDD6.png" manifest:media-type="image/png"/>
  <manifest:file-entry manifest:full-path="Pictures/1000000100000310000001E38C0894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3cm" fo:margin-bottom="0.212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ourcentages et taux d’évolu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Proportionnalité</text:p>
          </draw:text-box>
        </draw:frame>
        <draw:frame draw:style-name="gr2" draw:text-style-name="P4" draw:layer="layout" svg:width="23.6cm" svg:height="3.174cm" svg:x="1.5cm" svg:y="3cm">
          <draw:image xlink:href="Pictures/100000010000037C000000787D55E66D.png" xlink:type="simple" xlink:show="embed" xlink:actuate="onLoad" draw:mime-type="image/png">
            <text:p/>
          </draw:image>
        </draw:frame>
        <draw:frame draw:style-name="gr2" draw:text-style-name="P4" draw:layer="layout" svg:width="22.568cm" svg:height="8.228cm" svg:x="3cm" svg:y="6.174cm">
          <draw:image xlink:href="Pictures/100000010000035500000137D79273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Proportionnalité (intro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ableau de propro</text:p>
              </text:list-item>
            </text:list>
          </draw:text-box>
        </draw:frame>
        <draw:frame draw:style-name="gr2" draw:text-style-name="P4" draw:layer="layout" svg:width="23.626cm" svg:height="3.306cm" svg:x="1.874cm" svg:y="5cm">
          <draw:image xlink:href="Pictures/100000010000037D0000007DBF898177.png" xlink:type="simple" xlink:show="embed" xlink:actuate="onLoad" draw:mime-type="image/png">
            <text:p/>
          </draw:image>
        </draw:frame>
        <draw:frame draw:style-name="gr2" draw:text-style-name="P4" draw:layer="layout" svg:width="21.589cm" svg:height="4.1cm" svg:x="2.5cm" svg:y="8.719cm">
          <draw:image xlink:href="Pictures/10000001000003300000009BB43ED0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I/ Proportionnalité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xemple en 3ème</text:p>
              </text:list-item>
            </text:list>
          </draw:text-box>
        </draw:frame>
        <draw:frame draw:style-name="gr2" draw:text-style-name="P5" draw:layer="layout" svg:width="16cm" svg:height="5.042cm" svg:x="3.5cm" svg:y="5cm">
          <draw:image xlink:href="Pictures/10000001000002F0000000ED7B46B4DE.png" xlink:type="simple" xlink:show="embed" xlink:actuate="onLoad" draw:mime-type="image/png">
            <text:p/>
          </draw:image>
        </draw:frame>
        <draw:frame draw:style-name="gr2" draw:text-style-name="P4" draw:layer="layout" svg:width="20.842cm" svg:height="4.327cm" svg:x="3.158cm" svg:y="10cm">
          <draw:image xlink:href="Pictures/1000000100000376000000B8D52BC3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I/ Proportionnalité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x : homotéties 3eme</text:p>
              </text:list-item>
            </text:list>
          </draw:text-box>
        </draw:frame>
        <draw:frame draw:style-name="gr2" draw:text-style-name="P4" draw:layer="layout" svg:width="25.141cm" svg:height="8.863cm" svg:x="2cm" svg:y="5.137cm">
          <draw:image xlink:href="Pictures/10000001000001F6000000B1EC08718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a) Pourcentag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Def : proportion par rapport 100 (6ème)</text:p>
              </text:list-item>
            </text:list>
          </draw:text-box>
        </draw:frame>
        <draw:frame draw:style-name="gr2" draw:text-style-name="P4" draw:layer="layout" svg:width="22.092cm" svg:height="7.302cm" svg:x="2.5cm" svg:y="5.5cm">
          <draw:image xlink:href="Pictures/10000001000003430000011454011E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 Pourcentag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pplicquer taux / coefficient </text:p>
              </text:list-item>
            </text:list>
          </draw:text-box>
        </draw:frame>
        <draw:frame draw:style-name="gr2" draw:text-style-name="P4" draw:layer="layout" svg:width="21.219cm" svg:height="6.561cm" svg:x="2.781cm" svg:y="6cm">
          <draw:image xlink:href="Pictures/1000000100000322000000F80186BB7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 Propor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alculs : règle trois.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2" draw:text-style-name="P4" draw:layer="layout" svg:width="18.503cm" svg:height="4.951cm" svg:x="5cm" svg:y="5.049cm">
          <draw:image xlink:href="Pictures/10000001000001D30000007DBD26797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I/ Proportions</text:p>
          </draw:text-box>
        </draw:frame>
        <draw:frame draw:style-name="gr2" draw:text-style-name="P4" draw:layer="layout" svg:width="23.177cm" svg:height="3.968cm" svg:x="1.64cm" svg:y="3.5cm">
          <draw:image xlink:href="Pictures/100000010000036C00000096340DDDD6.png" xlink:type="simple" xlink:show="embed" xlink:actuate="onLoad" draw:mime-type="image/png">
            <text:p/>
          </draw:image>
        </draw:frame>
        <draw:frame draw:style-name="gr2" draw:text-style-name="P4" draw:layer="layout" svg:width="17.5cm" svg:height="6.529cm" svg:x="1.5cm" svg:y="8cm">
          <draw:image xlink:href="Pictures/100000010000035F00000142D7D4F2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<text:span text:style-name="T2">II/ </text:span>Propor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 text:style-name="P6">Proportion d’une proportion, composition. (2nd)</text:p>
                <text:p text:style-name="P6"/>
              </text:list-item>
            </text:list>
          </draw:text-box>
        </draw:frame>
        <draw:frame draw:style-name="gr2" draw:text-style-name="P4" draw:layer="layout" svg:width="15.642cm" svg:height="9.636cm" svg:x="5.358cm" svg:y="4.864cm">
          <draw:image xlink:href="Pictures/1000000100000310000001E38C0894C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<text:span text:style-name="T2">II/ </text:span>Propor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 text:style-name="P6">Application aux proba conditionelles en 1ère</text:p>
                <text:p text:style-name="P6"/>
              </text:list-item>
            </text:list>
          </draw:text-box>
        </draw:frame>
        <draw:frame draw:style-name="gr2" draw:text-style-name="P4" draw:layer="layout" svg:width="15.206cm" svg:height="10.08cm" svg:x="6.5cm" svg:y="5.42cm">
          <draw:image xlink:href="Pictures/10000001000003180000020D5E2AAAF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/ </text:span>Proportions</text:p>
          </draw:text-box>
        </draw:frame>
        <draw:frame draw:style-name="gr2" draw:text-style-name="P4" draw:layer="layout" svg:width="20.663cm" svg:height="9.947cm" svg:x="4cm" svg:y="4.053cm">
          <draw:image xlink:href="Pictures/100000010000030D0000017822B8F73F.png" xlink:type="simple" xlink:show="embed" xlink:actuate="onLoad" draw:mime-type="image/png">
            <text:p/>
          </draw:image>
        </draw:frame>
        <draw:frame draw:style-name="gr3" draw:text-style-name="P7" draw:layer="layout" svg:width="21cm" svg:height="12cm" svg:x="3cm" svg:y="3cm">
          <draw:text-box>
            <text:p>En 2nd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<text:span text:style-name="T2">II/ </text:span>Proportions</text:p>
          </draw:text-box>
        </draw:frame>
        <draw:frame draw:style-name="gr2" draw:text-style-name="P4" draw:layer="layout" svg:width="21cm" svg:height="12.371cm" svg:x="3cm" svg:y="2.629cm">
          <draw:image xlink:href="Pictures/1000000100000339000001E69B0925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/ </text:span>Proportions</text:p>
          </draw:text-box>
        </draw:frame>
        <draw:frame draw:style-name="gr2" draw:text-style-name="P4" draw:layer="layout" svg:width="17.984cm" svg:height="11.901cm" svg:x="6cm" svg:y="3cm">
          <draw:image xlink:href="Pictures/100000010000032D0000021A12BAE0DA.png" xlink:type="simple" xlink:show="embed" xlink:actuate="onLoad" draw:mime-type="image/png">
            <text:p/>
          </draw:image>
        </draw:frame>
        <draw:frame draw:style-name="gr3" draw:text-style-name="P7" draw:layer="layout" svg:width="21cm" svg:height="12cm" svg:x="3cm" svg:y="3cm">
          <draw:text-box>
            <text:p>En 2nd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/ </text:span>Proportions</text:p>
          </draw:text-box>
        </draw:frame>
        <draw:frame presentation:style-name="pr3" draw:layer="layout" svg:width="25cm" svg:height="1.5cm" svg:x="1.5cm" svg:y="13cm" presentation:class="outline" presentation:user-transformed="true">
          <draw:text-box>
            <text:list text:style-name="L3">
              <text:list-header>
                <text:p><text:span text:style-name="T3">Lien avec moyenne géométrique : Taux d’évolution moyen.</text:span></text:p>
              </text:list-header>
            </text:list>
          </draw:text-box>
        </draw:frame>
        <draw:frame draw:style-name="gr2" draw:text-style-name="P4" draw:layer="layout" svg:width="20.186cm" svg:height="10.08cm" svg:x="1.4cm" svg:y="2.5cm">
          <draw:image xlink:href="Pictures/100000010000033B0000019D7F6CAF2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I/ Applications</text:span></text:p>
          </draw:text-box>
        </draw:frame>
        <draw:frame draw:style-name="gr2" draw:text-style-name="P4" draw:layer="layout" svg:width="19.605cm" svg:height="9.312cm" svg:x="2.317cm" svg:y="4.688cm">
          <draw:image xlink:href="Pictures/10000001000002E500000160932A88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I/ Applications</text:span></text:p>
          </draw:text-box>
        </draw:frame>
        <draw:frame presentation:style-name="pr3" draw:layer="layout" svg:width="25.199cm" svg:height="9.134cm" svg:x="1.301cm" svg:y="4.366cm" presentation:class="outline" presentation:user-transformed="true">
          <draw:text-box>
            <text:list text:style-name="L3">
              <text:list-item>
                <text:p>TV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I/ Applications</text:span></text:p>
          </draw:text-box>
        </draw:frame>
        <draw:frame presentation:style-name="pr3" draw:layer="layout" svg:width="25.199cm" svg:height="9.134cm" svg:x="1.301cm" svg:y="4.366cm" presentation:class="outline" presentation:user-transformed="true">
          <draw:text-box>
            <text:list text:style-name="L3">
              <text:list-item>
                <text:p>Indices loyer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I/ Applications</text:span></text:p>
          </draw:text-box>
        </draw:frame>
        <draw:frame draw:style-name="gr2" draw:text-style-name="P4" draw:layer="layout" svg:width="10.992cm" svg:height="9cm" svg:x="2.508cm" svg:y="4cm">
          <draw:image xlink:href="Pictures/1000000100000201000001A4731EC18A.png" xlink:type="simple" xlink:show="embed" xlink:actuate="onLoad" draw:mime-type="image/png">
            <text:p/>
          </draw:image>
        </draw:frame>
        <draw:frame draw:style-name="gr2" draw:text-style-name="P4" draw:layer="layout" svg:width="10.916cm" svg:height="6.06cm" svg:x="14cm" svg:y="5cm">
          <draw:image xlink:href="Pictures/100000010000020E00000124FC0DA1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I/ Applications</text:span></text:p>
          </draw:text-box>
        </draw:frame>
        <draw:frame presentation:style-name="pr3" draw:layer="layout" svg:width="25.199cm" svg:height="9.134cm" svg:x="1.301cm" svg:y="4.366cm" presentation:class="outline" presentation:user-transformed="true">
          <draw:text-box>
            <text:list text:style-name="L3">
              <text:list-item>
                <text:p>Constante e : limites taux interet composé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2">III/ Applications</text:span></text:p>
          </draw:text-box>
        </draw:frame>
        <draw:frame presentation:style-name="pr3" draw:layer="layout" svg:width="25.199cm" svg:height="9.134cm" svg:x="1.301cm" svg:y="4.366cm" presentation:class="outline" presentation:user-transformed="true">
          <draw:text-box>
            <text:list text:style-name="L3">
              <text:list-item>
                <text:p>Proba conditionnelles et proportion d’une proportion (avec tableau) 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fr" fo:country="FR" style:letter-kerning="true" style:font-name-asian="F" style:font-family-generic-asian="roman" style:language-asian="zh" style:country-asian="CN" style:font-name-complex="Noto Sans Devanagari1" style:font-family-complex="'Noto Sans Devanagari'" style:font-pitch-complex="variable" style:font-size-complex="12pt" style:language-complex="fr" style:country-complex="FR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Title" style:family="graphic">
      <style:paragraph-properties fo:text-align="center" style:text-autospace="none"/>
      <style:text-properties fo:font-size="28pt" fo:font-weight="bold" style:font-size-asian="28pt" style:font-weight-asian="bold" style:font-size-complex="28pt" style:font-weight-complex="bold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0T14:21:43.355463145</meta:creation-date>
    <dc:date>2026-06-11T15:51:15.706767328</dc:date>
    <meta:editing-duration>PT2H13M26S</meta:editing-duration>
    <meta:editing-cycles>11</meta:editing-cycles>
    <meta:generator>LibreOffice/26.2.4.2$Linux_X86_64 LibreOffice_project/c44d3140fc62714965bf5d98735e0d79ba4b1ebd</meta:generator>
    <meta:document-statistic meta:object-count="120"/>
  </office:meta>
</office:document-meta>
</file>