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424da0" officeooo:paragraph-rsid="01424da0"/>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language="fr" fo:country="FR" fo:font-style="normal" style:text-underline-style="none" fo:font-weight="normal" officeooo:rsid="00ea9481" officeooo:paragraph-rsid="0006c1c5" style:font-style-asian="normal" style:font-weight-asian="normal" style:font-style-complex="normal" style:font-weight-complex="normal"/>
    </style:style>
    <style:style style:name="P8" style:family="paragraph" style:parent-style-name="Standard">
      <style:paragraph-properties style:writing-mode="lr-tb"/>
      <style:text-properties fo:language="fr" fo:country="FR" fo:font-style="normal" style:text-underline-style="none" fo:font-weight="normal" officeooo:rsid="0138f2a8" officeooo:paragraph-rsid="0138f2a8" style:font-style-asian="normal" style:font-weight-asian="normal" style:font-style-complex="normal" style:font-weight-complex="normal"/>
    </style:style>
    <style:style style:name="P9" style:family="paragraph" style:parent-style-name="Standard" style:list-style-name="L1">
      <style:paragraph-properties style:writing-mode="lr-tb"/>
      <style:text-properties fo:language="fr" fo:country="FR" fo:font-style="normal" style:text-underline-style="none" fo:font-weight="normal" officeooo:rsid="01443acf" officeooo:paragraph-rsid="01443acf" style:font-style-asian="normal" style:font-weight-asian="normal" style:font-style-complex="normal" style:font-weight-complex="normal"/>
    </style:style>
    <style:style style:name="P10" style:family="paragraph" style:parent-style-name="Standard" style:list-style-name="L1">
      <style:paragraph-properties style:writing-mode="lr-tb"/>
      <style:text-properties fo:language="fr" fo:country="FR" fo:font-style="normal" style:text-underline-style="none" fo:font-weight="normal" officeooo:rsid="01448d8b" officeooo:paragraph-rsid="01448d8b" style:font-style-asian="normal" style:font-weight-asian="normal" style:font-style-complex="normal" style:font-weight-complex="normal"/>
    </style:style>
    <style:style style:name="P11" style:family="paragraph" style:parent-style-name="Standard" style:list-style-name="L1">
      <style:paragraph-properties style:writing-mode="lr-tb"/>
      <style:text-properties fo:language="fr" fo:country="FR" fo:font-style="normal" style:text-underline-style="none" fo:font-weight="normal" officeooo:rsid="01443acf" officeooo:paragraph-rsid="0144a8e4" style:font-style-asian="normal" style:font-weight-asian="normal" style:font-style-complex="normal" style:font-weight-complex="normal"/>
    </style:style>
    <style:style style:name="P12" style:family="paragraph" style:parent-style-name="Standard" style:list-style-name="L1">
      <style:paragraph-properties style:writing-mode="lr-tb"/>
      <style:text-properties fo:language="fr" fo:country="FR" fo:font-style="normal" style:text-underline-style="none" fo:font-weight="normal" officeooo:rsid="01448d8b" officeooo:paragraph-rsid="0144a8e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centages et taux d’évolution.</text:p>
      <text:h text:style-name="P2" text:outline-level="4">Rapport jury :</text:h>
      <text:p text:style-name="P3">La leçon « Pourcentages et taux d’évolution « reste très souvent limitée au programme du cycle 4. Une préparation soutenue devrait conduire les candidats à proposer des applications pertinentes de niveau lycée et à s’appuyer sur leurs connaissances du supérieur. Pour ces leçons, il est attendu des définitions rigoureuses, la démonstration des propriétés utilisées et la justification des méthodes proposées. L’illustration par des exemples contextualisés est appréciable, par exemple l’évocation de situations issues du domaine bancaire, commercial, fiscal. Le taux moyen doit être connu</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p text:style-name="P8">Plan :</text:p>
      <text:list text:style-name="L1">
        <text:list-item>
          <text:p text:style-name="P9">Proportionnalité et pourcentage</text:p>
          <text:list>
            <text:list-item>
              <text:p text:style-name="P9">Proportionnalité</text:p>
              <text:list>
                <text:list-item>
                  <text:p text:style-name="P9">Def quantités proportionnelles</text:p>
                </text:list-item>
                <text:list-item>
                  <text:p text:style-name="P9">Tableau proportionnalité</text:p>
                </text:list-item>
              </text:list>
            </text:list-item>
            <text:list-item>
              <text:p text:style-name="P9">Pourcentages,</text:p>
              <text:list>
                <text:list-item>
                  <text:p text:style-name="P9">Définition</text:p>
                </text:list-item>
                <text:list-item>
                  <text:p text:style-name="P9">Calculs avec, augmentation réduction</text:p>
                </text:list-item>
                <text:list-item>
                  <text:p text:style-name="P9">Évolutions successives</text:p>
                </text:list-item>
                <text:list-item>
                  <text:p text:style-name="P9">Évolution réciproque</text:p>
                </text:list-item>
                <text:list-item>
                  <text:p text:style-name="P9">Taux évolution</text:p>
                </text:list-item>
                <text:list-item>
                  <text:p text:style-name="P9">évolution moyenne</text:p>
                </text:list-item>
              </text:list>
            </text:list-item>
          </text:list>
        </text:list-item>
        <text:list-item>
          <text:p text:style-name="P9">Applications</text:p>
          <text:list>
            <text:list-item>
              <text:p text:style-name="P9">TVA</text:p>
            </text:list-item>
            <text:list-item>
              <text:p text:style-name="P9">Croissance PIB</text:p>
            </text:list-item>
            <text:list-item>
              <text:p text:style-name="P10">Epargne avec suites.</text:p>
            </text:list-item>
            <text:list-item>
              <text:p text:style-name="P9">Population loups</text:p>
            </text:list-item>
            <text:list-item>
              <text:p text:style-name="P9">Proba condit ???</text:p>
            </text:list-item>
            <text:list-item>
              <text:p text:style-name="P9">Diagramme circulaire</text:p>
            </text:list-item>
            <text:list-item>
              <text:p text:style-name="P11">Indices loyers</text:p>
            </text:list-item>
            <text:list-item>
              <text:p text:style-name="P12">Intérets composé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4.2$Linux_X86_64 LibreOffice_project/c44d3140fc62714965bf5d98735e0d79ba4b1ebd</meta:generator>
    <dc:date>2026-06-10T13:46:57.693210813</dc:date>
    <meta:editing-duration>P1DT14H40M53S</meta:editing-duration>
    <meta:editing-cycles>229</meta:editing-cycles>
    <meta:document-statistic meta:table-count="0" meta:image-count="0" meta:object-count="0" meta:page-count="1" meta:paragraph-count="27" meta:word-count="160" meta:character-count="1078" meta:non-whitespace-character-count="963"/>
  </office:meta>
</office:document-meta>
</file>